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 Text&quot;" svg:font-family="'&quot;Google Sans Text&quot;'"/>
    <style:font-face style:name="Arial" svg:font-family="Arial"/>
    <style:font-face style:name="Calibri" svg:font-family="Calibri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2.1pt"/>
    </style:style>
    <style:style style:name="co2" style:family="table-column">
      <style:table-column-properties fo:break-before="auto" style:column-width="141pt"/>
    </style:style>
    <style:style style:name="co3" style:family="table-column">
      <style:table-column-properties fo:break-before="auto" style:column-width="104.14pt"/>
    </style:style>
    <style:style style:name="co4" style:family="table-column">
      <style:table-column-properties fo:break-before="auto" style:column-width="140.29pt"/>
    </style:style>
    <style:style style:name="co5" style:family="table-column">
      <style:table-column-properties fo:break-before="auto" style:column-width="93.74pt"/>
    </style:style>
    <style:style style:name="co6" style:family="table-column">
      <style:table-column-properties fo:break-before="auto" style:column-width="56.95pt"/>
    </style:style>
    <style:style style:name="co7" style:family="table-column">
      <style:table-column-properties fo:break-before="auto" style:column-width="77.81pt"/>
    </style:style>
    <style:style style:name="co8" style:family="table-column">
      <style:table-column-properties fo:break-before="auto" style:column-width="56.24pt"/>
    </style:style>
    <style:style style:name="co9" style:family="table-column">
      <style:table-column-properties fo:break-before="auto" style:column-width="103.49pt"/>
    </style:style>
    <style:style style:name="co10" style:family="table-column">
      <style:table-column-properties fo:break-before="auto" style:column-width="98.59pt"/>
    </style:style>
    <style:style style:name="co11" style:family="table-column">
      <style:table-column-properties fo:break-before="auto" style:column-width="100.01pt"/>
    </style:style>
    <style:style style:name="co12" style:family="table-column">
      <style:table-column-properties fo:break-before="auto" style:column-width="143.04pt"/>
    </style:style>
    <style:style style:name="co13" style:family="table-column">
      <style:table-column-properties fo:break-before="auto" style:column-width="70.16pt"/>
    </style:style>
    <style:style style:name="co14" style:family="table-column">
      <style:table-column-properties fo:break-before="auto" style:column-width="93.06pt"/>
    </style:style>
    <style:style style:name="co15" style:family="table-column">
      <style:table-column-properties fo:break-before="auto" style:column-width="86.09pt"/>
    </style:style>
    <style:style style:name="co16" style:family="table-column">
      <style:table-column-properties fo:break-before="auto" style:column-width="72.96pt"/>
    </style:style>
    <style:style style:name="co17" style:family="table-column">
      <style:table-column-properties fo:break-before="auto" style:column-width="73.59pt"/>
    </style:style>
    <style:style style:name="co18" style:family="table-column">
      <style:table-column-properties fo:break-before="auto" style:column-width="80.56pt"/>
    </style:style>
    <style:style style:name="co19" style:family="table-column">
      <style:table-column-properties fo:break-before="auto" style:column-width="122.26pt"/>
    </style:style>
    <style:style style:name="co20" style:family="table-column">
      <style:table-column-properties fo:break-before="auto" style:column-width="115.99pt"/>
    </style:style>
    <style:style style:name="co21" style:family="table-column">
      <style:table-column-properties fo:break-before="auto" style:column-width="118.06pt"/>
    </style:style>
    <style:style style:name="co22" style:family="table-column">
      <style:table-column-properties fo:break-before="auto" style:column-width="119.45pt"/>
    </style:style>
    <style:style style:name="co23" style:family="table-column">
      <style:table-column-properties fo:break-before="auto" style:column-width="79.14pt"/>
    </style:style>
    <style:style style:name="co24" style:family="table-column">
      <style:table-column-properties fo:break-before="auto" style:column-width="76.39pt"/>
    </style:style>
    <style:style style:name="co25" style:family="table-column">
      <style:table-column-properties fo:break-before="auto" style:column-width="91.64pt"/>
    </style:style>
    <style:style style:name="co26" style:family="table-column">
      <style:table-column-properties fo:break-before="auto" style:column-width="83.34pt"/>
    </style:style>
    <style:style style:name="co27" style:family="table-column">
      <style:table-column-properties fo:break-before="auto" style:column-width="90.31pt"/>
    </style:style>
    <style:style style:name="co28" style:family="table-column">
      <style:table-column-properties fo:break-before="auto" style:column-width="106.95pt"/>
    </style:style>
    <style:style style:name="co29" style:family="table-column">
      <style:table-column-properties fo:break-before="auto" style:column-width="95.16pt"/>
    </style:style>
    <style:style style:name="co30" style:family="table-column">
      <style:table-column-properties fo:break-before="auto" style:column-width="170.16pt"/>
    </style:style>
    <style:style style:name="co31" style:family="table-column">
      <style:table-column-properties fo:break-before="auto" style:column-width="113.19pt"/>
    </style:style>
    <style:style style:name="co32" style:family="table-column">
      <style:table-column-properties fo:break-before="auto" style:column-width="72.26pt"/>
    </style:style>
    <style:style style:name="co33" style:family="table-column">
      <style:table-column-properties fo:break-before="auto" style:column-width="109.76pt"/>
    </style:style>
    <style:style style:name="co34" style:family="table-column">
      <style:table-column-properties fo:break-before="auto" style:column-width="111.09pt"/>
    </style:style>
    <style:style style:name="co35" style:family="table-column">
      <style:table-column-properties fo:break-before="auto" style:column-width="94.45pt"/>
    </style:style>
    <style:style style:name="co36" style:family="table-column">
      <style:table-column-properties fo:break-before="auto" style:column-width="85.44pt"/>
    </style:style>
    <style:style style:name="co37" style:family="table-column">
      <style:table-column-properties fo:break-before="auto" style:column-width="130.56pt"/>
    </style:style>
    <style:style style:name="co38" style:family="table-column">
      <style:table-column-properties fo:break-before="auto" style:column-width="112.51pt"/>
    </style:style>
    <style:style style:name="co39" style:family="table-column">
      <style:table-column-properties fo:break-before="auto" style:column-width="104.91pt"/>
    </style:style>
    <style:style style:name="co40" style:family="table-column">
      <style:table-column-properties fo:break-before="auto" style:column-width="167.41pt"/>
    </style:style>
    <style:style style:name="co41" style:family="table-column">
      <style:table-column-properties fo:break-before="auto" style:column-width="127.81pt"/>
    </style:style>
    <style:style style:name="co42" style:family="table-column">
      <style:table-column-properties fo:break-before="auto" style:column-width="102.81pt"/>
    </style:style>
    <style:style style:name="co43" style:family="table-column">
      <style:table-column-properties fo:break-before="auto" style:column-width="90.99pt"/>
    </style:style>
    <style:style style:name="co44" style:family="table-column">
      <style:table-column-properties fo:break-before="auto" style:column-width="96.55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8.74pt" fo:break-before="auto" style:use-optimal-row-height="false"/>
    </style:style>
    <style:style style:name="ta1" style:family="table" style:master-page-name="PageStyle_5f_Transacciones">
      <style:table-properties table:display="true" style:writing-mode="lr-tb"/>
    </style:style>
    <style:style style:name="ta2" style:family="table" style:master-page-name="PageStyle_5f_Semanal_20_-_20_Liquidacion">
      <style:table-properties table:display="true" style:writing-mode="lr-tb"/>
    </style:style>
    <style:style style:name="ta3" style:family="table" style:master-page-name="PageStyle_5f_Historial_20_de_20_Pagos">
      <style:table-properties table:display="true" style:writing-mode="lr-tb"/>
    </style:style>
    <style:style style:name="ta4" style:family="table" style:master-page-name="PageStyle_5f_Rendimientos">
      <style:table-properties table:display="true" style:writing-mode="lr-tb"/>
    </style:style>
    <style:style style:name="ta5" style:family="table" style:master-page-name="PageStyle_5f_Payouts_20_Stripe">
      <style:table-properties table:display="true" style:writing-mode="lr-tb"/>
    </style:style>
    <style:style style:name="ta6" style:family="table" style:master-page-name="PageStyle_5f_Gastos_20_Talaria">
      <style:table-properties table:display="true" style:writing-mode="lr-tb"/>
    </style:style>
    <style:style style:name="ta7" style:family="table" style:master-page-name="PageStyle_5f_Fondeo_20_Kraken">
      <style:table-properties table:display="true" style:writing-mode="lr-tb"/>
    </style:style>
    <style:style style:name="ta8" style:family="table" style:master-page-name="PageStyle_5f_Balance_20_Stripe">
      <style:table-properties table:display="true" style:writing-mode="lr-tb"/>
    </style:style>
    <style:style style:name="ta9" style:family="table" style:master-page-name="PageStyle_5f_Bot_20_Saldos">
      <style:table-properties table:display="true" style:writing-mode="lr-tb"/>
    </style:style>
    <style:style style:name="ta10" style:family="table" style:master-page-name="PageStyle_5f_Billetera_20_Ads">
      <style:table-properties table:display="true" style:writing-mode="lr-tb"/>
    </style:style>
    <style:style style:name="ta11" style:family="table" style:master-page-name="PageStyle_5f_Registro_20_Factura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F1]))&gt;0)" style:apply-style-name="ConditionalStyle_5f_6" style:base-cell-address="Transacciones.F1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F1]))&gt;0)" style:apply-style-name="ConditionalStyle_5f_6" style:base-cell-address="Transacciones.F1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5" style:family="table-cell" style:parent-style-name="Pivot_20_Table_20_Category" style:data-style-name="N126">
      <style:table-cell-properties fo:border-bottom="none" fo:border-left="2.01pt solid #000000" fo:border-right="0.99pt solid #000000" fo:border-top="0.99pt solid #000000"/>
    </style:style>
    <style:style style:name="ce36" style:family="table-cell" style:parent-style-name="Pivot_20_Table_20_Category" style:data-style-name="N126">
      <style:table-cell-properties fo:border-bottom="none" fo:border-left="2.01pt solid #000000" fo:border-right="0.99pt solid #000000" fo:border-top="none"/>
    </style:style>
    <style:style style:name="ce37" style:family="table-cell" style:parent-style-name="Pivot_20_Table_20_Title" style:data-style-name="N126">
      <style:table-cell-properties fo:border-bottom="2.01pt solid #000000" fo:border-left="2.01pt solid #000000" fo:border-right="0.99pt solid #000000" fo:border-top="0.99pt solid #000000"/>
    </style:style>
    <style:style style:name="ce3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0" style:family="table-cell" style:parent-style-name="Pivot_20_Table_20_Value" style:data-style-name="N125">
      <style:table-cell-properties fo:border-bottom="none" fo:border-left="0.99pt solid #000000" fo:border-right="none" fo:border-top="0.99pt solid #000000"/>
    </style:style>
    <style:style style:name="ce41" style:family="table-cell" style:parent-style-name="Pivot_20_Table_20_Value" style:data-style-name="N125">
      <style:table-cell-properties fo:border-bottom="none" fo:border-left="0.99pt solid #000000" fo:border-right="none" fo:border-top="none"/>
    </style:style>
    <style:style style:name="ce4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43" style:family="table-cell" style:parent-style-name="Pivot_20_Table_20_Result" style:data-style-name="N125">
      <style:table-cell-properties fo:border-bottom="2.01pt solid #000000" fo:border-left="0.99pt solid #000000" fo:border-right="none" fo:border-top="0.99pt solid #000000"/>
    </style:style>
    <style:style style:name="ce4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6" style:family="table-cell" style:parent-style-name="Pivot_20_Table_20_Value" style:data-style-name="N125">
      <style:table-cell-properties fo:border-bottom="none" fo:border-left="none" fo:border-right="2.01pt solid #000000" fo:border-top="0.99pt solid #000000"/>
    </style:style>
    <style:style style:name="ce47" style:family="table-cell" style:parent-style-name="Pivot_20_Table_20_Value" style:data-style-name="N125">
      <style:table-cell-properties fo:border-bottom="none" fo:border-left="none" fo:border-right="2.01pt solid #000000" fo:border-top="none"/>
    </style:style>
    <style:style style:name="ce48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49" style:family="table-cell" style:parent-style-name="Pivot_20_Table_20_Result" style:data-style-name="N125">
      <style:table-cell-properties fo:border-bottom="2.01pt solid #000000" fo:border-left="none" fo:border-right="2.01pt solid #000000" fo:border-top="0.99pt solid #000000"/>
    </style:style>
    <style:style style:name="ce50" style:family="table-cell" style:parent-style-name="Default" style:data-style-name="N13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5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5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6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61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62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63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65" style:family="table-cell" style:parent-style-name="Default" style:data-style-name="N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74pt" svg:stroke-color="#000000" draw:stroke-linejoin="round" draw:fill="solid" draw:fill-color="#000000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2" style:family="graphic">
      <style:graphic-properties draw:stroke="solid" svg:stroke-width="0.74pt" svg:stroke-color="#000000" draw:stroke-linejoin="round" draw:fill="solid" draw:fill-color="#cfe2f3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3" style:family="graphic">
      <style:graphic-properties draw:stroke="none" svg:stroke-width="0pt" draw:fill="none" draw:textarea-vertical-align="top" draw:auto-grow-height="true" draw:fit-to-size="false" style:shrink-to-fit="false" fo:min-height="0pt" fo:min-width="0pt" fo:padding-top="7.2pt" fo:padding-bottom="7.2pt" fo:padding-left="7.2pt" fo:padding-right="7.2pt" fo:wrap-option="wrap"/>
    </style:style>
    <style:style style:name="P1" style:family="paragraph">
      <loext:graphic-properties draw:fill="solid" draw:fill-color="#000000"/>
      <style:paragraph-properties fo:text-align="start"/>
      <style:text-properties fo:font-size="18pt"/>
    </style:style>
    <style:style style:name="P2" style:family="paragraph">
      <loext:graphic-properties draw:fill="solid" draw:fill-color="#cfe2f3"/>
      <style:paragraph-properties fo:text-align="start"/>
      <style:text-properties fo:font-size="18pt"/>
    </style:style>
    <style:style style:name="P3" style:family="paragraph">
      <style:paragraph-properties fo:margin-left="0pt" fo:margin-right="0pt" fo:margin-top="0pt" fo:margin-bottom="0pt" fo:line-height="100%" fo:text-align="center" fo:text-indent="0pt" style:writing-mode="lr-tb">
        <style:tab-stops>
          <style:tab-stop style:position="0pt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pt" fo:margin-right="0pt" fo:margin-top="0pt" fo:margin-bottom="0pt" fo:line-height="100%" fo:text-align="start" fo:text-indent="0pt" style:writing-mode="lr-tb">
        <style:tab-stops>
          <style:tab-stop style:position="0pt"/>
        </style:tab-stops>
      </style:paragraph-properties>
    </style:style>
    <style:style style:name="T1" style:family="text">
      <style:text-properties fo:font-variant="normal" fo:text-transform="none" style:text-line-through-style="none" style:text-line-through-type="none" style:text-position="0% 100%" fo:font-family="Comfortaa" fo:font-size="14pt" fo:letter-spacing="normal" fo:font-style="normal" style:text-underline-style="none" fo:font-weight="normal" style:font-family-asian="Comfortaa" style:font-size-asian="14pt" style:font-style-asian="normal" style:font-weight-asian="normal" style:font-family-complex="Comfortaa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family="Comfortaa" fo:font-size="14pt" fo:letter-spacing="normal" fo:font-style="normal" style:text-underline-style="none" fo:font-weight="bold" style:font-family-asian="Comfortaa" style:font-size-asian="14pt" style:font-style-asian="normal" style:font-weight-asian="bold" style:font-family-complex="Comfortaa" style:font-size-complex="14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AND(ISNUMBER([.I2]);(NOT(OR(NOT(ISERROR(DATEVALUE([.I2]))); AND(ISNUMBER([.I2]); LEFT(CELL(&quot;format&quot;; [.I2]))=&quot;D&quot;))))),0)" table:allow-empty-cell="true" table:base-cell-address="Transacciones.I2"/>
        <table:content-validation table:name="val2" table:condition="of:cell-content-is-in-list(&quot;Pendiente&quot;;&quot;Procesado&quot;;&quot;Reembolsado&quot;)" table:allow-empty-cell="true" table:display-list="unsorted" table:base-cell-address="Transacciones.L2"/>
        <table:content-validation table:name="val3" table:condition="of: and cell-content-is-between(OR(NOT(ISERROR(DATEVALUE([.K3]))); AND(ISNUMBER([.K3]); LEFT(CELL(&quot;format&quot;; [.K3]))=&quot;D&quot;)),0)" table:allow-empty-cell="true" table:base-cell-address="'Semanal - Liquidacion'.K3"/>
        <table:content-validation table:name="val4" table:condition="of:cell-content-is-in-list(&quot;Pendiente&quot;;&quot;Procesado&quot;;&quot;Reembolsado&quot;)" table:allow-empty-cell="true" table:display-list="unsorted" table:base-cell-address="'Payouts Stripe'.D2"/>
        <table:content-validation table:name="val5" table:condition="of: and cell-content-is-between(OR(NOT(ISERROR(DATEVALUE([.A2]))); AND(ISNUMBER([.A2]); LEFT(CELL(&quot;format&quot;; [.A2]))=&quot;D&quot;)),0)" table:allow-empty-cell="true" table:base-cell-address="'Fondeo Kraken'.A2"/>
      </table:content-validations>
      <table:table table:name="Transac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Origen / TIpo</text:p>
          </table:table-cell>
          <table:table-cell table:style-name="ce1" office:value-type="string" calcext:value-type="string">
            <text:p>ID Transaccion</text:p>
          </table:table-cell>
          <table:table-cell table:style-name="ce1" office:value-type="string" calcext:value-type="string">
            <text:p>Email/Cliente Final</text:p>
          </table:table-cell>
          <table:table-cell table:style-name="ce1" office:value-type="string" calcext:value-type="string">
            <text:p>ID Proveedor</text:p>
          </table:table-cell>
          <table:table-cell table:style-name="ce5" office:value-type="string" calcext:value-type="string">
            <text:p>Bruto</text:p>
          </table:table-cell>
          <table:table-cell table:style-name="ce5" office:value-type="string" calcext:value-type="string">
            <text:p>Comision</text:p>
          </table:table-cell>
          <table:table-cell table:style-name="ce5" office:value-type="string" calcext:value-type="string">
            <text:p>Neto</text:p>
          </table:table-cell>
          <table:table-cell table:style-name="ce1" office:value-type="string" calcext:value-type="string">
            <text:p>Honorarios</text:p>
          </table:table-cell>
          <table:table-cell table:style-name="ce1" office:value-type="string" calcext:value-type="string">
            <text:p>A Liquidar</text:p>
          </table:table-cell>
          <table:table-cell table:style-name="ce10" office:value-type="string" calcext:value-type="string">
            <text:p>Fecha de Liquidacion</text:p>
          </table:table-cell>
          <table:table-cell table:style-name="ce1" office:value-type="string" calcext:value-type="string">
            <text:p>Estado Liquidacion</text:p>
          </table:table-cell>
          <table:table-cell table:style-name="ce15" office:value-type="string" calcext:value-type="string">
            <text:p>USDT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2-23T16:27:00" calcext:value-type="date">
            <text:p>23/02/2026 16:27:00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Carlos mariano M.C.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[.H2]*0.2" office:value-type="currency" office:currency="EUR" office:value="4" calcext:value-type="currency">
            <text:p>€4.00</text:p>
          </table:table-cell>
          <table:table-cell table:style-name="ce9" table:content-validation-name="val1" table:formula="of:=[.H2]*0.8" office:value-type="currency" office:currency="EUR" office:value="16" calcext:value-type="currency">
            <text:p>€16.00</text:p>
          </table:table-cell>
          <table:table-cell table:style-name="ce11" table:formula="of:=IF([.B2]=&quot;Stripe&quot;; INT([.A2]) + 12 - WEEKDAY([.A2]; 2); INT([.A2]) + CHOOSE(WEEKDAY([.A2]; 2); 4; 3; 2; 1; 7; 6; 5))" office:value-type="date" office:date-value="2026-02-27" calcext:value-type="date">
            <text:p>27/02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5485740783677" calcext:value-type="currency">
            <text:p>$18.55</text:p>
          </table:table-cell>
          <table:table-cell/>
          <table:table-cell table:style-name="ce18" office:value-type="string" calcext:value-type="string">
            <text:p>Bizums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6-02-23T17:13:20" calcext:value-type="date">
            <text:p>23/02/2026 17:13:20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Jose J.S.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45" calcext:value-type="currency">
            <text:p>€45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45" calcext:value-type="currency">
            <text:p>€45.00</text:p>
          </table:table-cell>
          <table:table-cell table:style-name="ce9" table:content-validation-name="val1" table:formula="of:=[.H3]*0.2" office:value-type="currency" office:currency="EUR" office:value="9" calcext:value-type="currency">
            <text:p>€9.00</text:p>
          </table:table-cell>
          <table:table-cell table:style-name="ce9" table:content-validation-name="val1" table:formula="of:=[.H3]*0.8" office:value-type="currency" office:currency="EUR" office:value="36" calcext:value-type="currency">
            <text:p>€36.00</text:p>
          </table:table-cell>
          <table:table-cell table:style-name="ce11" table:formula="of:=IF([.B3]=&quot;Stripe&quot;; INT([.A3]) + 12 - WEEKDAY([.A3]; 2); INT([.A3]) + CHOOSE(WEEKDAY([.A3]; 2); 4; 3; 2; 1; 7; 6; 5))" office:value-type="date" office:date-value="2026-02-27" calcext:value-type="date">
            <text:p>27/02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41.7342916763274" calcext:value-type="currency">
            <text:p>$41.73</text:p>
          </table:table-cell>
          <table:table-cell/>
          <table:table-cell table:style-name="ce19" table:formula="of:=SUMPRODUCT((MONTH([.A2:.A1036])=3) * (YEAR([.A2:.A1036])=2026) * ([.B2:.B1036]=&quot;BIZUM&quot;))" office:value-type="float" office:value="42" calcext:value-type="float">
            <text:p>42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6-02-23T17:28:00" calcext:value-type="date">
            <text:p>23/02/2026 17:28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41zxQRhkM9CcvM0CB7y36c</text:p>
          </table:table-cell>
          <table:table-cell table:style-name="ce4" office:value-type="string" calcext:value-type="string">
            <text:p>victorlopez1999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40" calcext:value-type="currency">
            <text:p>€40.00</text:p>
          </table:table-cell>
          <table:table-cell table:style-name="ce5" office:value-type="currency" office:currency="EUR" office:value="1.55" calcext:value-type="currency">
            <text:p>€1.55</text:p>
          </table:table-cell>
          <table:table-cell table:style-name="ce5" office:value-type="currency" office:currency="EUR" office:value="38.45" calcext:value-type="currency">
            <text:p>€38.45</text:p>
          </table:table-cell>
          <table:table-cell table:style-name="ce9" table:content-validation-name="val1" table:formula="of:=[.H4]*0.2" office:value-type="currency" office:currency="EUR" office:value="7.69" calcext:value-type="currency">
            <text:p>€7.69</text:p>
          </table:table-cell>
          <table:table-cell table:style-name="ce9" table:content-validation-name="val1" table:formula="of:=[.H4]*0.8" office:value-type="currency" office:currency="EUR" office:value="30.76" calcext:value-type="currency">
            <text:p>€30.76</text:p>
          </table:table-cell>
          <table:table-cell table:style-name="ce11" table:formula="of:=IF([.B4]=&quot;Stripe&quot;; INT([.A4]) + 12 - WEEKDAY([.A4]; 2); INT([.A4]) + CHOOSE(WEEKDAY([.A4]; 2); 4; 3; 2; 1; 7; 6; 5))" office:value-type="date" office:date-value="2026-03-06" calcext:value-type="date">
            <text:p>06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34.9624914753353" calcext:value-type="currency">
            <text:p>$34.9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2-23T18:28:39" calcext:value-type="date">
            <text:p>23/02/2026 18:28:39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DAVID M.G.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9" table:content-validation-name="val1" table:formula="of:=[.H5]*0.2" office:value-type="currency" office:currency="EUR" office:value="6" calcext:value-type="currency">
            <text:p>€6.00</text:p>
          </table:table-cell>
          <table:table-cell table:style-name="ce9" table:content-validation-name="val1" table:formula="of:=[.H5]*0.8" office:value-type="currency" office:currency="EUR" office:value="24" calcext:value-type="currency">
            <text:p>€24.00</text:p>
          </table:table-cell>
          <table:table-cell table:style-name="ce11" table:formula="of:=IF([.B5]=&quot;Stripe&quot;; INT([.A5]) + 12 - WEEKDAY([.A5]; 2); INT([.A5]) + CHOOSE(WEEKDAY([.A5]; 2); 4; 3; 2; 1; 7; 6; 5))" office:value-type="date" office:date-value="2026-02-27" calcext:value-type="date">
            <text:p>27/02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27.8228611175516" calcext:value-type="currency">
            <text:p>$27.82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6-02-23T18:50:00" calcext:value-type="date">
            <text:p>23/02/2026 18:50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43H8QRhkM9CcvM15cjRWm7</text:p>
          </table:table-cell>
          <table:table-cell table:style-name="ce4" office:value-type="string" calcext:value-type="string">
            <text:p>isaacmolnagal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.55" calcext:value-type="currency">
            <text:p>€0.55</text:p>
          </table:table-cell>
          <table:table-cell table:style-name="ce5" office:value-type="currency" office:currency="EUR" office:value="19.45" calcext:value-type="currency">
            <text:p>€19.45</text:p>
          </table:table-cell>
          <table:table-cell table:style-name="ce9" table:content-validation-name="val1" table:formula="of:=[.H6]*0.2" office:value-type="currency" office:currency="EUR" office:value="3.89" calcext:value-type="currency">
            <text:p>€3.89</text:p>
          </table:table-cell>
          <table:table-cell table:style-name="ce9" table:content-validation-name="val1" table:formula="of:=[.H6]*0.8" office:value-type="currency" office:currency="EUR" office:value="15.56" calcext:value-type="currency">
            <text:p>€15.56</text:p>
          </table:table-cell>
          <table:table-cell table:style-name="ce11" table:formula="of:=IF([.B6]=&quot;Stripe&quot;; INT([.A6]) + 12 - WEEKDAY([.A6]; 2); INT([.A6]) + CHOOSE(WEEKDAY([.A6]; 2); 4; 3; 2; 1; 7; 6; 5))" office:value-type="date" office:date-value="2026-03-06" calcext:value-type="date">
            <text:p>06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7.6858376903842" calcext:value-type="currency">
            <text:p>$17.69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6-02-24T00:40:00" calcext:value-type="date">
            <text:p>24/02/2026 00:40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48jUQRhkM9CcvM1mikgcWI</text:p>
          </table:table-cell>
          <table:table-cell table:style-name="ce4" office:value-type="string" calcext:value-type="string">
            <text:p>saokijeff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1" calcext:value-type="currency">
            <text:p>€1.00</text:p>
          </table:table-cell>
          <table:table-cell table:style-name="ce5" office:value-type="currency" office:currency="EUR" office:value="0.27" calcext:value-type="currency">
            <text:p>€0.27</text:p>
          </table:table-cell>
          <table:table-cell table:style-name="ce5" office:value-type="currency" office:currency="EUR" office:value="0.73" calcext:value-type="currency">
            <text:p>€0.73</text:p>
          </table:table-cell>
          <table:table-cell table:style-name="ce9" table:content-validation-name="val1" table:formula="of:=[.H7]*0.2" office:value-type="currency" office:currency="EUR" office:value="0.146" calcext:value-type="currency">
            <text:p>€0.15</text:p>
          </table:table-cell>
          <table:table-cell table:style-name="ce9" table:content-validation-name="val1" table:formula="of:=[.H7]*0.8" office:value-type="currency" office:currency="EUR" office:value="0.584" calcext:value-type="currency">
            <text:p>€0.58</text:p>
          </table:table-cell>
          <table:table-cell table:style-name="ce11" table:formula="of:=IF([.B7]=&quot;Stripe&quot;; INT([.A7]) + 12 - WEEKDAY([.A7]; 2); INT([.A7]) + CHOOSE(WEEKDAY([.A7]; 2); 4; 3; 2; 1; 7; 6; 5))" office:value-type="date" office:date-value="2026-03-06" calcext:value-type="date">
            <text:p>06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0.663787224369175" calcext:value-type="currency">
            <text:p>$0.66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6-02-24T00:42:00" calcext:value-type="date">
            <text:p>24/02/2026 00:42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48lGQRhkM9CcvM1bJjEFwN</text:p>
          </table:table-cell>
          <table:table-cell table:style-name="ce4" office:value-type="string" calcext:value-type="string">
            <text:p>saokijeff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35" calcext:value-type="currency">
            <text:p>€35.00</text:p>
          </table:table-cell>
          <table:table-cell table:style-name="ce5" office:value-type="currency" office:currency="EUR" office:value="0.78" calcext:value-type="currency">
            <text:p>€0.78</text:p>
          </table:table-cell>
          <table:table-cell table:style-name="ce5" office:value-type="currency" office:currency="EUR" office:value="34.22" calcext:value-type="currency">
            <text:p>€34.22</text:p>
          </table:table-cell>
          <table:table-cell table:style-name="ce9" table:content-validation-name="val1" table:formula="of:=[.H8]*0.2" office:value-type="currency" office:currency="EUR" office:value="6.844" calcext:value-type="currency">
            <text:p>€6.84</text:p>
          </table:table-cell>
          <table:table-cell table:style-name="ce9" table:content-validation-name="val1" table:formula="of:=[.H8]*0.8" office:value-type="currency" office:currency="EUR" office:value="27.376" calcext:value-type="currency">
            <text:p>€27.38</text:p>
          </table:table-cell>
          <table:table-cell table:style-name="ce11" table:formula="of:=IF([.B8]=&quot;Stripe&quot;; INT([.A8]) + 12 - WEEKDAY([.A8]; 2); INT([.A8]) + CHOOSE(WEEKDAY([.A8]; 2); 4; 3; 2; 1; 7; 6; 5))" office:value-type="date" office:date-value="2026-03-06" calcext:value-type="date">
            <text:p>06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31.1161627642646" calcext:value-type="currency">
            <text:p>$31.1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2-24T15:47:08" calcext:value-type="date">
            <text:p>24/02/2026 15:47:08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JAVIER A.U.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[.H9]*0.2" office:value-type="currency" office:currency="EUR" office:value="4" calcext:value-type="currency">
            <text:p>€4.00</text:p>
          </table:table-cell>
          <table:table-cell table:style-name="ce9" table:content-validation-name="val1" table:formula="of:=[.H9]*0.8" office:value-type="currency" office:currency="EUR" office:value="16" calcext:value-type="currency">
            <text:p>€16.00</text:p>
          </table:table-cell>
          <table:table-cell table:style-name="ce11" table:formula="of:=IF([.B9]=&quot;Stripe&quot;; INT([.A9]) + 12 - WEEKDAY([.A9]; 2); INT([.A9]) + CHOOSE(WEEKDAY([.A9]; 2); 4; 3; 2; 1; 7; 6; 5))" office:value-type="date" office:date-value="2026-02-27" calcext:value-type="date">
            <text:p>27/02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5485740783677" calcext:value-type="currency">
            <text:p>$18.55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6-02-24T17:04:00" calcext:value-type="date">
            <text:p>24/02/2026 17:04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4O6KQRhkM9CcvM00WnxtGM</text:p>
          </table:table-cell>
          <table:table-cell table:style-name="ce4" office:value-type="string" calcext:value-type="string">
            <text:p>ivan14valero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15" calcext:value-type="currency">
            <text:p>€15.00</text:p>
          </table:table-cell>
          <table:table-cell table:style-name="ce5" office:value-type="currency" office:currency="EUR" office:value="0.48" calcext:value-type="currency">
            <text:p>€0.48</text:p>
          </table:table-cell>
          <table:table-cell table:style-name="ce5" office:value-type="currency" office:currency="EUR" office:value="14.52" calcext:value-type="currency">
            <text:p>€14.52</text:p>
          </table:table-cell>
          <table:table-cell table:style-name="ce9" table:content-validation-name="val1" table:formula="of:=[.H10]*0.2" office:value-type="currency" office:currency="EUR" office:value="2.904" calcext:value-type="currency">
            <text:p>€2.90</text:p>
          </table:table-cell>
          <table:table-cell table:style-name="ce9" table:content-validation-name="val1" table:formula="of:=[.H10]*0.8" office:value-type="currency" office:currency="EUR" office:value="11.616" calcext:value-type="currency">
            <text:p>€11.62</text:p>
          </table:table-cell>
          <table:table-cell table:style-name="ce11" table:formula="of:=IF([.B10]=&quot;Stripe&quot;; INT([.A10]) + 12 - WEEKDAY([.A10]; 2); INT([.A10]) + CHOOSE(WEEKDAY([.A10]; 2); 4; 3; 2; 1; 7; 6; 5))" office:value-type="date" office:date-value="2026-03-06" calcext:value-type="date">
            <text:p>06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3.2030006819732" calcext:value-type="currency">
            <text:p>$13.20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2-24T23:07:08" calcext:value-type="date">
            <text:p>24/02/2026 23:07:08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Cristian R.A.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40" calcext:value-type="currency">
            <text:p>€4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40" calcext:value-type="currency">
            <text:p>€40.00</text:p>
          </table:table-cell>
          <table:table-cell table:style-name="ce9" table:content-validation-name="val1" table:formula="of:=[.H11]*0.2" office:value-type="currency" office:currency="EUR" office:value="8" calcext:value-type="currency">
            <text:p>€8.00</text:p>
          </table:table-cell>
          <table:table-cell table:style-name="ce9" table:content-validation-name="val1" table:formula="of:=[.H11]*0.8" office:value-type="currency" office:currency="EUR" office:value="32" calcext:value-type="currency">
            <text:p>€32.00</text:p>
          </table:table-cell>
          <table:table-cell table:style-name="ce11" table:formula="of:=IF([.B11]=&quot;Stripe&quot;; INT([.A11]) + 12 - WEEKDAY([.A11]; 2); INT([.A11]) + CHOOSE(WEEKDAY([.A11]; 2); 4; 3; 2; 1; 7; 6; 5))" office:value-type="date" office:date-value="2026-02-27" calcext:value-type="date">
            <text:p>27/02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37.0971481567354" calcext:value-type="currency">
            <text:p>$37.10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2-24T23:13:29" calcext:value-type="date">
            <text:p>24/02/2026 23:13:29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Juan Manuel R.M.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currency" office:currency="EUR" office:value="15" calcext:value-type="currency">
            <text:p>€15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15" calcext:value-type="currency">
            <text:p>€15.00</text:p>
          </table:table-cell>
          <table:table-cell table:style-name="ce9" table:content-validation-name="val1" table:formula="of:=[.H12]*0.2" office:value-type="currency" office:currency="EUR" office:value="3" calcext:value-type="currency">
            <text:p>€3.00</text:p>
          </table:table-cell>
          <table:table-cell table:style-name="ce9" table:content-validation-name="val1" table:formula="of:=[.H12]*0.8" office:value-type="currency" office:currency="EUR" office:value="12" calcext:value-type="currency">
            <text:p>€12.00</text:p>
          </table:table-cell>
          <table:table-cell table:style-name="ce11" table:formula="of:=IF([.B12]=&quot;Stripe&quot;; INT([.A12]) + 12 - WEEKDAY([.A12]; 2); INT([.A12]) + CHOOSE(WEEKDAY([.A12]; 2); 4; 3; 2; 1; 7; 6; 5))" office:value-type="date" office:date-value="2026-02-27" calcext:value-type="date">
            <text:p>27/02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3.9114305587758" calcext:value-type="currency">
            <text:p>$13.9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2-25T00:24:58" calcext:value-type="date">
            <text:p>25/02/2026 00:24:58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Rodrigo R.H.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[.H13]*0.2" office:value-type="currency" office:currency="EUR" office:value="4" calcext:value-type="currency">
            <text:p>€4.00</text:p>
          </table:table-cell>
          <table:table-cell table:style-name="ce9" table:content-validation-name="val1" table:formula="of:=[.H13]*0.8" office:value-type="currency" office:currency="EUR" office:value="16" calcext:value-type="currency">
            <text:p>€16.00</text:p>
          </table:table-cell>
          <table:table-cell table:style-name="ce11" table:formula="of:=IF([.B13]=&quot;Stripe&quot;; INT([.A13]) + 12 - WEEKDAY([.A13]; 2); INT([.A13]) + CHOOSE(WEEKDAY([.A13]; 2); 4; 3; 2; 1; 7; 6; 5))" office:value-type="date" office:date-value="2026-02-27" calcext:value-type="date">
            <text:p>27/02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5485740783677" calcext:value-type="currency">
            <text:p>$18.5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2-25T12:05:11" calcext:value-type="date">
            <text:p>25/02/2026 12:05:11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Jesus H.S.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currency" office:currency="EUR" office:value="15" calcext:value-type="currency">
            <text:p>€15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15" calcext:value-type="currency">
            <text:p>€15.00</text:p>
          </table:table-cell>
          <table:table-cell table:style-name="ce9" table:content-validation-name="val1" table:formula="of:=[.H14]*0.2" office:value-type="currency" office:currency="EUR" office:value="3" calcext:value-type="currency">
            <text:p>€3.00</text:p>
          </table:table-cell>
          <table:table-cell table:style-name="ce9" table:content-validation-name="val1" table:formula="of:=[.H14]*0.8" office:value-type="currency" office:currency="EUR" office:value="12" calcext:value-type="currency">
            <text:p>€12.00</text:p>
          </table:table-cell>
          <table:table-cell table:style-name="ce11" table:formula="of:=IF([.B14]=&quot;Stripe&quot;; INT([.A14]) + 12 - WEEKDAY([.A14]; 2); INT([.A14]) + CHOOSE(WEEKDAY([.A14]; 2); 4; 3; 2; 1; 7; 6; 5))" office:value-type="date" office:date-value="2026-02-27" calcext:value-type="date">
            <text:p>27/02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3.9114305587758" calcext:value-type="currency">
            <text:p>$13.9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2-25T15:11:24" calcext:value-type="date">
            <text:p>25/02/2026 15:11:24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MIGUEL ANGEL P.P.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currency" office:currency="EUR" office:value="15" calcext:value-type="currency">
            <text:p>€15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15" calcext:value-type="currency">
            <text:p>€15.00</text:p>
          </table:table-cell>
          <table:table-cell table:style-name="ce9" table:content-validation-name="val1" table:formula="of:=[.H15]*0.2" office:value-type="currency" office:currency="EUR" office:value="3" calcext:value-type="currency">
            <text:p>€3.00</text:p>
          </table:table-cell>
          <table:table-cell table:style-name="ce9" table:content-validation-name="val1" table:formula="of:=[.H15]*0.8" office:value-type="currency" office:currency="EUR" office:value="12" calcext:value-type="currency">
            <text:p>€12.00</text:p>
          </table:table-cell>
          <table:table-cell table:style-name="ce11" table:formula="of:=IF([.B15]=&quot;Stripe&quot;; INT([.A15]) + 12 - WEEKDAY([.A15]; 2); INT([.A15]) + CHOOSE(WEEKDAY([.A15]; 2); 4; 3; 2; 1; 7; 6; 5))" office:value-type="date" office:date-value="2026-02-27" calcext:value-type="date">
            <text:p>27/02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3.9114305587758" calcext:value-type="currency">
            <text:p>$13.9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2-25T15:16:42" calcext:value-type="date">
            <text:p>25/02/2026 15:16:42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ALEJANDRO R.G.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[.H16]*0.2" office:value-type="currency" office:currency="EUR" office:value="4" calcext:value-type="currency">
            <text:p>€4.00</text:p>
          </table:table-cell>
          <table:table-cell table:style-name="ce9" table:content-validation-name="val1" table:formula="of:=[.H16]*0.8" office:value-type="currency" office:currency="EUR" office:value="16" calcext:value-type="currency">
            <text:p>€16.00</text:p>
          </table:table-cell>
          <table:table-cell table:style-name="ce11" table:formula="of:=IF([.B16]=&quot;Stripe&quot;; INT([.A16]) + 12 - WEEKDAY([.A16]; 2); INT([.A16]) + CHOOSE(WEEKDAY([.A16]; 2); 4; 3; 2; 1; 7; 6; 5))" office:value-type="date" office:date-value="2026-02-27" calcext:value-type="date">
            <text:p>27/02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5485740783677" calcext:value-type="currency">
            <text:p>$18.5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2-25T16:19:22" calcext:value-type="date">
            <text:p>25/02/2026 16:19:22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ORIOL C.G.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currency" office:currency="EUR" office:value="25" calcext:value-type="currency">
            <text:p>€25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5" calcext:value-type="currency">
            <text:p>€25.00</text:p>
          </table:table-cell>
          <table:table-cell table:style-name="ce9" table:content-validation-name="val1" table:formula="of:=[.H17]*0.2" office:value-type="currency" office:currency="EUR" office:value="5" calcext:value-type="currency">
            <text:p>€5.00</text:p>
          </table:table-cell>
          <table:table-cell table:style-name="ce9" table:content-validation-name="val1" table:formula="of:=[.H17]*0.8" office:value-type="currency" office:currency="EUR" office:value="20" calcext:value-type="currency">
            <text:p>€20.00</text:p>
          </table:table-cell>
          <table:table-cell table:style-name="ce11" table:formula="of:=IF([.B17]=&quot;Stripe&quot;; INT([.A17]) + 12 - WEEKDAY([.A17]; 2); INT([.A17]) + CHOOSE(WEEKDAY([.A17]; 2); 4; 3; 2; 1; 7; 6; 5))" office:value-type="date" office:date-value="2026-02-27" calcext:value-type="date">
            <text:p>27/02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23.1857175979597" calcext:value-type="currency">
            <text:p>$23.1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2-26T10:32:43" calcext:value-type="date">
            <text:p>26/02/2026 10:32:43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JOSEP G.N.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[.H18]*0.2" office:value-type="currency" office:currency="EUR" office:value="4" calcext:value-type="currency">
            <text:p>€4.00</text:p>
          </table:table-cell>
          <table:table-cell table:style-name="ce9" table:content-validation-name="val1" table:formula="of:=[.H18]*0.8" office:value-type="currency" office:currency="EUR" office:value="16" calcext:value-type="currency">
            <text:p>€16.00</text:p>
          </table:table-cell>
          <table:table-cell table:style-name="ce11" table:formula="of:=IF([.B18]=&quot;Stripe&quot;; INT([.A18]) + 12 - WEEKDAY([.A18]; 2); INT([.A18]) + CHOOSE(WEEKDAY([.A18]; 2); 4; 3; 2; 1; 7; 6; 5))" office:value-type="date" office:date-value="2026-02-27" calcext:value-type="date">
            <text:p>27/02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5485740783677" calcext:value-type="currency">
            <text:p>$18.5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2-26T15:01:52" calcext:value-type="date">
            <text:p>26/02/2026 15:01:52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Victor I.C.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40" calcext:value-type="currency">
            <text:p>€4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40" calcext:value-type="currency">
            <text:p>€40.00</text:p>
          </table:table-cell>
          <table:table-cell table:style-name="ce9" table:content-validation-name="val1" table:formula="of:=[.H19]*0.2" office:value-type="currency" office:currency="EUR" office:value="8" calcext:value-type="currency">
            <text:p>€8.00</text:p>
          </table:table-cell>
          <table:table-cell table:style-name="ce9" table:content-validation-name="val1" table:formula="of:=[.H19]*0.8" office:value-type="currency" office:currency="EUR" office:value="32" calcext:value-type="currency">
            <text:p>€32.00</text:p>
          </table:table-cell>
          <table:table-cell table:style-name="ce11" table:formula="of:=IF([.B19]=&quot;Stripe&quot;; INT([.A19]) + 12 - WEEKDAY([.A19]; 2); INT([.A19]) + CHOOSE(WEEKDAY([.A19]; 2); 4; 3; 2; 1; 7; 6; 5))" office:value-type="date" office:date-value="2026-02-27" calcext:value-type="date">
            <text:p>27/02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37.0971481567354" calcext:value-type="currency">
            <text:p>$37.10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2-26T15:39:57" calcext:value-type="date">
            <text:p>26/02/2026 15:39:57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Marc D.F.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9" table:content-validation-name="val1" table:formula="of:=[.H20]*0.2" office:value-type="currency" office:currency="EUR" office:value="6" calcext:value-type="currency">
            <text:p>€6.00</text:p>
          </table:table-cell>
          <table:table-cell table:style-name="ce9" table:content-validation-name="val1" table:formula="of:=[.H20]*0.8" office:value-type="currency" office:currency="EUR" office:value="24" calcext:value-type="currency">
            <text:p>€24.00</text:p>
          </table:table-cell>
          <table:table-cell table:style-name="ce11" table:formula="of:=IF([.B20]=&quot;Stripe&quot;; INT([.A20]) + 12 - WEEKDAY([.A20]; 2); INT([.A20]) + CHOOSE(WEEKDAY([.A20]; 2); 4; 3; 2; 1; 7; 6; 5))" office:value-type="date" office:date-value="2026-02-27" calcext:value-type="date">
            <text:p>27/02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27.8228611175516" calcext:value-type="currency">
            <text:p>$27.8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2-26T17:14:41" calcext:value-type="date">
            <text:p>26/02/2026 17:14:41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Jose J.S.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50" calcext:value-type="currency">
            <text:p>€5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50" calcext:value-type="currency">
            <text:p>€50.00</text:p>
          </table:table-cell>
          <table:table-cell table:style-name="ce9" table:content-validation-name="val1" table:formula="of:=[.H21]*0.2" office:value-type="currency" office:currency="EUR" office:value="10" calcext:value-type="currency">
            <text:p>€10.00</text:p>
          </table:table-cell>
          <table:table-cell table:style-name="ce9" table:content-validation-name="val1" table:formula="of:=[.H21]*0.8" office:value-type="currency" office:currency="EUR" office:value="40" calcext:value-type="currency">
            <text:p>€40.00</text:p>
          </table:table-cell>
          <table:table-cell table:style-name="ce11" table:formula="of:=IF([.B21]=&quot;Stripe&quot;; INT([.A21]) + 12 - WEEKDAY([.A21]; 2); INT([.A21]) + CHOOSE(WEEKDAY([.A21]; 2); 4; 3; 2; 1; 7; 6; 5))" office:value-type="date" office:date-value="2026-02-27" calcext:value-type="date">
            <text:p>27/02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46.3714351959193" calcext:value-type="currency">
            <text:p>$46.3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2-27T00:47:43" calcext:value-type="date">
            <text:p>27/02/2026 00:47:43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Luis Samuel H.C.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[.H22]*0.2" office:value-type="currency" office:currency="EUR" office:value="4" calcext:value-type="currency">
            <text:p>€4.00</text:p>
          </table:table-cell>
          <table:table-cell table:style-name="ce9" table:content-validation-name="val1" table:formula="of:=[.H22]*0.8" office:value-type="currency" office:currency="EUR" office:value="16" calcext:value-type="currency">
            <text:p>€16.00</text:p>
          </table:table-cell>
          <table:table-cell table:style-name="ce11" office:value-type="date" office:date-value="2026-02-27" calcext:value-type="date">
            <text:p>27/02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5485740783677" calcext:value-type="currency">
            <text:p>$18.5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2-27T01:00:53" calcext:value-type="date">
            <text:p>27/02/2026 01:00:53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ALEJANDRO M.G.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[.H23]*0.2" office:value-type="currency" office:currency="EUR" office:value="4" calcext:value-type="currency">
            <text:p>€4.00</text:p>
          </table:table-cell>
          <table:table-cell table:style-name="ce9" table:content-validation-name="val1" table:formula="of:=[.H23]*0.8" office:value-type="currency" office:currency="EUR" office:value="16" calcext:value-type="currency">
            <text:p>€16.00</text:p>
          </table:table-cell>
          <table:table-cell table:style-name="ce11" office:value-type="date" office:date-value="2026-02-27" calcext:value-type="date">
            <text:p>27/02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5485740783677" calcext:value-type="currency">
            <text:p>$18.5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2-27T09:13:12" calcext:value-type="date">
            <text:p>27/02/2026 09:13:12</text:p>
          </table:table-cell>
          <table:table-cell table:style-name="ce4" office:value-type="string" calcext:value-type="string">
            <text:p>Transferencia</text:p>
          </table:table-cell>
          <table:table-cell table:style-name="ce4"/>
          <table:table-cell table:style-name="ce4" office:value-type="string" calcext:value-type="string">
            <text:p>Jose Luis Heredia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[.H24]*0.2" office:value-type="currency" office:currency="EUR" office:value="4" calcext:value-type="currency">
            <text:p>€4.00</text:p>
          </table:table-cell>
          <table:table-cell table:style-name="ce9" table:content-validation-name="val1" table:formula="of:=[.H24]*0.8" office:value-type="currency" office:currency="EUR" office:value="16" calcext:value-type="currency">
            <text:p>€16.00</text:p>
          </table:table-cell>
          <table:table-cell table:style-name="ce11" office:value-type="date" office:date-value="2026-02-27" calcext:value-type="date">
            <text:p>27/02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5485740783677" calcext:value-type="currency">
            <text:p>$18.5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2-27T14:48:09" calcext:value-type="date">
            <text:p>27/02/2026 14:48:09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JESUS LEONARDO S.C.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[.H25]*0.2" office:value-type="currency" office:currency="EUR" office:value="4" calcext:value-type="currency">
            <text:p>€4.00</text:p>
          </table:table-cell>
          <table:table-cell table:style-name="ce9" table:content-validation-name="val1" table:formula="of:=[.H25]*0.8" office:value-type="currency" office:currency="EUR" office:value="16" calcext:value-type="currency">
            <text:p>€16.00</text:p>
          </table:table-cell>
          <table:table-cell table:style-name="ce11" table:formula="of:=IF([.B25]=&quot;Stripe&quot;; INT([.A25]) + 12 - WEEKDAY([.A25]; 2); INT([.A25]) + CHOOSE(WEEKDAY([.A25]; 2); 4; 3; 2; 1; 7; 6; 5))" office:value-type="date" office:date-value="2026-03-06" calcext:value-type="date">
            <text:p>06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1859513525801" calcext:value-type="currency">
            <text:p>$18.1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2-27T18:11:16" calcext:value-type="date">
            <text:p>27/02/2026 18:11:16</text:p>
          </table:table-cell>
          <table:table-cell table:style-name="ce4" office:value-type="string" calcext:value-type="string">
            <text:p>Transferencia</text:p>
          </table:table-cell>
          <table:table-cell table:style-name="ce4"/>
          <table:table-cell table:style-name="ce4" office:value-type="string" calcext:value-type="string">
            <text:p>Ruben Francisco Venegas</text:p>
          </table:table-cell>
          <table:table-cell table:style-name="ce4"/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[.H26]*0.2" office:value-type="currency" office:currency="EUR" office:value="4" calcext:value-type="currency">
            <text:p>€4.00</text:p>
          </table:table-cell>
          <table:table-cell table:style-name="ce9" table:content-validation-name="val1" table:formula="of:=[.H26]*0.8" office:value-type="currency" office:currency="EUR" office:value="16" calcext:value-type="currency">
            <text:p>€16.00</text:p>
          </table:table-cell>
          <table:table-cell table:style-name="ce11" table:formula="of:=IF([.B26]=&quot;Stripe&quot;; INT([.A26]) + 12 - WEEKDAY([.A26]; 2); INT([.A26]) + CHOOSE(WEEKDAY([.A26]; 2); 4; 3; 2; 1; 7; 6; 5))" office:value-type="date" office:date-value="2026-03-06" calcext:value-type="date">
            <text:p>06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1859513525801" calcext:value-type="currency">
            <text:p>$18.1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01T18:38:44" calcext:value-type="date">
            <text:p>01/03/2026 18:38:44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Oscar S. S.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40" calcext:value-type="currency">
            <text:p>€4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40" calcext:value-type="currency">
            <text:p>€40.00</text:p>
          </table:table-cell>
          <table:table-cell table:style-name="ce9" table:content-validation-name="val1" table:formula="of:=[.H27]*0.2" office:value-type="currency" office:currency="EUR" office:value="8" calcext:value-type="currency">
            <text:p>€8.00</text:p>
          </table:table-cell>
          <table:table-cell table:style-name="ce9" table:content-validation-name="val1" table:formula="of:=[.H27]*0.8" office:value-type="currency" office:currency="EUR" office:value="32" calcext:value-type="currency">
            <text:p>€32.00</text:p>
          </table:table-cell>
          <table:table-cell table:style-name="ce11" table:formula="of:=IF([.B27]=&quot;Stripe&quot;; INT([.A27]) + 12 - WEEKDAY([.A27]; 2); INT([.A27]) + CHOOSE(WEEKDAY([.A27]; 2); 4; 3; 2; 1; 7; 6; 5))" office:value-type="date" office:date-value="2026-03-06" calcext:value-type="date">
            <text:p>06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36.3719027051603" calcext:value-type="currency">
            <text:p>$36.37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6-03-01T23:57:00" calcext:value-type="date">
            <text:p>01/03/2026 23:57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6IvnQRhkM9CcvM1tqGMdo7</text:p>
          </table:table-cell>
          <table:table-cell table:style-name="ce4" office:value-type="string" calcext:value-type="string">
            <text:p>nicolasbemaman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5" office:value-type="currency" office:currency="EUR" office:value="0.7" calcext:value-type="currency">
            <text:p>€0.70</text:p>
          </table:table-cell>
          <table:table-cell table:style-name="ce5" office:value-type="currency" office:currency="EUR" office:value="29.3" calcext:value-type="currency">
            <text:p>€29.30</text:p>
          </table:table-cell>
          <table:table-cell table:style-name="ce9" table:content-validation-name="val1" table:formula="of:=[.H28]*0.2" office:value-type="currency" office:currency="EUR" office:value="5.86" calcext:value-type="currency">
            <text:p>€5.86</text:p>
          </table:table-cell>
          <table:table-cell table:style-name="ce9" table:content-validation-name="val1" table:formula="of:=[.H28]*0.8" office:value-type="currency" office:currency="EUR" office:value="23.44" calcext:value-type="currency">
            <text:p>€23.44</text:p>
          </table:table-cell>
          <table:table-cell table:style-name="ce11" table:formula="of:=IF([.B28]=&quot;Stripe&quot;; INT([.A28]) + 12 - WEEKDAY([.A28]; 2); INT([.A28]) + CHOOSE(WEEKDAY([.A28]; 2); 4; 3; 2; 1; 7; 6; 5))" office:value-type="date" office:date-value="2026-03-06" calcext:value-type="date">
            <text:p>06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26.6424187315299" calcext:value-type="currency">
            <text:p>$26.6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02T00:46:28" calcext:value-type="date">
            <text:p>02/03/2026 00:46:28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Juan Antonio G.A.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[.H29]*0.2" office:value-type="currency" office:currency="EUR" office:value="4" calcext:value-type="currency">
            <text:p>€4.00</text:p>
          </table:table-cell>
          <table:table-cell table:style-name="ce9" table:content-validation-name="val1" table:formula="of:=[.H29]*0.8" office:value-type="currency" office:currency="EUR" office:value="16" calcext:value-type="currency">
            <text:p>€16.00</text:p>
          </table:table-cell>
          <table:table-cell table:style-name="ce11" table:formula="of:=IF([.B29]=&quot;Stripe&quot;; INT([.A29]) + 12 - WEEKDAY([.A29]; 2); INT([.A29]) + CHOOSE(WEEKDAY([.A29]; 2); 4; 3; 2; 1; 7; 6; 5))" office:value-type="date" office:date-value="2026-03-06" calcext:value-type="date">
            <text:p>06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1859513525801" calcext:value-type="currency">
            <text:p>$18.19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6-03-02T16:07:00" calcext:value-type="date">
            <text:p>02/03/2026 16:07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6Y4OQRhkM9CcvM11SM7s2o</text:p>
          </table:table-cell>
          <table:table-cell table:style-name="ce4" office:value-type="string" calcext:value-type="string">
            <text:p>endilarrarte26@gmail.com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currency" office:currency="EUR" office:value="1" calcext:value-type="currency">
            <text:p>€1.00</text:p>
          </table:table-cell>
          <table:table-cell table:style-name="ce5" office:value-type="currency" office:currency="EUR" office:value="0.27" calcext:value-type="currency">
            <text:p>€0.27</text:p>
          </table:table-cell>
          <table:table-cell table:style-name="ce5" office:value-type="currency" office:currency="EUR" office:value="0.73" calcext:value-type="currency">
            <text:p>€0.73</text:p>
          </table:table-cell>
          <table:table-cell table:style-name="ce9" table:content-validation-name="val1" table:formula="of:=[.H30]*0.2" office:value-type="currency" office:currency="EUR" office:value="0.146" calcext:value-type="currency">
            <text:p>€0.15</text:p>
          </table:table-cell>
          <table:table-cell table:style-name="ce9" table:content-validation-name="val1" table:formula="of:=[.H30]*0.8" office:value-type="currency" office:currency="EUR" office:value="0.584" calcext:value-type="currency">
            <text:p>€0.58</text:p>
          </table:table-cell>
          <table:table-cell table:style-name="ce11" table:formula="of:=IF([.B30]=&quot;Stripe&quot;; INT([.A30]) + 12 - WEEKDAY([.A30]; 2); INT([.A30]) + CHOOSE(WEEKDAY([.A30]; 2); 4; 3; 2; 1; 7; 6; 5))" office:value-type="date" office:date-value="2026-03-13" calcext:value-type="date">
            <text:p>13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0.656327264553832" calcext:value-type="currency">
            <text:p>$0.6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02T20:10:46" calcext:value-type="date">
            <text:p>02/03/2026 20:10:46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Jesus G. V.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9" table:content-validation-name="val1" table:formula="of:=[.H31]*0.2" office:value-type="currency" office:currency="EUR" office:value="6" calcext:value-type="currency">
            <text:p>€6.00</text:p>
          </table:table-cell>
          <table:table-cell table:style-name="ce9" table:content-validation-name="val1" table:formula="of:=[.H31]*0.8" office:value-type="currency" office:currency="EUR" office:value="24" calcext:value-type="currency">
            <text:p>€24.00</text:p>
          </table:table-cell>
          <table:table-cell table:style-name="ce11" table:formula="of:=IF([.B31]=&quot;Stripe&quot;; INT([.A31]) + 12 - WEEKDAY([.A31]; 2); INT([.A31]) + CHOOSE(WEEKDAY([.A31]; 2); 4; 3; 2; 1; 7; 6; 5))" office:value-type="date" office:date-value="2026-03-06" calcext:value-type="date">
            <text:p>06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27.2789270288702" calcext:value-type="currency">
            <text:p>$27.2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02T20:58:02" calcext:value-type="date">
            <text:p>02/03/2026 20:58:02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Pedro Manuel A. M.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100" calcext:value-type="currency">
            <text:p>€10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100" calcext:value-type="currency">
            <text:p>€100.00</text:p>
          </table:table-cell>
          <table:table-cell table:style-name="ce9" table:content-validation-name="val1" table:formula="of:=[.H32]*0.2" office:value-type="currency" office:currency="EUR" office:value="20" calcext:value-type="currency">
            <text:p>€20.00</text:p>
          </table:table-cell>
          <table:table-cell table:style-name="ce9" table:content-validation-name="val1" table:formula="of:=[.H32]*0.8" office:value-type="currency" office:currency="EUR" office:value="80" calcext:value-type="currency">
            <text:p>€80.00</text:p>
          </table:table-cell>
          <table:table-cell table:style-name="ce11" table:formula="of:=IF([.B32]=&quot;Stripe&quot;; INT([.A32]) + 12 - WEEKDAY([.A32]; 2); INT([.A32]) + CHOOSE(WEEKDAY([.A32]; 2); 4; 3; 2; 1; 7; 6; 5))" office:value-type="date" office:date-value="2026-03-06" calcext:value-type="date">
            <text:p>06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90.9297567629007" calcext:value-type="currency">
            <text:p>$90.9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03T01:11:30" calcext:value-type="date">
            <text:p>03/03/2026 01:11:30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Daniel G.F.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[.H33]*0.2" office:value-type="currency" office:currency="EUR" office:value="4" calcext:value-type="currency">
            <text:p>€4.00</text:p>
          </table:table-cell>
          <table:table-cell table:style-name="ce9" table:content-validation-name="val1" table:formula="of:=[.H33]*0.8" office:value-type="currency" office:currency="EUR" office:value="16" calcext:value-type="currency">
            <text:p>€16.00</text:p>
          </table:table-cell>
          <table:table-cell table:style-name="ce11" table:formula="of:=IF([.B33]=&quot;Stripe&quot;; INT([.A33]) + 12 - WEEKDAY([.A33]; 2); INT([.A33]) + CHOOSE(WEEKDAY([.A33]; 2); 4; 3; 2; 1; 7; 6; 5))" office:value-type="date" office:date-value="2026-03-06" calcext:value-type="date">
            <text:p>06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1859513525801" calcext:value-type="currency">
            <text:p>$18.1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03T08:03:54" calcext:value-type="date">
            <text:p>03/03/2026 08:03:54</text:p>
          </table:table-cell>
          <table:table-cell table:style-name="ce4" office:value-type="string" calcext:value-type="string">
            <text:p>Transferencia</text:p>
          </table:table-cell>
          <table:table-cell table:style-name="ce4"/>
          <table:table-cell table:style-name="ce4" office:value-type="string" calcext:value-type="string">
            <text:p>Israel Gonzalez Navarro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[.H34]*0.2" office:value-type="currency" office:currency="EUR" office:value="4" calcext:value-type="currency">
            <text:p>€4.00</text:p>
          </table:table-cell>
          <table:table-cell table:style-name="ce9" table:content-validation-name="val1" table:formula="of:=[.H34]*0.8" office:value-type="currency" office:currency="EUR" office:value="16" calcext:value-type="currency">
            <text:p>€16.00</text:p>
          </table:table-cell>
          <table:table-cell table:style-name="ce11" table:formula="of:=IF([.B34]=&quot;Stripe&quot;; INT([.A34]) + 12 - WEEKDAY([.A34]; 2); INT([.A34]) + CHOOSE(WEEKDAY([.A34]; 2); 4; 3; 2; 1; 7; 6; 5))" office:value-type="date" office:date-value="2026-03-06" calcext:value-type="date">
            <text:p>06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1859513525801" calcext:value-type="currency">
            <text:p>$18.1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03T13:17:03" calcext:value-type="date">
            <text:p>03/03/2026 13:17:03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Francisco Antonio U.M.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[.H35]*0.2" office:value-type="currency" office:currency="EUR" office:value="4" calcext:value-type="currency">
            <text:p>€4.00</text:p>
          </table:table-cell>
          <table:table-cell table:style-name="ce9" table:content-validation-name="val1" table:formula="of:=[.H35]*0.8" office:value-type="currency" office:currency="EUR" office:value="16" calcext:value-type="currency">
            <text:p>€16.00</text:p>
          </table:table-cell>
          <table:table-cell table:style-name="ce11" table:formula="of:=IF([.B35]=&quot;Stripe&quot;; INT([.A35]) + 12 - WEEKDAY([.A35]; 2); INT([.A35]) + CHOOSE(WEEKDAY([.A35]; 2); 4; 3; 2; 1; 7; 6; 5))" office:value-type="date" office:date-value="2026-03-06" calcext:value-type="date">
            <text:p>06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1859513525801" calcext:value-type="currency">
            <text:p>$18.1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03T15:46:44" calcext:value-type="date">
            <text:p>03/03/2026 15:46:44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Ruben R.S.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9" table:content-validation-name="val1" table:formula="of:=[.H36]*0.2" office:value-type="currency" office:currency="EUR" office:value="6" calcext:value-type="currency">
            <text:p>€6.00</text:p>
          </table:table-cell>
          <table:table-cell table:style-name="ce9" table:content-validation-name="val1" table:formula="of:=[.H36]*0.8" office:value-type="currency" office:currency="EUR" office:value="24" calcext:value-type="currency">
            <text:p>€24.00</text:p>
          </table:table-cell>
          <table:table-cell table:style-name="ce11" table:formula="of:=IF([.B36]=&quot;Stripe&quot;; INT([.A36]) + 12 - WEEKDAY([.A36]; 2); INT([.A36]) + CHOOSE(WEEKDAY([.A36]; 2); 4; 3; 2; 1; 7; 6; 5))" office:value-type="date" office:date-value="2026-03-06" calcext:value-type="date">
            <text:p>06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27.2789270288702" calcext:value-type="currency">
            <text:p>$27.2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03T21:07:44" calcext:value-type="date">
            <text:p>03/03/2026 21:07:44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Pablo R.C.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9" table:content-validation-name="val1" table:formula="of:=[.H37]*0.2" office:value-type="currency" office:currency="EUR" office:value="6" calcext:value-type="currency">
            <text:p>€6.00</text:p>
          </table:table-cell>
          <table:table-cell table:style-name="ce9" table:content-validation-name="val1" table:formula="of:=[.H37]*0.8" office:value-type="currency" office:currency="EUR" office:value="24" calcext:value-type="currency">
            <text:p>€24.00</text:p>
          </table:table-cell>
          <table:table-cell table:style-name="ce11" table:formula="of:=IF([.B37]=&quot;Stripe&quot;; INT([.A37]) + 12 - WEEKDAY([.A37]; 2); INT([.A37]) + CHOOSE(WEEKDAY([.A37]; 2); 4; 3; 2; 1; 7; 6; 5))" office:value-type="date" office:date-value="2026-03-06" calcext:value-type="date">
            <text:p>06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27.2789270288702" calcext:value-type="currency">
            <text:p>$27.2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04T12:07:33" calcext:value-type="date">
            <text:p>04/03/2026 12:07:33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Eudald A.O.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currency" office:currency="EUR" office:value="35" calcext:value-type="currency">
            <text:p>€35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35" calcext:value-type="currency">
            <text:p>€35.00</text:p>
          </table:table-cell>
          <table:table-cell table:style-name="ce9" table:content-validation-name="val1" table:formula="of:=[.H38]*0.2" office:value-type="currency" office:currency="EUR" office:value="7" calcext:value-type="currency">
            <text:p>€7.00</text:p>
          </table:table-cell>
          <table:table-cell table:style-name="ce9" table:content-validation-name="val1" table:formula="of:=[.H38]*0.8" office:value-type="currency" office:currency="EUR" office:value="28" calcext:value-type="currency">
            <text:p>€28.00</text:p>
          </table:table-cell>
          <table:table-cell table:style-name="ce11" table:formula="of:=IF([.B38]=&quot;Stripe&quot;; INT([.A38]) + 12 - WEEKDAY([.A38]; 2); INT([.A38]) + CHOOSE(WEEKDAY([.A38]; 2); 4; 3; 2; 1; 7; 6; 5))" office:value-type="date" office:date-value="2026-03-06" calcext:value-type="date">
            <text:p>06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31.8254148670152" calcext:value-type="currency">
            <text:p>$31.8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04T12:11:13" calcext:value-type="date">
            <text:p>04/03/2026 12:11:13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HECTOR A.O.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[.H39]*0.2" office:value-type="currency" office:currency="EUR" office:value="4" calcext:value-type="currency">
            <text:p>€4.00</text:p>
          </table:table-cell>
          <table:table-cell table:style-name="ce9" table:content-validation-name="val1" table:formula="of:=[.H39]*0.8" office:value-type="currency" office:currency="EUR" office:value="16" calcext:value-type="currency">
            <text:p>€16.00</text:p>
          </table:table-cell>
          <table:table-cell table:style-name="ce11" table:formula="of:=IF([.B39]=&quot;Stripe&quot;; INT([.A39]) + 12 - WEEKDAY([.A39]; 2); INT([.A39]) + CHOOSE(WEEKDAY([.A39]; 2); 4; 3; 2; 1; 7; 6; 5))" office:value-type="date" office:date-value="2026-03-06" calcext:value-type="date">
            <text:p>06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1859513525801" calcext:value-type="currency">
            <text:p>$18.1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04T12:45:39" calcext:value-type="date">
            <text:p>04/03/2026 12:45:39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Adria P.M.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[.H40]*0.2" office:value-type="currency" office:currency="EUR" office:value="4" calcext:value-type="currency">
            <text:p>€4.00</text:p>
          </table:table-cell>
          <table:table-cell table:style-name="ce9" table:content-validation-name="val1" table:formula="of:=[.H40]*0.8" office:value-type="currency" office:currency="EUR" office:value="16" calcext:value-type="currency">
            <text:p>€16.00</text:p>
          </table:table-cell>
          <table:table-cell table:style-name="ce11" table:formula="of:=IF([.B40]=&quot;Stripe&quot;; INT([.A40]) + 12 - WEEKDAY([.A40]; 2); INT([.A40]) + CHOOSE(WEEKDAY([.A40]; 2); 4; 3; 2; 1; 7; 6; 5))" office:value-type="date" office:date-value="2026-03-06" calcext:value-type="date">
            <text:p>06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1859513525801" calcext:value-type="currency">
            <text:p>$18.1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04T16:39:10" calcext:value-type="date">
            <text:p>04/03/2026 16:39:10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Miguel Angel L.M.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[.H41]*0.2" office:value-type="currency" office:currency="EUR" office:value="4" calcext:value-type="currency">
            <text:p>€4.00</text:p>
          </table:table-cell>
          <table:table-cell table:style-name="ce9" table:content-validation-name="val1" table:formula="of:=[.H41]*0.8" office:value-type="currency" office:currency="EUR" office:value="16" calcext:value-type="currency">
            <text:p>€16.00</text:p>
          </table:table-cell>
          <table:table-cell table:style-name="ce11" table:formula="of:=IF([.B41]=&quot;Stripe&quot;; INT([.A41]) + 12 - WEEKDAY([.A41]; 2); INT([.A41]) + CHOOSE(WEEKDAY([.A41]; 2); 4; 3; 2; 1; 7; 6; 5))" office:value-type="date" office:date-value="2026-03-06" calcext:value-type="date">
            <text:p>06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1859513525801" calcext:value-type="currency">
            <text:p>$18.19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6-03-04T22:28:00" calcext:value-type="date">
            <text:p>04/03/2026 22:28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7My7QRhkM9CcvM1NylkI6K</text:p>
          </table:table-cell>
          <table:table-cell table:style-name="ce4" office:value-type="string" calcext:value-type="string">
            <text:p>20alvarito20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.55" calcext:value-type="currency">
            <text:p>€0.55</text:p>
          </table:table-cell>
          <table:table-cell table:style-name="ce5" office:value-type="currency" office:currency="EUR" office:value="19.45" calcext:value-type="currency">
            <text:p>€19.45</text:p>
          </table:table-cell>
          <table:table-cell table:style-name="ce9" table:content-validation-name="val1" table:formula="of:=[.H42]*0.2" office:value-type="currency" office:currency="EUR" office:value="3.89" calcext:value-type="currency">
            <text:p>€3.89</text:p>
          </table:table-cell>
          <table:table-cell table:style-name="ce9" table:content-validation-name="val1" table:formula="of:=[.H42]*0.8" office:value-type="currency" office:currency="EUR" office:value="15.56" calcext:value-type="currency">
            <text:p>€15.56</text:p>
          </table:table-cell>
          <table:table-cell table:style-name="ce11" table:formula="of:=IF([.B42]=&quot;Stripe&quot;; INT([.A42]) + 12 - WEEKDAY([.A42]; 2); INT([.A42]) + CHOOSE(WEEKDAY([.A42]; 2); 4; 3; 2; 1; 7; 6; 5))" office:value-type="date" office:date-value="2026-03-13" calcext:value-type="date">
            <text:p>13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7.487075747359" calcext:value-type="currency">
            <text:p>$17.4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04T23:08:34" calcext:value-type="date">
            <text:p>04/03/2026 23:08:34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Salvador Antonio G.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9" table:content-validation-name="val1" table:formula="of:=[.H43]*0.2" office:value-type="currency" office:currency="EUR" office:value="6" calcext:value-type="currency">
            <text:p>€6.00</text:p>
          </table:table-cell>
          <table:table-cell table:style-name="ce9" table:content-validation-name="val1" table:formula="of:=[.H43]*0.8" office:value-type="currency" office:currency="EUR" office:value="24" calcext:value-type="currency">
            <text:p>€24.00</text:p>
          </table:table-cell>
          <table:table-cell table:style-name="ce11" table:formula="of:=IF([.B43]=&quot;Stripe&quot;; INT([.A43]) + 12 - WEEKDAY([.A43]; 2); INT([.A43]) + CHOOSE(WEEKDAY([.A43]; 2); 4; 3; 2; 1; 7; 6; 5))" office:value-type="date" office:date-value="2026-03-06" calcext:value-type="date">
            <text:p>06/03/2026</text:p>
          </table:table-cell>
          <table:table-cell table:style-name="ce13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27.2789270288702" calcext:value-type="currency">
            <text:p>$27.2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04T23:20:19" calcext:value-type="date">
            <text:p>04/03/2026 23:20:19</text:p>
          </table:table-cell>
          <table:table-cell table:style-name="ce4" office:value-type="string" calcext:value-type="string">
            <text:p>GASTO - PUBLICIDAD</text:p>
          </table:table-cell>
          <table:table-cell table:style-name="ce4" office:value-type="float" office:value="3587623" calcext:value-type="float">
            <text:p>3587623</text:p>
          </table:table-cell>
          <table:table-cell table:style-name="ce4"/>
          <table:table-cell table:style-name="ce4" office:value-type="float" office:value="21" calcext:value-type="float">
            <text:p>21</text:p>
          </table:table-cell>
          <table:table-cell table:number-columns-repeated="3" table:style-name="ce5" office:value-type="currency" office:currency="EUR" office:value="0" calcext:value-type="currency">
            <text:p>€0.00</text:p>
          </table:table-cell>
          <table:table-cell table:style-name="ce9" table:content-validation-name="val1" office:value-type="currency" office:currency="EUR" office:value="0" calcext:value-type="currency">
            <text:p>€0.00</text:p>
          </table:table-cell>
          <table:table-cell table:style-name="ce9" table:content-validation-name="val1" office:value-type="currency" office:currency="EUR" office:value="-22.75" calcext:value-type="currency">
            <text:p>-€22.75</text:p>
          </table:table-cell>
          <table:table-cell table:style-name="ce11" table:formula="of:=IF([.B44]=&quot;Stripe&quot;; INT([.A44]) + 12 - WEEKDAY([.A44]; 2); INT([.A44]) + CHOOSE(WEEKDAY([.A44]; 2); 4; 3; 2; 1; 7; 6; 5))" office:value-type="date" office:date-value="2026-03-06" calcext:value-type="date">
            <text:p>06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-25.8581495794499" calcext:value-type="currency">
            <text:p>-$25.8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04T23:21:57" calcext:value-type="date">
            <text:p>04/03/2026 23:21:57</text:p>
          </table:table-cell>
          <table:table-cell table:style-name="ce4" office:value-type="string" calcext:value-type="string">
            <text:p>GASTO - PUBLICIDAD</text:p>
          </table:table-cell>
          <table:table-cell table:style-name="ce4" office:value-type="float" office:value="3587640" calcext:value-type="float">
            <text:p>3587640</text:p>
          </table:table-cell>
          <table:table-cell table:style-name="ce4"/>
          <table:table-cell table:style-name="ce4" office:value-type="float" office:value="21" calcext:value-type="float">
            <text:p>21</text:p>
          </table:table-cell>
          <table:table-cell table:number-columns-repeated="3" table:style-name="ce5" office:value-type="currency" office:currency="EUR" office:value="0" calcext:value-type="currency">
            <text:p>€0.00</text:p>
          </table:table-cell>
          <table:table-cell table:style-name="ce9" table:content-validation-name="val1" office:value-type="currency" office:currency="EUR" office:value="0" calcext:value-type="currency">
            <text:p>€0.00</text:p>
          </table:table-cell>
          <table:table-cell table:style-name="ce9" table:content-validation-name="val1" office:value-type="currency" office:currency="EUR" office:value="-113.76" calcext:value-type="currency">
            <text:p>-€113.76</text:p>
          </table:table-cell>
          <table:table-cell table:style-name="ce11" table:formula="of:=IF([.B45]=&quot;Stripe&quot;; INT([.A45]) + 12 - WEEKDAY([.A45]; 2); INT([.A45]) + CHOOSE(WEEKDAY([.A45]; 2); 4; 3; 2; 1; 7; 6; 5))" office:value-type="date" office:date-value="2026-03-06" calcext:value-type="date">
            <text:p>06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-129.302114116845" calcext:value-type="currency">
            <text:p>-$129.30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6-03-05T00:09:00" calcext:value-type="date">
            <text:p>05/03/2026 00:09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7OXJQRhkM9CcvM1moEWhTF</text:p>
          </table:table-cell>
          <table:table-cell table:style-name="ce4" office:value-type="string" calcext:value-type="string">
            <text:p>baltinho5@hot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1" calcext:value-type="currency">
            <text:p>€1.00</text:p>
          </table:table-cell>
          <table:table-cell table:style-name="ce5" office:value-type="currency" office:currency="EUR" office:value="0.27" calcext:value-type="currency">
            <text:p>€0.27</text:p>
          </table:table-cell>
          <table:table-cell table:style-name="ce5" office:value-type="currency" office:currency="EUR" office:value="0.73" calcext:value-type="currency">
            <text:p>€0.73</text:p>
          </table:table-cell>
          <table:table-cell table:style-name="ce9" table:content-validation-name="val1" table:formula="of:=[.H46]*0.2" office:value-type="currency" office:currency="EUR" office:value="0.146" calcext:value-type="currency">
            <text:p>€0.15</text:p>
          </table:table-cell>
          <table:table-cell table:style-name="ce9" table:content-validation-name="val1" table:formula="of:=[.H46]*0.8" office:value-type="currency" office:currency="EUR" office:value="0.584" calcext:value-type="currency">
            <text:p>€0.58</text:p>
          </table:table-cell>
          <table:table-cell table:style-name="ce11" table:formula="of:=IF([.B46]=&quot;Stripe&quot;; INT([.A46]) + 12 - WEEKDAY([.A46]; 2); INT([.A46]) + CHOOSE(WEEKDAY([.A46]; 2); 4; 3; 2; 1; 7; 6; 5))" office:value-type="date" office:date-value="2026-03-13" calcext:value-type="date">
            <text:p>13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0.656327264553832" calcext:value-type="currency">
            <text:p>$0.66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6-03-05T00:11:00" calcext:value-type="date">
            <text:p>05/03/2026 00:11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7OZIQRhkM9CcvM0UuaYKYh</text:p>
          </table:table-cell>
          <table:table-cell table:style-name="ce4" office:value-type="string" calcext:value-type="string">
            <text:p>baltinho5@hot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19" calcext:value-type="currency">
            <text:p>€19.00</text:p>
          </table:table-cell>
          <table:table-cell table:style-name="ce5" office:value-type="currency" office:currency="EUR" office:value="0.54" calcext:value-type="currency">
            <text:p>€0.54</text:p>
          </table:table-cell>
          <table:table-cell table:style-name="ce5" office:value-type="currency" office:currency="EUR" office:value="18.46" calcext:value-type="currency">
            <text:p>€18.46</text:p>
          </table:table-cell>
          <table:table-cell table:style-name="ce9" table:content-validation-name="val1" table:formula="of:=[.H47]*0.2" office:value-type="currency" office:currency="EUR" office:value="3.692" calcext:value-type="currency">
            <text:p>€3.69</text:p>
          </table:table-cell>
          <table:table-cell table:style-name="ce9" table:content-validation-name="val1" table:formula="of:=[.H47]*0.8" office:value-type="currency" office:currency="EUR" office:value="14.768" calcext:value-type="currency">
            <text:p>€14.77</text:p>
          </table:table-cell>
          <table:table-cell table:style-name="ce11" table:formula="of:=IF([.B47]=&quot;Stripe&quot;; INT([.A47]) + 12 - WEEKDAY([.A47]; 2); INT([.A47]) + CHOOSE(WEEKDAY([.A47]; 2); 4; 3; 2; 1; 7; 6; 5))" office:value-type="date" office:date-value="2026-03-13" calcext:value-type="date">
            <text:p>13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6.5969880872106" calcext:value-type="currency">
            <text:p>$16.60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05T00:11:41" calcext:value-type="date">
            <text:p>05/03/2026 00:11:41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ISRAEL V.P.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50" calcext:value-type="currency">
            <text:p>€5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50" calcext:value-type="currency">
            <text:p>€50.00</text:p>
          </table:table-cell>
          <table:table-cell table:style-name="ce9" table:content-validation-name="val1" table:formula="of:=[.H48]*0.2" office:value-type="currency" office:currency="EUR" office:value="10" calcext:value-type="currency">
            <text:p>€10.00</text:p>
          </table:table-cell>
          <table:table-cell table:style-name="ce9" table:content-validation-name="val1" table:formula="of:=[.H48]*0.8" office:value-type="currency" office:currency="EUR" office:value="40" calcext:value-type="currency">
            <text:p>€40.00</text:p>
          </table:table-cell>
          <table:table-cell table:style-name="ce11" table:formula="of:=IF([.B48]=&quot;Stripe&quot;; INT([.A48]) + 12 - WEEKDAY([.A48]; 2); INT([.A48]) + CHOOSE(WEEKDAY([.A48]; 2); 4; 3; 2; 1; 7; 6; 5))" office:value-type="date" office:date-value="2026-03-06" calcext:value-type="date">
            <text:p>06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45.4648783814503" calcext:value-type="currency">
            <text:p>$45.46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6-03-05T15:33:00" calcext:value-type="date">
            <text:p>05/03/2026 15:33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7cy1QRhkM9CcvM01TeiC35</text:p>
          </table:table-cell>
          <table:table-cell table:style-name="ce4" office:value-type="string" calcext:value-type="string">
            <text:p>josuevalenciamartin@gmail.com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.55" calcext:value-type="currency">
            <text:p>€0.55</text:p>
          </table:table-cell>
          <table:table-cell table:style-name="ce5" office:value-type="currency" office:currency="EUR" office:value="19.45" calcext:value-type="currency">
            <text:p>€19.45</text:p>
          </table:table-cell>
          <table:table-cell table:style-name="ce9" table:content-validation-name="val1" table:formula="of:=[.H49]*0.2" office:value-type="currency" office:currency="EUR" office:value="3.89" calcext:value-type="currency">
            <text:p>€3.89</text:p>
          </table:table-cell>
          <table:table-cell table:style-name="ce9" table:content-validation-name="val1" table:formula="of:=[.H49]*0.8" office:value-type="currency" office:currency="EUR" office:value="15.56" calcext:value-type="currency">
            <text:p>€15.56</text:p>
          </table:table-cell>
          <table:table-cell table:style-name="ce11" table:formula="of:=IF([.B49]=&quot;Stripe&quot;; INT([.A49]) + 12 - WEEKDAY([.A49]; 2); INT([.A49]) + CHOOSE(WEEKDAY([.A49]; 2); 4; 3; 2; 1; 7; 6; 5))" office:value-type="date" office:date-value="2026-03-13" calcext:value-type="date">
            <text:p>13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7.487075747359" calcext:value-type="currency">
            <text:p>$17.4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05T17:30:36" calcext:value-type="date">
            <text:p>05/03/2026 17:30:36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Cristian R.A.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9" table:content-validation-name="val1" table:formula="of:=[.H50]*0.2" office:value-type="currency" office:currency="EUR" office:value="6" calcext:value-type="currency">
            <text:p>€6.00</text:p>
          </table:table-cell>
          <table:table-cell table:style-name="ce9" table:content-validation-name="val1" table:formula="of:=[.H50]*0.8" office:value-type="currency" office:currency="EUR" office:value="24" calcext:value-type="currency">
            <text:p>€24.00</text:p>
          </table:table-cell>
          <table:table-cell table:style-name="ce11" table:formula="of:=IF([.B50]=&quot;Stripe&quot;; INT([.A50]) + 12 - WEEKDAY([.A50]; 2); INT([.A50]) + CHOOSE(WEEKDAY([.A50]; 2); 4; 3; 2; 1; 7; 6; 5))" office:value-type="date" office:date-value="2026-03-06" calcext:value-type="date">
            <text:p>06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27.2789270288702" calcext:value-type="currency">
            <text:p>$27.28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6-03-05T18:40:00" calcext:value-type="date">
            <text:p>05/03/2026 18:40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7ftBQRhkM9CcvM1bQiuVvZ</text:p>
          </table:table-cell>
          <table:table-cell table:style-name="ce4" office:value-type="string" calcext:value-type="string">
            <text:p>contera_rorcuales.8z@icloud.com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1" calcext:value-type="currency">
            <text:p>€1.00</text:p>
          </table:table-cell>
          <table:table-cell table:style-name="ce5" office:value-type="currency" office:currency="EUR" office:value="0.27" calcext:value-type="currency">
            <text:p>€0.27</text:p>
          </table:table-cell>
          <table:table-cell table:style-name="ce5" office:value-type="currency" office:currency="EUR" office:value="0.73" calcext:value-type="currency">
            <text:p>€0.73</text:p>
          </table:table-cell>
          <table:table-cell table:style-name="ce9" table:content-validation-name="val1" table:formula="of:=[.H51]*0.2" office:value-type="currency" office:currency="EUR" office:value="0.146" calcext:value-type="currency">
            <text:p>€0.15</text:p>
          </table:table-cell>
          <table:table-cell table:style-name="ce9" table:content-validation-name="val1" table:formula="of:=[.H51]*0.8" office:value-type="currency" office:currency="EUR" office:value="0.584" calcext:value-type="currency">
            <text:p>€0.58</text:p>
          </table:table-cell>
          <table:table-cell table:style-name="ce11" table:formula="of:=IF([.B51]=&quot;Stripe&quot;; INT([.A51]) + 12 - WEEKDAY([.A51]; 2); INT([.A51]) + CHOOSE(WEEKDAY([.A51]; 2); 4; 3; 2; 1; 7; 6; 5))" office:value-type="date" office:date-value="2026-03-13" calcext:value-type="date">
            <text:p>13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0.656327264553832" calcext:value-type="currency">
            <text:p>$0.66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6-03-05T18:42:00" calcext:value-type="date">
            <text:p>05/03/2026 18:42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7fubQRhkM9CcvM1xtw3zAM</text:p>
          </table:table-cell>
          <table:table-cell table:style-name="ce4" office:value-type="string" calcext:value-type="string">
            <text:p>contera_rorcuales.8z@icloud.com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19" calcext:value-type="currency">
            <text:p>€19.00</text:p>
          </table:table-cell>
          <table:table-cell table:style-name="ce5" office:value-type="currency" office:currency="EUR" office:value="0.54" calcext:value-type="currency">
            <text:p>€0.54</text:p>
          </table:table-cell>
          <table:table-cell table:style-name="ce5" office:value-type="currency" office:currency="EUR" office:value="18.46" calcext:value-type="currency">
            <text:p>€18.46</text:p>
          </table:table-cell>
          <table:table-cell table:style-name="ce9" table:content-validation-name="val1" table:formula="of:=[.H52]*0.2" office:value-type="currency" office:currency="EUR" office:value="3.692" calcext:value-type="currency">
            <text:p>€3.69</text:p>
          </table:table-cell>
          <table:table-cell table:style-name="ce9" table:content-validation-name="val1" table:formula="of:=[.H52]*0.8" office:value-type="currency" office:currency="EUR" office:value="14.768" calcext:value-type="currency">
            <text:p>€14.77</text:p>
          </table:table-cell>
          <table:table-cell table:style-name="ce11" table:formula="of:=IF([.B52]=&quot;Stripe&quot;; INT([.A52]) + 12 - WEEKDAY([.A52]; 2); INT([.A52]) + CHOOSE(WEEKDAY([.A52]; 2); 4; 3; 2; 1; 7; 6; 5))" office:value-type="date" office:date-value="2026-03-13" calcext:value-type="date">
            <text:p>13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6.5969880872106" calcext:value-type="currency">
            <text:p>$16.60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6-03-05T18:42:00" calcext:value-type="date">
            <text:p>05/03/2026 18:42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7fu3QRhkM9CcvM1OykHg5e</text:p>
          </table:table-cell>
          <table:table-cell table:style-name="ce4" office:value-type="string" calcext:value-type="string">
            <text:p>gionhaegi@gmx.ch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38" calcext:value-type="currency">
            <text:p>€38.00</text:p>
          </table:table-cell>
          <table:table-cell table:style-name="ce5" office:value-type="currency" office:currency="EUR" office:value="1.24" calcext:value-type="currency">
            <text:p>€1.24</text:p>
          </table:table-cell>
          <table:table-cell table:style-name="ce5" office:value-type="currency" office:currency="EUR" office:value="36.76" calcext:value-type="currency">
            <text:p>€36.76</text:p>
          </table:table-cell>
          <table:table-cell table:style-name="ce9" table:content-validation-name="val1" table:formula="of:=[.H53]*0.2" office:value-type="currency" office:currency="EUR" office:value="7.352" calcext:value-type="currency">
            <text:p>€7.35</text:p>
          </table:table-cell>
          <table:table-cell table:style-name="ce9" table:content-validation-name="val1" table:formula="of:=[.H53]*0.8" office:value-type="currency" office:currency="EUR" office:value="29.408" calcext:value-type="currency">
            <text:p>€29.41</text:p>
          </table:table-cell>
          <table:table-cell table:style-name="ce11" table:formula="of:=IF([.B53]=&quot;Stripe&quot;; INT([.A53]) + 12 - WEEKDAY([.A53]; 2); INT([.A53]) + CHOOSE(WEEKDAY([.A53]; 2); 4; 3; 2; 1; 7; 6; 5))" office:value-type="date" office:date-value="2026-03-13" calcext:value-type="date">
            <text:p>13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33.0501236232861" calcext:value-type="currency">
            <text:p>$33.05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6-03-05T18:45:00" calcext:value-type="date">
            <text:p>05/03/2026 18:45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7fxwQRhkM9CcvM0zydEok7</text:p>
          </table:table-cell>
          <table:table-cell table:style-name="ce4" office:value-type="string" calcext:value-type="string">
            <text:p>pablo_carbo96@hotmail.com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1.07" calcext:value-type="currency">
            <text:p>€1.07</text:p>
          </table:table-cell>
          <table:table-cell table:style-name="ce5" office:value-type="currency" office:currency="EUR" office:value="18.93" calcext:value-type="currency">
            <text:p>€18.93</text:p>
          </table:table-cell>
          <table:table-cell table:style-name="ce9" table:content-validation-name="val1" table:formula="of:=[.H54]*0.2" office:value-type="currency" office:currency="EUR" office:value="3.786" calcext:value-type="currency">
            <text:p>€3.79</text:p>
          </table:table-cell>
          <table:table-cell table:style-name="ce9" table:content-validation-name="val1" table:formula="of:=[.H54]*0.8" office:value-type="currency" office:currency="EUR" office:value="15.144" calcext:value-type="currency">
            <text:p>€15.14</text:p>
          </table:table-cell>
          <table:table-cell table:style-name="ce11" table:formula="of:=IF([.B54]=&quot;Stripe&quot;; INT([.A54]) + 12 - WEEKDAY([.A54]; 2); INT([.A54]) + CHOOSE(WEEKDAY([.A54]; 2); 4; 3; 2; 1; 7; 6; 5))" office:value-type="date" office:date-value="2026-03-13" calcext:value-type="date">
            <text:p>13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7.0195549561699" calcext:value-type="currency">
            <text:p>$17.02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6-03-05T19:38:00" calcext:value-type="date">
            <text:p>05/03/2026 19:38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7gmDQRhkM9CcvM0p3VGpzL</text:p>
          </table:table-cell>
          <table:table-cell table:style-name="ce4" office:value-type="string" calcext:value-type="string">
            <text:p>valentinweber1992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1" calcext:value-type="currency">
            <text:p>€1.00</text:p>
          </table:table-cell>
          <table:table-cell table:style-name="ce5" office:value-type="currency" office:currency="EUR" office:value="0.28" calcext:value-type="currency">
            <text:p>€0.28</text:p>
          </table:table-cell>
          <table:table-cell table:style-name="ce5" office:value-type="currency" office:currency="EUR" office:value="0.72" calcext:value-type="currency">
            <text:p>€0.72</text:p>
          </table:table-cell>
          <table:table-cell table:style-name="ce9" table:content-validation-name="val1" table:formula="of:=[.H55]*0.2" office:value-type="currency" office:currency="EUR" office:value="0.144" calcext:value-type="currency">
            <text:p>€0.14</text:p>
          </table:table-cell>
          <table:table-cell table:style-name="ce9" table:content-validation-name="val1" table:formula="of:=[.H55]*0.8" office:value-type="currency" office:currency="EUR" office:value="0.576" calcext:value-type="currency">
            <text:p>€0.58</text:p>
          </table:table-cell>
          <table:table-cell table:style-name="ce11" table:formula="of:=IF([.B55]=&quot;Stripe&quot;; INT([.A55]) + 12 - WEEKDAY([.A55]; 2); INT([.A55]) + CHOOSE(WEEKDAY([.A55]; 2); 4; 3; 2; 1; 7; 6; 5))" office:value-type="date" office:date-value="2026-03-13" calcext:value-type="date">
            <text:p>13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0.647336480107889" calcext:value-type="currency">
            <text:p>$0.65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6-03-05T19:41:00" calcext:value-type="date">
            <text:p>05/03/2026 19:41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7gpAQRhkM9CcvM06lwvSYx</text:p>
          </table:table-cell>
          <table:table-cell table:style-name="ce4" office:value-type="string" calcext:value-type="string">
            <text:p>valentinweber1992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27" calcext:value-type="currency">
            <text:p>€27.00</text:p>
          </table:table-cell>
          <table:table-cell table:style-name="ce5" office:value-type="currency" office:currency="EUR" office:value="0.95" calcext:value-type="currency">
            <text:p>€0.95</text:p>
          </table:table-cell>
          <table:table-cell table:style-name="ce5" office:value-type="currency" office:currency="EUR" office:value="26.05" calcext:value-type="currency">
            <text:p>€26.05</text:p>
          </table:table-cell>
          <table:table-cell table:style-name="ce9" table:content-validation-name="val1" table:formula="of:=[.H56]*0.2" office:value-type="currency" office:currency="EUR" office:value="5.21" calcext:value-type="currency">
            <text:p>€5.21</text:p>
          </table:table-cell>
          <table:table-cell table:style-name="ce9" table:content-validation-name="val1" table:formula="of:=[.H56]*0.8" office:value-type="currency" office:currency="EUR" office:value="20.84" calcext:value-type="currency">
            <text:p>€20.84</text:p>
          </table:table-cell>
          <table:table-cell table:style-name="ce11" table:formula="of:=IF([.B56]=&quot;Stripe&quot;; INT([.A56]) + 12 - WEEKDAY([.A56]; 2); INT([.A56]) + CHOOSE(WEEKDAY([.A56]; 2); 4; 3; 2; 1; 7; 6; 5))" office:value-type="date" office:date-value="2026-03-13" calcext:value-type="date">
            <text:p>13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23.4209934816813" calcext:value-type="currency">
            <text:p>$23.4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05T19:54:08" calcext:value-type="date">
            <text:p>05/03/2026 19:54:08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JOSEP ANTONI A.A.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40" calcext:value-type="currency">
            <text:p>€4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40" calcext:value-type="currency">
            <text:p>€40.00</text:p>
          </table:table-cell>
          <table:table-cell table:style-name="ce9" table:content-validation-name="val1" table:formula="of:=[.H57]*0.2" office:value-type="currency" office:currency="EUR" office:value="8" calcext:value-type="currency">
            <text:p>€8.00</text:p>
          </table:table-cell>
          <table:table-cell table:style-name="ce9" table:content-validation-name="val1" table:formula="of:=[.H57]*0.8" office:value-type="currency" office:currency="EUR" office:value="32" calcext:value-type="currency">
            <text:p>€32.00</text:p>
          </table:table-cell>
          <table:table-cell table:style-name="ce11" table:formula="of:=IF([.B57]=&quot;Stripe&quot;; INT([.A57]) + 12 - WEEKDAY([.A57]; 2); INT([.A57]) + CHOOSE(WEEKDAY([.A57]; 2); 4; 3; 2; 1; 7; 6; 5))" office:value-type="date" office:date-value="2026-03-06" calcext:value-type="date">
            <text:p>06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36.3719027051603" calcext:value-type="currency">
            <text:p>$36.37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6-03-05T20:19:00" calcext:value-type="date">
            <text:p>05/03/2026 20:19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7hQXQRhkM9CcvM1YBWIR53</text:p>
          </table:table-cell>
          <table:table-cell table:style-name="ce4" office:value-type="string" calcext:value-type="string">
            <text:p>yari.fankhauser@gmx.ch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1" calcext:value-type="currency">
            <text:p>€1.00</text:p>
          </table:table-cell>
          <table:table-cell table:style-name="ce5" office:value-type="currency" office:currency="EUR" office:value="0.28" calcext:value-type="currency">
            <text:p>€0.28</text:p>
          </table:table-cell>
          <table:table-cell table:style-name="ce5" office:value-type="currency" office:currency="EUR" office:value="0.72" calcext:value-type="currency">
            <text:p>€0.72</text:p>
          </table:table-cell>
          <table:table-cell table:style-name="ce9" table:content-validation-name="val1" table:formula="of:=[.H58]*0.2" office:value-type="currency" office:currency="EUR" office:value="0.144" calcext:value-type="currency">
            <text:p>€0.14</text:p>
          </table:table-cell>
          <table:table-cell table:style-name="ce9" table:content-validation-name="val1" table:formula="of:=[.H58]*0.8" office:value-type="currency" office:currency="EUR" office:value="0.576" calcext:value-type="currency">
            <text:p>€0.58</text:p>
          </table:table-cell>
          <table:table-cell table:style-name="ce11" table:formula="of:=IF([.B58]=&quot;Stripe&quot;; INT([.A58]) + 12 - WEEKDAY([.A58]; 2); INT([.A58]) + CHOOSE(WEEKDAY([.A58]; 2); 4; 3; 2; 1; 7; 6; 5))" office:value-type="date" office:date-value="2026-03-13" calcext:value-type="date">
            <text:p>13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0.647336480107889" calcext:value-type="currency">
            <text:p>$0.65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6-03-05T20:20:00" calcext:value-type="date">
            <text:p>05/03/2026 20:20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7hRSQRhkM9CcvM0yjtQKjo</text:p>
          </table:table-cell>
          <table:table-cell table:style-name="ce4" office:value-type="string" calcext:value-type="string">
            <text:p>yari.fankhauser@gmx.ch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48" calcext:value-type="currency">
            <text:p>€48.00</text:p>
          </table:table-cell>
          <table:table-cell table:style-name="ce5" office:value-type="currency" office:currency="EUR" office:value="1.81" calcext:value-type="currency">
            <text:p>€1.81</text:p>
          </table:table-cell>
          <table:table-cell table:style-name="ce5" office:value-type="currency" office:currency="EUR" office:value="46.19" calcext:value-type="currency">
            <text:p>€46.19</text:p>
          </table:table-cell>
          <table:table-cell table:style-name="ce9" table:content-validation-name="val1" table:formula="of:=[.H59]*0.2" office:value-type="currency" office:currency="EUR" office:value="9.238" calcext:value-type="currency">
            <text:p>€9.24</text:p>
          </table:table-cell>
          <table:table-cell table:style-name="ce9" table:content-validation-name="val1" table:formula="of:=[.H59]*0.8" office:value-type="currency" office:currency="EUR" office:value="36.952" calcext:value-type="currency">
            <text:p>€36.95</text:p>
          </table:table-cell>
          <table:table-cell table:style-name="ce11" table:formula="of:=IF([.B59]=&quot;Stripe&quot;; INT([.A59]) + 12 - WEEKDAY([.A59]; 2); INT([.A59]) + CHOOSE(WEEKDAY([.A59]; 2); 4; 3; 2; 1; 7; 6; 5))" office:value-type="date" office:date-value="2026-03-13" calcext:value-type="date">
            <text:p>13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41.5284333558103" calcext:value-type="currency">
            <text:p>$41.53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6-03-05T20:20:00" calcext:value-type="date">
            <text:p>05/03/2026 20:20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7hQmQRhkM9CcvM0ae1odSP</text:p>
          </table:table-cell>
          <table:table-cell table:style-name="ce4" office:value-type="string" calcext:value-type="string">
            <text:p>noel.zingg1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1" calcext:value-type="currency">
            <text:p>€1.00</text:p>
          </table:table-cell>
          <table:table-cell table:style-name="ce5" office:value-type="currency" office:currency="EUR" office:value="0.28" calcext:value-type="currency">
            <text:p>€0.28</text:p>
          </table:table-cell>
          <table:table-cell table:style-name="ce5" office:value-type="currency" office:currency="EUR" office:value="0.72" calcext:value-type="currency">
            <text:p>€0.72</text:p>
          </table:table-cell>
          <table:table-cell table:style-name="ce9" table:content-validation-name="val1" table:formula="of:=[.H60]*0.2" office:value-type="currency" office:currency="EUR" office:value="0.144" calcext:value-type="currency">
            <text:p>€0.14</text:p>
          </table:table-cell>
          <table:table-cell table:style-name="ce9" table:content-validation-name="val1" table:formula="of:=[.H60]*0.8" office:value-type="currency" office:currency="EUR" office:value="0.576" calcext:value-type="currency">
            <text:p>€0.58</text:p>
          </table:table-cell>
          <table:table-cell table:style-name="ce11" table:formula="of:=IF([.B60]=&quot;Stripe&quot;; INT([.A60]) + 12 - WEEKDAY([.A60]; 2); INT([.A60]) + CHOOSE(WEEKDAY([.A60]; 2); 4; 3; 2; 1; 7; 6; 5))" office:value-type="date" office:date-value="2026-03-13" calcext:value-type="date">
            <text:p>13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0.647336480107889" calcext:value-type="currency">
            <text:p>$0.65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6-03-05T20:22:00" calcext:value-type="date">
            <text:p>05/03/2026 20:22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7hSKQRhkM9CcvM0blKuqBs</text:p>
          </table:table-cell>
          <table:table-cell table:style-name="ce4" office:value-type="string" calcext:value-type="string">
            <text:p>noel_zingg@bluewin.ch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1" calcext:value-type="currency">
            <text:p>€1.00</text:p>
          </table:table-cell>
          <table:table-cell table:style-name="ce5" office:value-type="currency" office:currency="EUR" office:value="0.28" calcext:value-type="currency">
            <text:p>€0.28</text:p>
          </table:table-cell>
          <table:table-cell table:style-name="ce5" office:value-type="currency" office:currency="EUR" office:value="0.72" calcext:value-type="currency">
            <text:p>€0.72</text:p>
          </table:table-cell>
          <table:table-cell table:style-name="ce9" table:content-validation-name="val1" table:formula="of:=[.H61]*0.2" office:value-type="currency" office:currency="EUR" office:value="0.144" calcext:value-type="currency">
            <text:p>€0.14</text:p>
          </table:table-cell>
          <table:table-cell table:style-name="ce9" table:content-validation-name="val1" table:formula="of:=[.H61]*0.8" office:value-type="currency" office:currency="EUR" office:value="0.576" calcext:value-type="currency">
            <text:p>€0.58</text:p>
          </table:table-cell>
          <table:table-cell table:style-name="ce11" table:formula="of:=IF([.B61]=&quot;Stripe&quot;; INT([.A61]) + 12 - WEEKDAY([.A61]; 2); INT([.A61]) + CHOOSE(WEEKDAY([.A61]; 2); 4; 3; 2; 1; 7; 6; 5))" office:value-type="date" office:date-value="2026-03-13" calcext:value-type="date">
            <text:p>13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0.647336480107889" calcext:value-type="currency">
            <text:p>$0.65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6-03-05T20:23:00" calcext:value-type="date">
            <text:p>05/03/2026 20:23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7hUFQRhkM9CcvM05YIoqCz</text:p>
          </table:table-cell>
          <table:table-cell table:style-name="ce4" office:value-type="string" calcext:value-type="string">
            <text:p>noel_zingg@bluewin.ch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.77" calcext:value-type="currency">
            <text:p>€0.77</text:p>
          </table:table-cell>
          <table:table-cell table:style-name="ce5" office:value-type="currency" office:currency="EUR" office:value="19.23" calcext:value-type="currency">
            <text:p>€19.23</text:p>
          </table:table-cell>
          <table:table-cell table:style-name="ce9" table:content-validation-name="val1" table:formula="of:=[.H62]*0.2" office:value-type="currency" office:currency="EUR" office:value="3.846" calcext:value-type="currency">
            <text:p>€3.85</text:p>
          </table:table-cell>
          <table:table-cell table:style-name="ce9" table:content-validation-name="val1" table:formula="of:=[.H62]*0.8" office:value-type="currency" office:currency="EUR" office:value="15.384" calcext:value-type="currency">
            <text:p>€15.38</text:p>
          </table:table-cell>
          <table:table-cell table:style-name="ce11" table:formula="of:=IF([.B62]=&quot;Stripe&quot;; INT([.A62]) + 12 - WEEKDAY([.A62]; 2); INT([.A62]) + CHOOSE(WEEKDAY([.A62]; 2); 4; 3; 2; 1; 7; 6; 5))" office:value-type="date" office:date-value="2026-03-13" calcext:value-type="date">
            <text:p>13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7.2892784895482" calcext:value-type="currency">
            <text:p>$17.2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05T21:22:52" calcext:value-type="date">
            <text:p>05/03/2026 21:22:52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Jorge T.C.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currency" office:currency="EUR" office:value="25" calcext:value-type="currency">
            <text:p>€25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5" calcext:value-type="currency">
            <text:p>€25.00</text:p>
          </table:table-cell>
          <table:table-cell table:style-name="ce9" table:content-validation-name="val1" table:formula="of:=[.H63]*0.2" office:value-type="currency" office:currency="EUR" office:value="5" calcext:value-type="currency">
            <text:p>€5.00</text:p>
          </table:table-cell>
          <table:table-cell table:style-name="ce9" table:content-validation-name="val1" table:formula="of:=[.H63]*0.8" office:value-type="currency" office:currency="EUR" office:value="20" calcext:value-type="currency">
            <text:p>€20.00</text:p>
          </table:table-cell>
          <table:table-cell table:style-name="ce11" table:formula="of:=IF([.B63]=&quot;Stripe&quot;; INT([.A63]) + 12 - WEEKDAY([.A63]; 2); INT([.A63]) + CHOOSE(WEEKDAY([.A63]; 2); 4; 3; 2; 1; 7; 6; 5))" office:value-type="date" office:date-value="2026-03-06" calcext:value-type="date">
            <text:p>06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22.7324391907252" calcext:value-type="currency">
            <text:p>$22.7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05T23:22:18" calcext:value-type="date">
            <text:p>05/03/2026 23:22:18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Victor Jose M. E.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9" table:content-validation-name="val1" table:formula="of:=[.H64]*0.2" office:value-type="currency" office:currency="EUR" office:value="6" calcext:value-type="currency">
            <text:p>€6.00</text:p>
          </table:table-cell>
          <table:table-cell table:style-name="ce9" table:content-validation-name="val1" table:formula="of:=[.H64]*0.8" office:value-type="currency" office:currency="EUR" office:value="24" calcext:value-type="currency">
            <text:p>€24.00</text:p>
          </table:table-cell>
          <table:table-cell table:style-name="ce11" table:formula="of:=IF([.B64]=&quot;Stripe&quot;; INT([.A64]) + 12 - WEEKDAY([.A64]; 2); INT([.A64]) + CHOOSE(WEEKDAY([.A64]; 2); 4; 3; 2; 1; 7; 6; 5))" office:value-type="date" office:date-value="2026-03-06" calcext:value-type="date">
            <text:p>06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27.2789270288702" calcext:value-type="currency">
            <text:p>$27.2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09T14:27:41" calcext:value-type="date">
            <text:p>09/03/2026 14:27:41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XAVIER M.A.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[.H65]*0.2" office:value-type="currency" office:currency="EUR" office:value="4" calcext:value-type="currency">
            <text:p>€4.00</text:p>
          </table:table-cell>
          <table:table-cell table:style-name="ce9" table:content-validation-name="val1" table:formula="of:=[.H65]*0.8" office:value-type="currency" office:currency="EUR" office:value="16" calcext:value-type="currency">
            <text:p>€16.00</text:p>
          </table:table-cell>
          <table:table-cell table:style-name="ce11" table:formula="of:=IF([.B65]=&quot;Stripe&quot;; INT([.A65]) + 12 - WEEKDAY([.A65]; 2); INT([.A65]) + CHOOSE(WEEKDAY([.A65]; 2); 4; 3; 2; 1; 7; 6; 5))" office:value-type="date" office:date-value="2026-03-13" calcext:value-type="date">
            <text:p>13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7.9815688918858" calcext:value-type="currency">
            <text:p>$17.9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10T16:52:41" calcext:value-type="date">
            <text:p>10/03/2026 16:52:41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Andoni A.V.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[.H66]*0.2" office:value-type="currency" office:currency="EUR" office:value="4" calcext:value-type="currency">
            <text:p>€4.00</text:p>
          </table:table-cell>
          <table:table-cell table:style-name="ce9" table:content-validation-name="val1" table:formula="of:=[.H66]*0.8" office:value-type="currency" office:currency="EUR" office:value="16" calcext:value-type="currency">
            <text:p>€16.00</text:p>
          </table:table-cell>
          <table:table-cell table:style-name="ce11" table:formula="of:=IF([.B66]=&quot;Stripe&quot;; INT([.A66]) + 12 - WEEKDAY([.A66]; 2); INT([.A66]) + CHOOSE(WEEKDAY([.A66]; 2); 4; 3; 2; 1; 7; 6; 5))" office:value-type="date" office:date-value="2026-03-13" calcext:value-type="date">
            <text:p>13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7.9815688918858" calcext:value-type="currency">
            <text:p>$17.9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11T20:01:38" calcext:value-type="date">
            <text:p>11/03/2026 20:01:38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9vkUQRhkM9CcvM0ThVYKr9</text:p>
          </table:table-cell>
          <table:table-cell table:style-name="ce4" office:value-type="string" calcext:value-type="string">
            <text:p>thegoorgo14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50" calcext:value-type="currency">
            <text:p>€50.00</text:p>
          </table:table-cell>
          <table:table-cell table:style-name="ce5" office:value-type="currency" office:currency="EUR" office:value="1" calcext:value-type="currency">
            <text:p>€1.00</text:p>
          </table:table-cell>
          <table:table-cell table:style-name="ce5" office:value-type="currency" office:currency="EUR" office:value="49" calcext:value-type="currency">
            <text:p>€49.00</text:p>
          </table:table-cell>
          <table:table-cell table:style-name="ce9" table:content-validation-name="val1" table:formula="of:=[.H67]*0.2" office:value-type="currency" office:currency="EUR" office:value="9.8" calcext:value-type="currency">
            <text:p>€9.80</text:p>
          </table:table-cell>
          <table:table-cell table:style-name="ce9" table:content-validation-name="val1" table:formula="of:=[.H67]*0.8" office:value-type="currency" office:currency="EUR" office:value="39.2" calcext:value-type="currency">
            <text:p>€39.20</text:p>
          </table:table-cell>
          <table:table-cell table:style-name="ce11" table:formula="of:=IF([.B67]=&quot;Stripe&quot;; INT([.A67]) + 12 - WEEKDAY([.A67]; 2); INT([.A67]) + CHOOSE(WEEKDAY([.A67]; 2); 4; 3; 2; 1; 7; 6; 5))" office:value-type="date" office:date-value="2026-03-20" calcext:value-type="date">
            <text:p>20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44.3941109852775" calcext:value-type="currency">
            <text:p>$44.3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11T21:35:43" calcext:value-type="date">
            <text:p>11/03/2026 21:35:43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Victor Manuel P. G.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[.H68]*0.2" office:value-type="currency" office:currency="EUR" office:value="4" calcext:value-type="currency">
            <text:p>€4.00</text:p>
          </table:table-cell>
          <table:table-cell table:style-name="ce9" table:content-validation-name="val1" table:formula="of:=[.H68]*0.8" office:value-type="currency" office:currency="EUR" office:value="16" calcext:value-type="currency">
            <text:p>€16.00</text:p>
          </table:table-cell>
          <table:table-cell table:style-name="ce11" table:formula="of:=IF([.B68]=&quot;Stripe&quot;; INT([.A68]) + 12 - WEEKDAY([.A68]; 2); INT([.A68]) + CHOOSE(WEEKDAY([.A68]; 2); 4; 3; 2; 1; 7; 6; 5))" office:value-type="date" office:date-value="2026-03-13" calcext:value-type="date">
            <text:p>13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7.9815688918858" calcext:value-type="currency">
            <text:p>$17.9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12T12:40:16" calcext:value-type="date">
            <text:p>12/03/2026 12:40:16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JOSE LUIS M. C.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9" table:content-validation-name="val1" table:formula="of:=[.H69]*0.2" office:value-type="currency" office:currency="EUR" office:value="6" calcext:value-type="currency">
            <text:p>€6.00</text:p>
          </table:table-cell>
          <table:table-cell table:style-name="ce9" table:content-validation-name="val1" table:formula="of:=[.H69]*0.8" office:value-type="currency" office:currency="EUR" office:value="24" calcext:value-type="currency">
            <text:p>€24.00</text:p>
          </table:table-cell>
          <table:table-cell table:style-name="ce11" table:formula="of:=IF([.B69]=&quot;Stripe&quot;; INT([.A69]) + 12 - WEEKDAY([.A69]; 2); INT([.A69]) + CHOOSE(WEEKDAY([.A69]; 2); 4; 3; 2; 1; 7; 6; 5))" office:value-type="date" office:date-value="2026-03-13" calcext:value-type="date">
            <text:p>13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26.9723533378287" calcext:value-type="currency">
            <text:p>$26.9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12T14:33:26" calcext:value-type="date">
            <text:p>12/03/2026 14:33:26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AD6oQRhkM9CcvM0AcAnsmK</text:p>
          </table:table-cell>
          <table:table-cell table:style-name="ce4" office:value-type="string" calcext:value-type="string">
            <text:p>desch4indm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1" calcext:value-type="currency">
            <text:p>€1.00</text:p>
          </table:table-cell>
          <table:table-cell table:style-name="ce5" office:value-type="currency" office:currency="EUR" office:value="0.27" calcext:value-type="currency">
            <text:p>€0.27</text:p>
          </table:table-cell>
          <table:table-cell table:style-name="ce5" office:value-type="currency" office:currency="EUR" office:value="0.73" calcext:value-type="currency">
            <text:p>€0.73</text:p>
          </table:table-cell>
          <table:table-cell table:style-name="ce9" table:content-validation-name="val1" table:formula="of:=[.H70]*0.2" office:value-type="currency" office:currency="EUR" office:value="0.146" calcext:value-type="currency">
            <text:p>€0.15</text:p>
          </table:table-cell>
          <table:table-cell table:style-name="ce9" table:content-validation-name="val1" table:formula="of:=[.H70]*0.8" office:value-type="currency" office:currency="EUR" office:value="0.584" calcext:value-type="currency">
            <text:p>€0.58</text:p>
          </table:table-cell>
          <table:table-cell table:style-name="ce11" table:formula="of:=IF([.B70]=&quot;Stripe&quot;; INT([.A70]) + 12 - WEEKDAY([.A70]; 2); INT([.A70]) + CHOOSE(WEEKDAY([.A70]; 2); 4; 3; 2; 1; 7; 6; 5))" office:value-type="date" office:date-value="2026-03-20" calcext:value-type="date">
            <text:p>20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0.661381653454134" calcext:value-type="currency">
            <text:p>$0.6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12T14:34:54" calcext:value-type="date">
            <text:p>12/03/2026 14:34:54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AD8DQRhkM9CcvM1UnWgo4c</text:p>
          </table:table-cell>
          <table:table-cell table:style-name="ce4" office:value-type="string" calcext:value-type="string">
            <text:p>desch4indm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.55" calcext:value-type="currency">
            <text:p>€0.55</text:p>
          </table:table-cell>
          <table:table-cell table:style-name="ce5" office:value-type="currency" office:currency="EUR" office:value="19.45" calcext:value-type="currency">
            <text:p>€19.45</text:p>
          </table:table-cell>
          <table:table-cell table:style-name="ce9" table:content-validation-name="val1" table:formula="of:=[.H71]*0.2" office:value-type="currency" office:currency="EUR" office:value="3.89" calcext:value-type="currency">
            <text:p>€3.89</text:p>
          </table:table-cell>
          <table:table-cell table:style-name="ce9" table:content-validation-name="val1" table:formula="of:=[.H71]*0.8" office:value-type="currency" office:currency="EUR" office:value="15.56" calcext:value-type="currency">
            <text:p>€15.56</text:p>
          </table:table-cell>
          <table:table-cell table:style-name="ce11" table:formula="of:=IF([.B71]=&quot;Stripe&quot;; INT([.A71]) + 12 - WEEKDAY([.A71]; 2); INT([.A71]) + CHOOSE(WEEKDAY([.A71]; 2); 4; 3; 2; 1; 7; 6; 5))" office:value-type="date" office:date-value="2026-03-20" calcext:value-type="date">
            <text:p>20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7.6217440543601" calcext:value-type="currency">
            <text:p>$17.6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12T14:57:54" calcext:value-type="date">
            <text:p>12/03/2026 14:57:54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ADUSQRhkM9CcvM0NhOgK4t</text:p>
          </table:table-cell>
          <table:table-cell table:style-name="ce4" office:value-type="string" calcext:value-type="string">
            <text:p>santos_pekeno@hot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1" calcext:value-type="currency">
            <text:p>€1.00</text:p>
          </table:table-cell>
          <table:table-cell table:style-name="ce5" office:value-type="currency" office:currency="EUR" office:value="0.48" calcext:value-type="currency">
            <text:p>€0.48</text:p>
          </table:table-cell>
          <table:table-cell table:style-name="ce5" office:value-type="currency" office:currency="EUR" office:value="0.52" calcext:value-type="currency">
            <text:p>€0.52</text:p>
          </table:table-cell>
          <table:table-cell table:style-name="ce9" table:content-validation-name="val1" table:formula="of:=[.H72]*0.2" office:value-type="currency" office:currency="EUR" office:value="0.104" calcext:value-type="currency">
            <text:p>€0.10</text:p>
          </table:table-cell>
          <table:table-cell table:style-name="ce9" table:content-validation-name="val1" table:formula="of:=[.H72]*0.8" office:value-type="currency" office:currency="EUR" office:value="0.416" calcext:value-type="currency">
            <text:p>€0.42</text:p>
          </table:table-cell>
          <table:table-cell table:style-name="ce11" table:formula="of:=IF([.B72]=&quot;Stripe&quot;; INT([.A72]) + 12 - WEEKDAY([.A72]; 2); INT([.A72]) + CHOOSE(WEEKDAY([.A72]; 2); 4; 3; 2; 1; 7; 6; 5))" office:value-type="date" office:date-value="2026-03-20" calcext:value-type="date">
            <text:p>20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0.471121177802945" calcext:value-type="currency">
            <text:p>$0.4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12T15:00:00" calcext:value-type="date">
            <text:p>12/03/2026 15:00:00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ADWUQRhkM9CcvM1Q4VxXZi</text:p>
          </table:table-cell>
          <table:table-cell table:style-name="ce4" office:value-type="string" calcext:value-type="string">
            <text:p>santos_pekeno@hot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1.07" calcext:value-type="currency">
            <text:p>€1.07</text:p>
          </table:table-cell>
          <table:table-cell table:style-name="ce5" office:value-type="currency" office:currency="EUR" office:value="18.93" calcext:value-type="currency">
            <text:p>€18.93</text:p>
          </table:table-cell>
          <table:table-cell table:style-name="ce9" table:content-validation-name="val1" table:formula="of:=[.H73]*0.2" office:value-type="currency" office:currency="EUR" office:value="3.786" calcext:value-type="currency">
            <text:p>€3.79</text:p>
          </table:table-cell>
          <table:table-cell table:style-name="ce9" table:content-validation-name="val1" table:formula="of:=[.H73]*0.8" office:value-type="currency" office:currency="EUR" office:value="15.144" calcext:value-type="currency">
            <text:p>€15.14</text:p>
          </table:table-cell>
          <table:table-cell table:style-name="ce11" table:formula="of:=IF([.B73]=&quot;Stripe&quot;; INT([.A73]) + 12 - WEEKDAY([.A73]; 2); INT([.A73]) + CHOOSE(WEEKDAY([.A73]; 2); 4; 3; 2; 1; 7; 6; 5))" office:value-type="date" office:date-value="2026-03-20" calcext:value-type="date">
            <text:p>20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7.1506228765572" calcext:value-type="currency">
            <text:p>$17.1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12T17:01:26" calcext:value-type="date">
            <text:p>12/03/2026 17:01:26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MIGUEL ANGEL H.B.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[.H74]*0.2" office:value-type="currency" office:currency="EUR" office:value="4" calcext:value-type="currency">
            <text:p>€4.00</text:p>
          </table:table-cell>
          <table:table-cell table:style-name="ce9" table:content-validation-name="val1" table:formula="of:=[.H74]*0.8" office:value-type="currency" office:currency="EUR" office:value="16" calcext:value-type="currency">
            <text:p>€16.00</text:p>
          </table:table-cell>
          <table:table-cell table:style-name="ce11" table:formula="of:=IF([.B74]=&quot;Stripe&quot;; INT([.A74]) + 12 - WEEKDAY([.A74]; 2); INT([.A74]) + CHOOSE(WEEKDAY([.A74]; 2); 4; 3; 2; 1; 7; 6; 5))" office:value-type="date" office:date-value="2026-03-13" calcext:value-type="date">
            <text:p>13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7.9815688918858" calcext:value-type="currency">
            <text:p>$17.9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12T18:57:14" calcext:value-type="date">
            <text:p>12/03/2026 18:57:14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CRISTOBAL P.G.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35" calcext:value-type="currency">
            <text:p>€35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35" calcext:value-type="currency">
            <text:p>€35.00</text:p>
          </table:table-cell>
          <table:table-cell table:style-name="ce9" table:content-validation-name="val1" table:formula="of:=[.H75]*0.2" office:value-type="currency" office:currency="EUR" office:value="7" calcext:value-type="currency">
            <text:p>€7.00</text:p>
          </table:table-cell>
          <table:table-cell table:style-name="ce9" table:content-validation-name="val1" table:formula="of:=[.H75]*0.8" office:value-type="currency" office:currency="EUR" office:value="28" calcext:value-type="currency">
            <text:p>€28.00</text:p>
          </table:table-cell>
          <table:table-cell table:style-name="ce11" table:formula="of:=IF([.B75]=&quot;Stripe&quot;; INT([.A75]) + 12 - WEEKDAY([.A75]; 2); INT([.A75]) + CHOOSE(WEEKDAY([.A75]; 2); 4; 3; 2; 1; 7; 6; 5))" office:value-type="date" office:date-value="2026-03-13" calcext:value-type="date">
            <text:p>13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31.4677455608002" calcext:value-type="currency">
            <text:p>$31.4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13T11:40:19" calcext:value-type="date">
            <text:p>13/03/2026 11:40:19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Pedro Manuel A. M.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45" calcext:value-type="currency">
            <text:p>€45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45" calcext:value-type="currency">
            <text:p>€45.00</text:p>
          </table:table-cell>
          <table:table-cell table:style-name="ce9" table:content-validation-name="val1" table:formula="of:=[.H76]*0.2" office:value-type="currency" office:currency="EUR" office:value="9" calcext:value-type="currency">
            <text:p>€9.00</text:p>
          </table:table-cell>
          <table:table-cell table:style-name="ce9" table:content-validation-name="val1" table:formula="of:=[.H76]*0.8" office:value-type="currency" office:currency="EUR" office:value="36" calcext:value-type="currency">
            <text:p>€36.00</text:p>
          </table:table-cell>
          <table:table-cell table:style-name="ce11" table:formula="of:=IF([.B76]=&quot;Stripe&quot;; INT([.A76]) + 12 - WEEKDAY([.A76]; 2); INT([.A76]) + CHOOSE(WEEKDAY([.A76]; 2); 4; 3; 2; 1; 7; 6; 5))" office:value-type="date" office:date-value="2026-03-20" calcext:value-type="date">
            <text:p>20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40.7701019252548" calcext:value-type="currency">
            <text:p>$40.7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13T13:25:30" calcext:value-type="date">
            <text:p>13/03/2026 13:25:30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AYWcQRhkM9CcvM0lGshRMe</text:p>
          </table:table-cell>
          <table:table-cell table:style-name="ce4" office:value-type="string" calcext:value-type="string">
            <text:p>josemamipo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.55" calcext:value-type="currency">
            <text:p>€0.55</text:p>
          </table:table-cell>
          <table:table-cell table:style-name="ce5" office:value-type="currency" office:currency="EUR" office:value="19.45" calcext:value-type="currency">
            <text:p>€19.45</text:p>
          </table:table-cell>
          <table:table-cell table:style-name="ce9" table:content-validation-name="val1" table:formula="of:=[.H77]*0.2" office:value-type="currency" office:currency="EUR" office:value="3.89" calcext:value-type="currency">
            <text:p>€3.89</text:p>
          </table:table-cell>
          <table:table-cell table:style-name="ce9" table:content-validation-name="val1" table:formula="of:=[.H77]*0.8" office:value-type="currency" office:currency="EUR" office:value="15.56" calcext:value-type="currency">
            <text:p>€15.56</text:p>
          </table:table-cell>
          <table:table-cell table:style-name="ce11" table:formula="of:=IF([.B77]=&quot;Stripe&quot;; INT([.A77]) + 12 - WEEKDAY([.A77]; 2); INT([.A77]) + CHOOSE(WEEKDAY([.A77]; 2); 4; 3; 2; 1; 7; 6; 5))" office:value-type="date" office:date-value="2026-03-20" calcext:value-type="date">
            <text:p>20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7.6217440543601" calcext:value-type="currency">
            <text:p>$17.6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13T17:42:15" calcext:value-type="date">
            <text:p>13/03/2026 17:42:15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AcWlQRhkM9CcvM1lOgjBsc</text:p>
          </table:table-cell>
          <table:table-cell table:style-name="ce4" office:value-type="string" calcext:value-type="string">
            <text:p>gionhaegi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32" calcext:value-type="currency">
            <text:p>€32.00</text:p>
          </table:table-cell>
          <table:table-cell table:style-name="ce5" office:value-type="currency" office:currency="EUR" office:value="1.08" calcext:value-type="currency">
            <text:p>€1.08</text:p>
          </table:table-cell>
          <table:table-cell table:style-name="ce5" office:value-type="currency" office:currency="EUR" office:value="30.92" calcext:value-type="currency">
            <text:p>€30.92</text:p>
          </table:table-cell>
          <table:table-cell table:style-name="ce9" table:content-validation-name="val1" table:formula="of:=[.H78]*0.2" office:value-type="currency" office:currency="EUR" office:value="6.184" calcext:value-type="currency">
            <text:p>€6.18</text:p>
          </table:table-cell>
          <table:table-cell table:style-name="ce9" table:content-validation-name="val1" table:formula="of:=[.H78]*0.8" office:value-type="currency" office:currency="EUR" office:value="24.736" calcext:value-type="currency">
            <text:p>€24.74</text:p>
          </table:table-cell>
          <table:table-cell table:style-name="ce11" table:formula="of:=IF([.B78]=&quot;Stripe&quot;; INT([.A78]) + 12 - WEEKDAY([.A78]; 2); INT([.A78]) + CHOOSE(WEEKDAY([.A78]; 2); 4; 3; 2; 1; 7; 6; 5))" office:value-type="date" office:date-value="2026-03-20" calcext:value-type="date">
            <text:p>20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28.0135900339751" calcext:value-type="currency">
            <text:p>$28.0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13T17:47:50" calcext:value-type="date">
            <text:p>13/03/2026 17:47:50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AcadQRhkM9CcvM07mqXfjt</text:p>
          </table:table-cell>
          <table:table-cell table:style-name="ce4" office:value-type="string" calcext:value-type="string">
            <text:p>gionhaegi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currency" office:currency="EUR" office:value="6" calcext:value-type="currency">
            <text:p>€6.00</text:p>
          </table:table-cell>
          <table:table-cell table:style-name="ce5" office:value-type="currency" office:currency="EUR" office:value="0.41" calcext:value-type="currency">
            <text:p>€0.41</text:p>
          </table:table-cell>
          <table:table-cell table:style-name="ce5" office:value-type="currency" office:currency="EUR" office:value="5.59" calcext:value-type="currency">
            <text:p>€5.59</text:p>
          </table:table-cell>
          <table:table-cell table:style-name="ce9" table:content-validation-name="val1" table:formula="of:=[.H79]*0.2" office:value-type="currency" office:currency="EUR" office:value="1.118" calcext:value-type="currency">
            <text:p>€1.12</text:p>
          </table:table-cell>
          <table:table-cell table:style-name="ce9" table:content-validation-name="val1" table:formula="of:=[.H79]*0.8" office:value-type="currency" office:currency="EUR" office:value="4.472" calcext:value-type="currency">
            <text:p>€4.47</text:p>
          </table:table-cell>
          <table:table-cell table:style-name="ce11" table:formula="of:=IF([.B79]=&quot;Stripe&quot;; INT([.A79]) + 12 - WEEKDAY([.A79]; 2); INT([.A79]) + CHOOSE(WEEKDAY([.A79]; 2); 4; 3; 2; 1; 7; 6; 5))" office:value-type="date" office:date-value="2026-03-20" calcext:value-type="date">
            <text:p>20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5.06455266138165" calcext:value-type="currency">
            <text:p>$5.0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13T22:40:07" calcext:value-type="date">
            <text:p>13/03/2026 22:40:07</text:p>
          </table:table-cell>
          <table:table-cell table:style-name="ce4" office:value-type="string" calcext:value-type="string">
            <text:p>GASTO - PUBLICIDAD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0" calcext:value-type="currency">
            <text:p>€0.00</text:p>
          </table:table-cell>
          <table:table-cell table:number-columns-repeated="2" table:style-name="ce5" office:value-type="currency" office:currency="EUR" office:value="0" calcext:value-type="currency">
            <text:p>€0.00</text:p>
          </table:table-cell>
          <table:table-cell table:style-name="ce9" table:content-validation-name="val1" table:formula="of:=[.H80]*0.2" office:value-type="currency" office:currency="EUR" office:value="0" calcext:value-type="currency">
            <text:p>€0.00</text:p>
          </table:table-cell>
          <table:table-cell table:style-name="ce9" table:content-validation-name="val1" office:value-type="currency" office:currency="EUR" office:value="-57.09" calcext:value-type="currency">
            <text:p>-€57.09</text:p>
          </table:table-cell>
          <table:table-cell table:style-name="ce11" table:formula="of:=IF([.B80]=&quot;Stripe&quot;; INT([.A80]) + 12 - WEEKDAY([.A80]; 2); INT([.A80]) + CHOOSE(WEEKDAY([.A80]; 2); 4; 3; 2; 1; 7; 6; 5))" office:value-type="date" office:date-value="2026-03-20" calcext:value-type="date">
            <text:p>20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-64.6545866364666" calcext:value-type="currency">
            <text:p>-$64.6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13T19:51:08" calcext:value-type="date">
            <text:p>13/03/2026 19:51:08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AeXoQRhkM9CcvM0kUHoOiS</text:p>
          </table:table-cell>
          <table:table-cell table:style-name="ce4" office:value-type="string" calcext:value-type="string">
            <text:p>manuellasierra.mll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35" calcext:value-type="currency">
            <text:p>€35.00</text:p>
          </table:table-cell>
          <table:table-cell table:style-name="ce5" office:value-type="currency" office:currency="EUR" office:value="0.78" calcext:value-type="currency">
            <text:p>€0.78</text:p>
          </table:table-cell>
          <table:table-cell table:style-name="ce5" office:value-type="currency" office:currency="EUR" office:value="34.22" calcext:value-type="currency">
            <text:p>€34.22</text:p>
          </table:table-cell>
          <table:table-cell table:style-name="ce9" table:content-validation-name="val1" table:formula="of:=[.H81]*0.2" office:value-type="currency" office:currency="EUR" office:value="6.844" calcext:value-type="currency">
            <text:p>€6.84</text:p>
          </table:table-cell>
          <table:table-cell table:style-name="ce9" table:content-validation-name="val1" table:formula="of:=[.H81]*0.8" office:value-type="currency" office:currency="EUR" office:value="27.376" calcext:value-type="currency">
            <text:p>€27.38</text:p>
          </table:table-cell>
          <table:table-cell table:style-name="ce11" table:formula="of:=IF([.B81]=&quot;Stripe&quot;; INT([.A81]) + 12 - WEEKDAY([.A81]; 2); INT([.A81]) + CHOOSE(WEEKDAY([.A81]; 2); 4; 3; 2; 1; 7; 6; 5))" office:value-type="date" office:date-value="2026-03-20" calcext:value-type="date">
            <text:p>20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31.0033975084938" calcext:value-type="currency">
            <text:p>$31.00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15T18:24:58" calcext:value-type="date">
            <text:p>15/03/2026 18:24:58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BM9WQRhkM9CcvM0uYuF80t</text:p>
          </table:table-cell>
          <table:table-cell table:style-name="ce4" office:value-type="string" calcext:value-type="string">
            <text:p>pdroarroyo@hot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50" calcext:value-type="currency">
            <text:p>€50.00</text:p>
          </table:table-cell>
          <table:table-cell table:style-name="ce5" office:value-type="currency" office:currency="EUR" office:value="1" calcext:value-type="currency">
            <text:p>€1.00</text:p>
          </table:table-cell>
          <table:table-cell table:style-name="ce5" office:value-type="currency" office:currency="EUR" office:value="49" calcext:value-type="currency">
            <text:p>€49.00</text:p>
          </table:table-cell>
          <table:table-cell table:style-name="ce9" table:content-validation-name="val1" table:formula="of:=[.H82]*0.2" office:value-type="currency" office:currency="EUR" office:value="9.8" calcext:value-type="currency">
            <text:p>€9.80</text:p>
          </table:table-cell>
          <table:table-cell table:style-name="ce9" table:content-validation-name="val1" table:formula="of:=[.H82]*0.8" office:value-type="currency" office:currency="EUR" office:value="39.2" calcext:value-type="currency">
            <text:p>€39.20</text:p>
          </table:table-cell>
          <table:table-cell table:style-name="ce11" table:formula="of:=IF([.B82]=&quot;Stripe&quot;; INT([.A82]) + 12 - WEEKDAY([.A82]; 2); INT([.A82]) + CHOOSE(WEEKDAY([.A82]; 2); 4; 3; 2; 1; 7; 6; 5))" office:value-type="date" office:date-value="2026-03-20" calcext:value-type="date">
            <text:p>20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44.3941109852775" calcext:value-type="currency">
            <text:p>$44.3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15T19:47:13" calcext:value-type="date">
            <text:p>15/03/2026 19:47:13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BNR7QRhkM9CcvM1llfcSWq</text:p>
          </table:table-cell>
          <table:table-cell table:style-name="ce4" office:value-type="string" calcext:value-type="string">
            <text:p>pdroarroyo@hot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100" calcext:value-type="currency">
            <text:p>€100.00</text:p>
          </table:table-cell>
          <table:table-cell table:style-name="ce5" office:value-type="currency" office:currency="EUR" office:value="1.75" calcext:value-type="currency">
            <text:p>€1.75</text:p>
          </table:table-cell>
          <table:table-cell table:style-name="ce5" office:value-type="currency" office:currency="EUR" office:value="98.25" calcext:value-type="currency">
            <text:p>€98.25</text:p>
          </table:table-cell>
          <table:table-cell table:style-name="ce9" table:content-validation-name="val1" table:formula="of:=[.H83]*0.2" office:value-type="currency" office:currency="EUR" office:value="19.65" calcext:value-type="currency">
            <text:p>€19.65</text:p>
          </table:table-cell>
          <table:table-cell table:style-name="ce9" table:content-validation-name="val1" table:formula="of:=[.H83]*0.8" office:value-type="currency" office:currency="EUR" office:value="78.6" calcext:value-type="currency">
            <text:p>€78.60</text:p>
          </table:table-cell>
          <table:table-cell table:style-name="ce11" table:formula="of:=IF([.B83]=&quot;Stripe&quot;; INT([.A83]) + 12 - WEEKDAY([.A83]; 2); INT([.A83]) + CHOOSE(WEEKDAY([.A83]; 2); 4; 3; 2; 1; 7; 6; 5))" office:value-type="date" office:date-value="2026-03-20" calcext:value-type="date">
            <text:p>20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89.0147225368063" calcext:value-type="currency">
            <text:p>$89.0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16T09:35:25" calcext:value-type="date">
            <text:p>16/03/2026 09:35:25</text:p>
          </table:table-cell>
          <table:table-cell table:style-name="ce4" office:value-type="string" calcext:value-type="string">
            <text:p>GASTO - PUBLICIDAD</text:p>
          </table:table-cell>
          <table:table-cell table:style-name="ce4" office:value-type="string" calcext:value-type="string">
            <text:p>2026-F-000699</text:p>
          </table:table-cell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0" calcext:value-type="currency">
            <text:p>€0.00</text:p>
          </table:table-cell>
          <table:table-cell table:number-columns-repeated="2" table:style-name="ce5" office:value-type="currency" office:currency="EUR" office:value="0" calcext:value-type="currency">
            <text:p>€0.00</text:p>
          </table:table-cell>
          <table:table-cell table:style-name="ce9" table:content-validation-name="val1" office:value-type="currency" office:currency="EUR" office:value="0" calcext:value-type="currency">
            <text:p>€0.00</text:p>
          </table:table-cell>
          <table:table-cell table:style-name="ce9" table:content-validation-name="val1" office:value-type="currency" office:currency="EUR" office:value="-294" calcext:value-type="currency">
            <text:p>-€294.00</text:p>
          </table:table-cell>
          <table:table-cell table:style-name="ce11" table:formula="of:=IF([.B84]=&quot;Stripe&quot;; INT([.A84]) + 12 - WEEKDAY([.A84]; 2); INT([.A84]) + CHOOSE(WEEKDAY([.A84]; 2); 4; 3; 2; 1; 7; 6; 5))" office:value-type="date" office:date-value="2026-03-20" calcext:value-type="date">
            <text:p>20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-332.955832389581" calcext:value-type="currency">
            <text:p>-$332.9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17T15:08:15" calcext:value-type="date">
            <text:p>17/03/2026 15:08:15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C22FQRhkM9CcvM0MDjssMo</text:p>
          </table:table-cell>
          <table:table-cell table:style-name="ce4" office:value-type="string" calcext:value-type="string">
            <text:p>accion_25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35" calcext:value-type="currency">
            <text:p>€35.00</text:p>
          </table:table-cell>
          <table:table-cell table:style-name="ce5" office:value-type="currency" office:currency="EUR" office:value="0.78" calcext:value-type="currency">
            <text:p>€0.78</text:p>
          </table:table-cell>
          <table:table-cell table:style-name="ce5" office:value-type="currency" office:currency="EUR" office:value="34.22" calcext:value-type="currency">
            <text:p>€34.22</text:p>
          </table:table-cell>
          <table:table-cell table:style-name="ce9" table:content-validation-name="val1" table:formula="of:=[.H85]*0.2" office:value-type="currency" office:currency="EUR" office:value="6.844" calcext:value-type="currency">
            <text:p>€6.84</text:p>
          </table:table-cell>
          <table:table-cell table:style-name="ce9" table:content-validation-name="val1" table:formula="of:=[.H85]*0.8" office:value-type="currency" office:currency="EUR" office:value="27.376" calcext:value-type="currency">
            <text:p>€27.38</text:p>
          </table:table-cell>
          <table:table-cell table:style-name="ce11" table:formula="of:=IF([.B85]=&quot;Stripe&quot;; INT([.A85]) + 12 - WEEKDAY([.A85]; 2); INT([.A85]) + CHOOSE(WEEKDAY([.A85]; 2); 4; 3; 2; 1; 7; 6; 5))" office:value-type="date" office:date-value="2026-03-27" calcext:value-type="date">
            <text:p>27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31.0033975084938" calcext:value-type="currency">
            <text:p>$31.00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17T15:57:28" calcext:value-type="date">
            <text:p>17/03/2026 15:57:28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JOSEP ANTONI A.A.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35" calcext:value-type="currency">
            <text:p>€35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35" calcext:value-type="currency">
            <text:p>€35.00</text:p>
          </table:table-cell>
          <table:table-cell table:style-name="ce9" table:content-validation-name="val1" table:formula="of:=IF([.B86]=&quot;SALDO DEUDOR SEMANA ANTERIOR&quot;; 0; ABS([.H86])*0.2)" office:value-type="currency" office:currency="EUR" office:value="7" calcext:value-type="currency">
            <text:p>€7.00</text:p>
          </table:table-cell>
          <table:table-cell table:style-name="ce9" table:content-validation-name="val1" table:formula="of:=[.H86]-[.I86]" office:value-type="currency" office:currency="EUR" office:value="28" calcext:value-type="currency">
            <text:p>€28.00</text:p>
          </table:table-cell>
          <table:table-cell table:style-name="ce11" table:formula="of:=IF([.B86]=&quot;Stripe&quot;; INT([.A86]) + 12 - WEEKDAY([.A86]; 2); INT([.A86]) + CHOOSE(WEEKDAY([.A86]; 2); 4; 3; 2; 1; 7; 6; 5))" office:value-type="date" office:date-value="2026-03-20" calcext:value-type="date">
            <text:p>20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31.7100792751982" calcext:value-type="currency">
            <text:p>$31.7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20T12:05:12" calcext:value-type="date">
            <text:p>20/03/2026 12:05:12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D4bkQRhkM9CcvM1JGi4qyl</text:p>
          </table:table-cell>
          <table:table-cell table:style-name="ce4" office:value-type="string" calcext:value-type="string">
            <text:p>pedrocaja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100" calcext:value-type="currency">
            <text:p>€100.00</text:p>
          </table:table-cell>
          <table:table-cell table:style-name="ce5" office:value-type="currency" office:currency="EUR" office:value="1.75" calcext:value-type="currency">
            <text:p>€1.75</text:p>
          </table:table-cell>
          <table:table-cell table:style-name="ce5" office:value-type="currency" office:currency="EUR" office:value="98.25" calcext:value-type="currency">
            <text:p>€98.25</text:p>
          </table:table-cell>
          <table:table-cell table:style-name="ce9" table:content-validation-name="val1" table:formula="of:=IF([.B87]=&quot;SALDO DEUDOR SEMANA ANTERIOR&quot;; 0; ABS([.H87])*0.2)" office:value-type="currency" office:currency="EUR" office:value="19.65" calcext:value-type="currency">
            <text:p>€19.65</text:p>
          </table:table-cell>
          <table:table-cell table:style-name="ce9" table:content-validation-name="val1" table:formula="of:=[.H87]-[.I87]" office:value-type="currency" office:currency="EUR" office:value="78.6" calcext:value-type="currency">
            <text:p>€78.60</text:p>
          </table:table-cell>
          <table:table-cell table:style-name="ce11" table:formula="of:=IF([.B87]=&quot;Stripe&quot;; INT([.A87]) + 12 - WEEKDAY([.A87]; 2); INT([.A87]) + CHOOSE(WEEKDAY([.A87]; 2); 4; 3; 2; 1; 7; 6; 5))" office:value-type="date" office:date-value="2026-03-27" calcext:value-type="date">
            <text:p>27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89.0147225368063" calcext:value-type="currency">
            <text:p>$89.0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20T21:38:42" calcext:value-type="date">
            <text:p>20/03/2026 21:38:42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DDYkQRhkM9CcvM08qpSrv0</text:p>
          </table:table-cell>
          <table:table-cell table:style-name="ce4" office:value-type="string" calcext:value-type="string">
            <text:p>pedrocaja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100" calcext:value-type="currency">
            <text:p>€100.00</text:p>
          </table:table-cell>
          <table:table-cell table:style-name="ce5" office:value-type="currency" office:currency="EUR" office:value="1.75" calcext:value-type="currency">
            <text:p>€1.75</text:p>
          </table:table-cell>
          <table:table-cell table:style-name="ce5" office:value-type="currency" office:currency="EUR" office:value="98.25" calcext:value-type="currency">
            <text:p>€98.25</text:p>
          </table:table-cell>
          <table:table-cell table:style-name="ce9" table:content-validation-name="val1" table:formula="of:=IF([.B88]=&quot;SALDO DEUDOR SEMANA ANTERIOR&quot;; 0; ABS([.H88])*0.2)" office:value-type="currency" office:currency="EUR" office:value="19.65" calcext:value-type="currency">
            <text:p>€19.65</text:p>
          </table:table-cell>
          <table:table-cell table:style-name="ce9" table:content-validation-name="val1" table:formula="of:=[.H88]-[.I88]" office:value-type="currency" office:currency="EUR" office:value="78.6" calcext:value-type="currency">
            <text:p>€78.60</text:p>
          </table:table-cell>
          <table:table-cell table:style-name="ce11" table:formula="of:=IF([.B88]=&quot;Stripe&quot;; INT([.A88]) + 12 - WEEKDAY([.A88]; 2); INT([.A88]) + CHOOSE(WEEKDAY([.A88]; 2); 4; 3; 2; 1; 7; 6; 5))" office:value-type="date" office:date-value="2026-03-27" calcext:value-type="date">
            <text:p>27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89.0147225368063" calcext:value-type="currency">
            <text:p>$89.0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21T15:04:49" calcext:value-type="date">
            <text:p>21/03/2026 15:04:49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DTt7QRhkM9CcvM0DY3pARt</text:p>
          </table:table-cell>
          <table:table-cell table:style-name="ce4" office:value-type="string" calcext:value-type="string">
            <text:p>pedrocaja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50" calcext:value-type="currency">
            <text:p>€50.00</text:p>
          </table:table-cell>
          <table:table-cell table:style-name="ce5" office:value-type="currency" office:currency="EUR" office:value="1" calcext:value-type="currency">
            <text:p>€1.00</text:p>
          </table:table-cell>
          <table:table-cell table:style-name="ce5" office:value-type="currency" office:currency="EUR" office:value="49" calcext:value-type="currency">
            <text:p>€49.00</text:p>
          </table:table-cell>
          <table:table-cell table:style-name="ce9" table:content-validation-name="val1" table:formula="of:=IF([.B89]=&quot;SALDO DEUDOR SEMANA ANTERIOR&quot;; 0; ABS([.H89])*0.2)" office:value-type="currency" office:currency="EUR" office:value="9.8" calcext:value-type="currency">
            <text:p>€9.80</text:p>
          </table:table-cell>
          <table:table-cell table:style-name="ce9" table:content-validation-name="val1" table:formula="of:=[.H89]-[.I89]" office:value-type="currency" office:currency="EUR" office:value="39.2" calcext:value-type="currency">
            <text:p>€39.20</text:p>
          </table:table-cell>
          <table:table-cell table:style-name="ce11" table:formula="of:=IF([.B89]=&quot;Stripe&quot;; INT([.A89]) + 12 - WEEKDAY([.A89]; 2); INT([.A89]) + CHOOSE(WEEKDAY([.A89]; 2); 4; 3; 2; 1; 7; 6; 5))" office:value-type="date" office:date-value="2026-03-27" calcext:value-type="date">
            <text:p>27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44.3941109852775" calcext:value-type="currency">
            <text:p>$44.3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24T16:52:10" calcext:value-type="date">
            <text:p>24/03/2026 16:52:10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EazeQRhkM9CcvM0XRbszqx</text:p>
          </table:table-cell>
          <table:table-cell table:style-name="ce4" office:value-type="string" calcext:value-type="string">
            <text:p>hamza.najjari7@gmail.com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currency" office:currency="EUR" office:value="30" calcext:value-type="currency">
            <text:p>€30.00</text:p>
          </table:table-cell>
          <table:table-cell table:style-name="ce5" office:value-type="currency" office:currency="EUR" office:value="0.7" calcext:value-type="currency">
            <text:p>€0.70</text:p>
          </table:table-cell>
          <table:table-cell table:style-name="ce5" office:value-type="currency" office:currency="EUR" office:value="29.3" calcext:value-type="currency">
            <text:p>€29.30</text:p>
          </table:table-cell>
          <table:table-cell table:style-name="ce9" table:content-validation-name="val1" table:formula="of:=IF([.B90]=&quot;SALDO DEUDOR SEMANA ANTERIOR&quot;; 0; ABS([.H90])*0.2)" office:value-type="currency" office:currency="EUR" office:value="5.86" calcext:value-type="currency">
            <text:p>€5.86</text:p>
          </table:table-cell>
          <table:table-cell table:style-name="ce9" table:content-validation-name="val1" table:formula="of:=[.H90]-[.I90]" office:value-type="currency" office:currency="EUR" office:value="23.44" calcext:value-type="currency">
            <text:p>€23.44</text:p>
          </table:table-cell>
          <table:table-cell table:style-name="ce11" table:formula="of:=IF([.B90]=&quot;Stripe&quot;; INT([.A90]) + 12 - WEEKDAY([.A90]; 2); INT([.A90]) + CHOOSE(WEEKDAY([.A90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26.6031097491772" calcext:value-type="currency">
            <text:p>$26.60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25T13:04:25" calcext:value-type="date">
            <text:p>25/03/2026 13:04:25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Miquel B.R.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40" calcext:value-type="currency">
            <text:p>€4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40" calcext:value-type="currency">
            <text:p>€40.00</text:p>
          </table:table-cell>
          <table:table-cell table:style-name="ce9" table:content-validation-name="val1" table:formula="of:=IF([.B91]=&quot;SALDO DEUDOR SEMANA ANTERIOR&quot;; 0; ABS([.H91])*0.2)" office:value-type="currency" office:currency="EUR" office:value="8" calcext:value-type="currency">
            <text:p>€8.00</text:p>
          </table:table-cell>
          <table:table-cell table:style-name="ce9" table:content-validation-name="val1" table:formula="of:=[.H91]-[.I91]" office:value-type="currency" office:currency="EUR" office:value="32" calcext:value-type="currency">
            <text:p>€32.00</text:p>
          </table:table-cell>
          <table:table-cell table:style-name="ce11" table:formula="of:=IF([.B91]=&quot;Stripe&quot;; INT([.A91]) + 12 - WEEKDAY([.A91]; 2); INT([.A91]) + CHOOSE(WEEKDAY([.A91]; 2); 4; 3; 2; 1; 7; 6; 5))" office:value-type="date" office:date-value="2026-03-27" calcext:value-type="date">
            <text:p>27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36.2400906002265" calcext:value-type="currency">
            <text:p>$36.2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25T13:50:32" calcext:value-type="date">
            <text:p>25/03/2026 13:50:32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Pedro N.O.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50" calcext:value-type="currency">
            <text:p>€5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50" calcext:value-type="currency">
            <text:p>€50.00</text:p>
          </table:table-cell>
          <table:table-cell table:style-name="ce9" table:content-validation-name="val1" table:formula="of:=IF([.B92]=&quot;SALDO DEUDOR SEMANA ANTERIOR&quot;; 0; ABS([.H92])*0.2)" office:value-type="currency" office:currency="EUR" office:value="10" calcext:value-type="currency">
            <text:p>€10.00</text:p>
          </table:table-cell>
          <table:table-cell table:style-name="ce9" table:content-validation-name="val1" table:formula="of:=[.H92]-[.I92]" office:value-type="currency" office:currency="EUR" office:value="40" calcext:value-type="currency">
            <text:p>€40.00</text:p>
          </table:table-cell>
          <table:table-cell table:style-name="ce11" table:formula="of:=IF([.B92]=&quot;Stripe&quot;; INT([.A92]) + 12 - WEEKDAY([.A92]; 2); INT([.A92]) + CHOOSE(WEEKDAY([.A92]; 2); 4; 3; 2; 1; 7; 6; 5))" office:value-type="date" office:date-value="2026-03-27" calcext:value-type="date">
            <text:p>27/03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45.3001132502831" calcext:value-type="currency">
            <text:p>$45.30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25T14:16:38" calcext:value-type="date">
            <text:p>25/03/2026 14:16:38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Ev2dQRhkM9CcvM0puFUhPp</text:p>
          </table:table-cell>
          <table:table-cell table:style-name="ce4" office:value-type="string" calcext:value-type="string">
            <text:p>jejimenezs@unal.edu.co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1" calcext:value-type="currency">
            <text:p>€1.00</text:p>
          </table:table-cell>
          <table:table-cell table:style-name="ce5" office:value-type="currency" office:currency="EUR" office:value="0.28" calcext:value-type="currency">
            <text:p>€0.28</text:p>
          </table:table-cell>
          <table:table-cell table:style-name="ce5" office:value-type="currency" office:currency="EUR" office:value="0.72" calcext:value-type="currency">
            <text:p>€0.72</text:p>
          </table:table-cell>
          <table:table-cell table:style-name="ce9" table:content-validation-name="val1" table:formula="of:=IF([.B93]=&quot;SALDO DEUDOR SEMANA ANTERIOR&quot;; 0; ABS([.H93])*0.2)" office:value-type="currency" office:currency="EUR" office:value="0.144" calcext:value-type="currency">
            <text:p>€0.14</text:p>
          </table:table-cell>
          <table:table-cell table:style-name="ce9" table:content-validation-name="val1" table:formula="of:=[.H93]-[.I93]" office:value-type="currency" office:currency="EUR" office:value="0.576" calcext:value-type="currency">
            <text:p>€0.58</text:p>
          </table:table-cell>
          <table:table-cell table:style-name="ce11" table:formula="of:=IF([.B93]=&quot;Stripe&quot;; INT([.A93]) + 12 - WEEKDAY([.A93]; 2); INT([.A93]) + CHOOSE(WEEKDAY([.A93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0.653728294177732" calcext:value-type="currency">
            <text:p>$0.6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25T14:17:59" calcext:value-type="date">
            <text:p>25/03/2026 14:17:59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Ev3vQRhkM9CcvM08i6oH8D</text:p>
          </table:table-cell>
          <table:table-cell table:style-name="ce4" office:value-type="string" calcext:value-type="string">
            <text:p>jejimenezs@unal.edu.co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60" calcext:value-type="currency">
            <text:p>€60.00</text:p>
          </table:table-cell>
          <table:table-cell table:style-name="ce5" office:value-type="currency" office:currency="EUR" office:value="2.2" calcext:value-type="currency">
            <text:p>€2.20</text:p>
          </table:table-cell>
          <table:table-cell table:style-name="ce5" office:value-type="currency" office:currency="EUR" office:value="57.8" calcext:value-type="currency">
            <text:p>€57.80</text:p>
          </table:table-cell>
          <table:table-cell table:style-name="ce9" table:content-validation-name="val1" table:formula="of:=IF([.B94]=&quot;SALDO DEUDOR SEMANA ANTERIOR&quot;; 0; ABS([.H94])*0.2)" office:value-type="currency" office:currency="EUR" office:value="11.56" calcext:value-type="currency">
            <text:p>€11.56</text:p>
          </table:table-cell>
          <table:table-cell table:style-name="ce9" table:content-validation-name="val1" table:formula="of:=[.H94]-[.I94]" office:value-type="currency" office:currency="EUR" office:value="46.24" calcext:value-type="currency">
            <text:p>€46.24</text:p>
          </table:table-cell>
          <table:table-cell table:style-name="ce11" table:formula="of:=IF([.B94]=&quot;Stripe&quot;; INT([.A94]) + 12 - WEEKDAY([.A94]; 2); INT([.A94]) + CHOOSE(WEEKDAY([.A94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52.4798547270457" calcext:value-type="currency">
            <text:p>$52.4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25T15:42:27" calcext:value-type="date">
            <text:p>25/03/2026 15:42:27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EwNjQRhkM9CcvM1zHWh6vC</text:p>
          </table:table-cell>
          <table:table-cell table:style-name="ce4" office:value-type="string" calcext:value-type="string">
            <text:p>josemanuel160392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40" calcext:value-type="currency">
            <text:p>€40.00</text:p>
          </table:table-cell>
          <table:table-cell table:style-name="ce5" office:value-type="currency" office:currency="EUR" office:value="0.85" calcext:value-type="currency">
            <text:p>€0.85</text:p>
          </table:table-cell>
          <table:table-cell table:style-name="ce5" office:value-type="currency" office:currency="EUR" office:value="39.15" calcext:value-type="currency">
            <text:p>€39.15</text:p>
          </table:table-cell>
          <table:table-cell table:style-name="ce9" table:content-validation-name="val1" table:formula="of:=IF([.B95]=&quot;SALDO DEUDOR SEMANA ANTERIOR&quot;; 0; ABS([.H95])*0.2)" office:value-type="currency" office:currency="EUR" office:value="7.83" calcext:value-type="currency">
            <text:p>€7.83</text:p>
          </table:table-cell>
          <table:table-cell table:style-name="ce9" table:content-validation-name="val1" table:formula="of:=[.H95]-[.I95]" office:value-type="currency" office:currency="EUR" office:value="31.32" calcext:value-type="currency">
            <text:p>€31.32</text:p>
          </table:table-cell>
          <table:table-cell table:style-name="ce11" table:formula="of:=IF([.B95]=&quot;Stripe&quot;; INT([.A95]) + 12 - WEEKDAY([.A95]; 2); INT([.A95]) + CHOOSE(WEEKDAY([.A95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35.5464759959142" calcext:value-type="currency">
            <text:p>$35.5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25T20:03:03" calcext:value-type="date">
            <text:p>25/03/2026 20:03:03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F0RUQRhkM9CcvM0TE8bSyD</text:p>
          </table:table-cell>
          <table:table-cell table:style-name="ce4" office:value-type="string" calcext:value-type="string">
            <text:p>nicobemaman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35" calcext:value-type="currency">
            <text:p>€35.00</text:p>
          </table:table-cell>
          <table:table-cell table:style-name="ce5" office:value-type="currency" office:currency="EUR" office:value="0.78" calcext:value-type="currency">
            <text:p>€0.78</text:p>
          </table:table-cell>
          <table:table-cell table:style-name="ce5" office:value-type="currency" office:currency="EUR" office:value="34.22" calcext:value-type="currency">
            <text:p>€34.22</text:p>
          </table:table-cell>
          <table:table-cell table:style-name="ce9" table:content-validation-name="val1" table:formula="of:=IF([.B96]=&quot;SALDO DEUDOR SEMANA ANTERIOR&quot;; 0; ABS([.H96])*0.2)" office:value-type="currency" office:currency="EUR" office:value="6.844" calcext:value-type="currency">
            <text:p>€6.84</text:p>
          </table:table-cell>
          <table:table-cell table:style-name="ce9" table:content-validation-name="val1" table:formula="of:=[.H96]-[.I96]" office:value-type="currency" office:currency="EUR" office:value="27.376" calcext:value-type="currency">
            <text:p>€27.38</text:p>
          </table:table-cell>
          <table:table-cell table:style-name="ce11" table:formula="of:=IF([.B96]=&quot;Stripe&quot;; INT([.A96]) + 12 - WEEKDAY([.A96]; 2); INT([.A96]) + CHOOSE(WEEKDAY([.A96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31.070253092725" calcext:value-type="currency">
            <text:p>$31.0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25T20:38:42" calcext:value-type="date">
            <text:p>25/03/2026 20:38:42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F10QQRhkM9CcvM0QIRv7CY</text:p>
          </table:table-cell>
          <table:table-cell table:style-name="ce4" office:value-type="string" calcext:value-type="string">
            <text:p>pedrocaja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50" calcext:value-type="currency">
            <text:p>€50.00</text:p>
          </table:table-cell>
          <table:table-cell table:style-name="ce5" office:value-type="currency" office:currency="EUR" office:value="1" calcext:value-type="currency">
            <text:p>€1.00</text:p>
          </table:table-cell>
          <table:table-cell table:style-name="ce5" office:value-type="currency" office:currency="EUR" office:value="49" calcext:value-type="currency">
            <text:p>€49.00</text:p>
          </table:table-cell>
          <table:table-cell table:style-name="ce9" table:content-validation-name="val1" table:formula="of:=IF([.B97]=&quot;SALDO DEUDOR SEMANA ANTERIOR&quot;; 0; ABS([.H97])*0.2)" office:value-type="currency" office:currency="EUR" office:value="9.8" calcext:value-type="currency">
            <text:p>€9.80</text:p>
          </table:table-cell>
          <table:table-cell table:style-name="ce9" table:content-validation-name="val1" table:formula="of:=[.H97]-[.I97]" office:value-type="currency" office:currency="EUR" office:value="39.2" calcext:value-type="currency">
            <text:p>€39.20</text:p>
          </table:table-cell>
          <table:table-cell table:style-name="ce11" table:formula="of:=IF([.B97]=&quot;Stripe&quot;; INT([.A97]) + 12 - WEEKDAY([.A97]; 2); INT([.A97]) + CHOOSE(WEEKDAY([.A97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44.4898422426512" calcext:value-type="currency">
            <text:p>$44.4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27T13:51:37" calcext:value-type="date">
            <text:p>27/03/2026 13:51:37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FdbIQRhkM9CcvM1wdtrI8W</text:p>
          </table:table-cell>
          <table:table-cell table:style-name="ce4" office:value-type="string" calcext:value-type="string">
            <text:p>valentinweber1992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25" calcext:value-type="currency">
            <text:p>€25.00</text:p>
          </table:table-cell>
          <table:table-cell table:style-name="ce5" office:value-type="currency" office:currency="EUR" office:value="1.5" calcext:value-type="currency">
            <text:p>€1.50</text:p>
          </table:table-cell>
          <table:table-cell table:style-name="ce5" office:value-type="currency" office:currency="EUR" office:value="25.72" calcext:value-type="currency">
            <text:p>€25.72</text:p>
          </table:table-cell>
          <table:table-cell table:style-name="ce9" table:content-validation-name="val1" table:formula="of:=IF([.B98]=&quot;SALDO DEUDOR SEMANA ANTERIOR&quot;; 0; ABS([.H98])*0.2)" office:value-type="currency" office:currency="EUR" office:value="5.144" calcext:value-type="currency">
            <text:p>€5.14</text:p>
          </table:table-cell>
          <table:table-cell table:style-name="ce9" table:content-validation-name="val1" table:formula="of:=[.H98]-[.I98]" office:value-type="currency" office:currency="EUR" office:value="20.576" calcext:value-type="currency">
            <text:p>€20.58</text:p>
          </table:table-cell>
          <table:table-cell table:style-name="ce11" table:formula="of:=IF([.B98]=&quot;Stripe&quot;; INT([.A98]) + 12 - WEEKDAY([.A98]; 2); INT([.A98]) + CHOOSE(WEEKDAY([.A98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23.3526273975712" calcext:value-type="currency">
            <text:p>$23.3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27T14:00:41" calcext:value-type="date">
            <text:p>27/03/2026 14:00:41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Fdk2QRhkM9CcvM0Udnn4jW</text:p>
          </table:table-cell>
          <table:table-cell table:style-name="ce4" office:value-type="string" calcext:value-type="string">
            <text:p>Marcus.Lachmann@gmx.net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40" calcext:value-type="currency">
            <text:p>€40.00</text:p>
          </table:table-cell>
          <table:table-cell table:style-name="ce5" office:value-type="currency" office:currency="EUR" office:value="2.25" calcext:value-type="currency">
            <text:p>€2.25</text:p>
          </table:table-cell>
          <table:table-cell table:style-name="ce5" office:value-type="currency" office:currency="EUR" office:value="41.31" calcext:value-type="currency">
            <text:p>€41.31</text:p>
          </table:table-cell>
          <table:table-cell table:style-name="ce9" table:content-validation-name="val1" table:formula="of:=IF([.B99]=&quot;SALDO DEUDOR SEMANA ANTERIOR&quot;; 0; ABS([.H99])*0.2)" office:value-type="currency" office:currency="EUR" office:value="8.262" calcext:value-type="currency">
            <text:p>€8.26</text:p>
          </table:table-cell>
          <table:table-cell table:style-name="ce9" table:content-validation-name="val1" table:formula="of:=[.H99]-[.I99]" office:value-type="currency" office:currency="EUR" office:value="33.048" calcext:value-type="currency">
            <text:p>€33.05</text:p>
          </table:table-cell>
          <table:table-cell table:style-name="ce11" table:formula="of:=IF([.B99]=&quot;Stripe&quot;; INT([.A99]) + 12 - WEEKDAY([.A99]; 2); INT([.A99]) + CHOOSE(WEEKDAY([.A99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37.5076608784474" calcext:value-type="currency">
            <text:p>$37.5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27T14:23:23" calcext:value-type="date">
            <text:p>27/03/2026 14:23:23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Lluis S.F.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50" calcext:value-type="currency">
            <text:p>€5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50" calcext:value-type="currency">
            <text:p>€50.00</text:p>
          </table:table-cell>
          <table:table-cell table:style-name="ce9" table:content-validation-name="val1" table:formula="of:=IF([.B100]=&quot;SALDO DEUDOR SEMANA ANTERIOR&quot;; 0; ABS([.H100])*0.2)" office:value-type="currency" office:currency="EUR" office:value="10" calcext:value-type="currency">
            <text:p>€10.00</text:p>
          </table:table-cell>
          <table:table-cell table:style-name="ce9" table:content-validation-name="val1" table:formula="of:=[.H100]-[.I100]" office:value-type="currency" office:currency="EUR" office:value="40" calcext:value-type="currency">
            <text:p>€40.00</text:p>
          </table:table-cell>
          <table:table-cell table:style-name="ce11" table:formula="of:=IF([.B100]=&quot;Stripe&quot;; INT([.A100]) + 12 - WEEKDAY([.A100]; 2); INT([.A100]) + CHOOSE(WEEKDAY([.A100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45.397798206787" calcext:value-type="currency">
            <text:p>$45.40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27T15:49:37" calcext:value-type="date">
            <text:p>27/03/2026 15:49:37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RUBEN M. F.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35" calcext:value-type="currency">
            <text:p>€35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35" calcext:value-type="currency">
            <text:p>€35.00</text:p>
          </table:table-cell>
          <table:table-cell table:style-name="ce9" table:content-validation-name="val1" table:formula="of:=IF([.B101]=&quot;SALDO DEUDOR SEMANA ANTERIOR&quot;; 0; ABS([.H101])*0.2)" office:value-type="currency" office:currency="EUR" office:value="7" calcext:value-type="currency">
            <text:p>€7.00</text:p>
          </table:table-cell>
          <table:table-cell table:style-name="ce9" table:content-validation-name="val1" table:formula="of:=[.H101]-[.I101]" office:value-type="currency" office:currency="EUR" office:value="28" calcext:value-type="currency">
            <text:p>€28.00</text:p>
          </table:table-cell>
          <table:table-cell table:style-name="ce11" table:formula="of:=IF([.B101]=&quot;Stripe&quot;; INT([.A101]) + 12 - WEEKDAY([.A101]; 2); INT([.A101]) + CHOOSE(WEEKDAY([.A101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31.7784587447509" calcext:value-type="currency">
            <text:p>$31.7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28T18:12:52" calcext:value-type="date">
            <text:p>28/03/2026 18:12:52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JAVIER S.G.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15" calcext:value-type="currency">
            <text:p>€15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15" calcext:value-type="currency">
            <text:p>€15.00</text:p>
          </table:table-cell>
          <table:table-cell table:style-name="ce9" table:content-validation-name="val1" table:formula="of:=IF([.B102]=&quot;SALDO DEUDOR SEMANA ANTERIOR&quot;; 0; ABS([.H102])*0.2)" office:value-type="currency" office:currency="EUR" office:value="3" calcext:value-type="currency">
            <text:p>€3.00</text:p>
          </table:table-cell>
          <table:table-cell table:style-name="ce9" table:content-validation-name="val1" table:formula="of:=[.H102]-[.I102]" office:value-type="currency" office:currency="EUR" office:value="12" calcext:value-type="currency">
            <text:p>€12.00</text:p>
          </table:table-cell>
          <table:table-cell table:style-name="ce11" table:formula="of:=IF([.B102]=&quot;Stripe&quot;; INT([.A102]) + 12 - WEEKDAY([.A102]; 2); INT([.A102]) + CHOOSE(WEEKDAY([.A102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3.6193394620361" calcext:value-type="currency">
            <text:p>$13.6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28T19:18:17" calcext:value-type="date">
            <text:p>28/03/2026 19:18:17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G5BFQRhkM9CcvM0p2MD5Hr</text:p>
          </table:table-cell>
          <table:table-cell table:style-name="ce4" office:value-type="string" calcext:value-type="string">
            <text:p>luisalonso44@outlook.es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currency" office:currency="EUR" office:value="1" calcext:value-type="currency">
            <text:p>€1.00</text:p>
          </table:table-cell>
          <table:table-cell table:style-name="ce5" office:value-type="currency" office:currency="EUR" office:value="0.27" calcext:value-type="currency">
            <text:p>€0.27</text:p>
          </table:table-cell>
          <table:table-cell table:style-name="ce5" office:value-type="currency" office:currency="EUR" office:value="0.73" calcext:value-type="currency">
            <text:p>€0.73</text:p>
          </table:table-cell>
          <table:table-cell table:style-name="ce9" table:content-validation-name="val1" table:formula="of:=IF([.B103]=&quot;SALDO DEUDOR SEMANA ANTERIOR&quot;; 0; ABS([.H103])*0.2)" office:value-type="currency" office:currency="EUR" office:value="0.146" calcext:value-type="currency">
            <text:p>€0.15</text:p>
          </table:table-cell>
          <table:table-cell table:style-name="ce9" table:content-validation-name="val1" table:formula="of:=[.H103]-[.I103]" office:value-type="currency" office:currency="EUR" office:value="0.584" calcext:value-type="currency">
            <text:p>€0.58</text:p>
          </table:table-cell>
          <table:table-cell table:style-name="ce11" table:formula="of:=IF([.B103]=&quot;Stripe&quot;; INT([.A103]) + 12 - WEEKDAY([.A103]; 2); INT([.A103]) + CHOOSE(WEEKDAY([.A103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0.66280785381909" calcext:value-type="currency">
            <text:p>$0.6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28T19:29:30" calcext:value-type="date">
            <text:p>28/03/2026 19:29:30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G5HKQRhkM9CcvM0y41cz39</text:p>
          </table:table-cell>
          <table:table-cell table:style-name="ce4" office:value-type="string" calcext:value-type="string">
            <text:p>luisalonso44@outlook.es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39" calcext:value-type="currency">
            <text:p>€39.00</text:p>
          </table:table-cell>
          <table:table-cell table:style-name="ce5" office:value-type="currency" office:currency="EUR" office:value="0.84" calcext:value-type="currency">
            <text:p>€0.84</text:p>
          </table:table-cell>
          <table:table-cell table:style-name="ce5" office:value-type="currency" office:currency="EUR" office:value="38.16" calcext:value-type="currency">
            <text:p>€38.16</text:p>
          </table:table-cell>
          <table:table-cell table:style-name="ce9" table:content-validation-name="val1" table:formula="of:=IF([.B104]=&quot;SALDO DEUDOR SEMANA ANTERIOR&quot;; 0; ABS([.H104])*0.2)" office:value-type="currency" office:currency="EUR" office:value="7.632" calcext:value-type="currency">
            <text:p>€7.63</text:p>
          </table:table-cell>
          <table:table-cell table:style-name="ce9" table:content-validation-name="val1" table:formula="of:=[.H104]-[.I104]" office:value-type="currency" office:currency="EUR" office:value="30.528" calcext:value-type="currency">
            <text:p>€30.53</text:p>
          </table:table-cell>
          <table:table-cell table:style-name="ce11" table:formula="of:=IF([.B104]=&quot;Stripe&quot;; INT([.A104]) + 12 - WEEKDAY([.A104]; 2); INT([.A104]) + CHOOSE(WEEKDAY([.A104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34.6475995914198" calcext:value-type="currency">
            <text:p>$34.6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28T22:06:15" calcext:value-type="date">
            <text:p>28/03/2026 22:06:15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G7nbQRhkM9CcvM0zkmLTMO</text:p>
          </table:table-cell>
          <table:table-cell table:style-name="ce4" office:value-type="string" calcext:value-type="string">
            <text:p>Michele.ange8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.55" calcext:value-type="currency">
            <text:p>€0.55</text:p>
          </table:table-cell>
          <table:table-cell table:style-name="ce5" office:value-type="currency" office:currency="EUR" office:value="19.45" calcext:value-type="currency">
            <text:p>€19.45</text:p>
          </table:table-cell>
          <table:table-cell table:style-name="ce9" table:content-validation-name="val1" table:formula="of:=IF([.B105]=&quot;SALDO DEUDOR SEMANA ANTERIOR&quot;; 0; ABS([.H105])*0.2)" office:value-type="currency" office:currency="EUR" office:value="3.89" calcext:value-type="currency">
            <text:p>€3.89</text:p>
          </table:table-cell>
          <table:table-cell table:style-name="ce9" table:content-validation-name="val1" table:formula="of:=[.H105]-[.I105]" office:value-type="currency" office:currency="EUR" office:value="15.56" calcext:value-type="currency">
            <text:p>€15.56</text:p>
          </table:table-cell>
          <table:table-cell table:style-name="ce11" table:formula="of:=IF([.B105]=&quot;Stripe&quot;; INT([.A105]) + 12 - WEEKDAY([.A105]; 2); INT([.A105]) + CHOOSE(WEEKDAY([.A105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7.6597435024401" calcext:value-type="currency">
            <text:p>$17.6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29T00:20:44" calcext:value-type="date">
            <text:p>29/03/2026 00:20:44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Joseph T.H.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currency" office:currency="EUR" office:value="30" calcext:value-type="currency">
            <text:p>€3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9" table:content-validation-name="val1" table:formula="of:=IF([.B106]=&quot;SALDO DEUDOR SEMANA ANTERIOR&quot;; 0; ABS([.H106])*0.2)" office:value-type="currency" office:currency="EUR" office:value="6" calcext:value-type="currency">
            <text:p>€6.00</text:p>
          </table:table-cell>
          <table:table-cell table:style-name="ce9" table:content-validation-name="val1" table:formula="of:=[.H106]-[.I106]" office:value-type="currency" office:currency="EUR" office:value="24" calcext:value-type="currency">
            <text:p>€24.00</text:p>
          </table:table-cell>
          <table:table-cell table:style-name="ce11" table:formula="of:=IF([.B106]=&quot;Stripe&quot;; INT([.A106]) + 12 - WEEKDAY([.A106]; 2); INT([.A106]) + CHOOSE(WEEKDAY([.A106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27.2386789240722" calcext:value-type="currency">
            <text:p>$27.2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29T07:23:00" calcext:value-type="date">
            <text:p>29/03/2026 07:23:00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Agustin R.R.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currency" office:currency="EUR" office:value="15" calcext:value-type="currency">
            <text:p>€15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15" calcext:value-type="currency">
            <text:p>€15.00</text:p>
          </table:table-cell>
          <table:table-cell table:style-name="ce9" table:content-validation-name="val1" table:formula="of:=IF([.B107]=&quot;SALDO DEUDOR SEMANA ANTERIOR&quot;; 0; ABS([.H107])*0.2)" office:value-type="currency" office:currency="EUR" office:value="3" calcext:value-type="currency">
            <text:p>€3.00</text:p>
          </table:table-cell>
          <table:table-cell table:style-name="ce9" table:content-validation-name="val1" table:formula="of:=[.H107]-[.I107]" office:value-type="currency" office:currency="EUR" office:value="12" calcext:value-type="currency">
            <text:p>€12.00</text:p>
          </table:table-cell>
          <table:table-cell table:style-name="ce11" table:formula="of:=IF([.B107]=&quot;Stripe&quot;; INT([.A107]) + 12 - WEEKDAY([.A107]; 2); INT([.A107]) + CHOOSE(WEEKDAY([.A107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3.6193394620361" calcext:value-type="currency">
            <text:p>$13.6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29T14:41:33" calcext:value-type="date">
            <text:p>29/03/2026 14:41:33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SERGI P.B.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currency" office:currency="EUR" office:value="15" calcext:value-type="currency">
            <text:p>€15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15" calcext:value-type="currency">
            <text:p>€15.00</text:p>
          </table:table-cell>
          <table:table-cell table:style-name="ce9" table:content-validation-name="val1" table:formula="of:=IF([.B108]=&quot;SALDO DEUDOR SEMANA ANTERIOR&quot;; 0; ABS([.H108])*0.2)" office:value-type="currency" office:currency="EUR" office:value="3" calcext:value-type="currency">
            <text:p>€3.00</text:p>
          </table:table-cell>
          <table:table-cell table:style-name="ce9" table:content-validation-name="val1" table:formula="of:=[.H108]-[.I108]" office:value-type="currency" office:currency="EUR" office:value="12" calcext:value-type="currency">
            <text:p>€12.00</text:p>
          </table:table-cell>
          <table:table-cell table:style-name="ce11" table:formula="of:=IF([.B108]=&quot;Stripe&quot;; INT([.A108]) + 12 - WEEKDAY([.A108]; 2); INT([.A108]) + CHOOSE(WEEKDAY([.A108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3.6193394620361" calcext:value-type="currency">
            <text:p>$13.6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30T09:47:11" calcext:value-type="date">
            <text:p>30/03/2026 09:47:11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Miguel Angel B.S.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currency" office:currency="EUR" office:value="15" calcext:value-type="currency">
            <text:p>€15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15" calcext:value-type="currency">
            <text:p>€15.00</text:p>
          </table:table-cell>
          <table:table-cell table:style-name="ce9" table:content-validation-name="val1" table:formula="of:=IF([.B109]=&quot;SALDO DEUDOR SEMANA ANTERIOR&quot;; 0; ABS([.H109])*0.2)" office:value-type="currency" office:currency="EUR" office:value="3" calcext:value-type="currency">
            <text:p>€3.00</text:p>
          </table:table-cell>
          <table:table-cell table:style-name="ce9" table:content-validation-name="val1" table:formula="of:=[.H109]-[.I109]" office:value-type="currency" office:currency="EUR" office:value="12" calcext:value-type="currency">
            <text:p>€12.00</text:p>
          </table:table-cell>
          <table:table-cell table:style-name="ce11" table:formula="of:=IF([.B109]=&quot;Stripe&quot;; INT([.A109]) + 12 - WEEKDAY([.A109]; 2); INT([.A109]) + CHOOSE(WEEKDAY([.A109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3.6193394620361" calcext:value-type="currency">
            <text:p>$13.6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30T12:34:10" calcext:value-type="date">
            <text:p>30/03/2026 12:34:10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Ismael C.M.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currency" office:currency="EUR" office:value="30" calcext:value-type="currency">
            <text:p>€3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9" table:content-validation-name="val1" table:formula="of:=IF([.B110]=&quot;SALDO DEUDOR SEMANA ANTERIOR&quot;; 0; ABS([.H110])*0.2)" office:value-type="currency" office:currency="EUR" office:value="6" calcext:value-type="currency">
            <text:p>€6.00</text:p>
          </table:table-cell>
          <table:table-cell table:style-name="ce9" table:content-validation-name="val1" table:formula="of:=[.H110]-[.I110]" office:value-type="currency" office:currency="EUR" office:value="24" calcext:value-type="currency">
            <text:p>€24.00</text:p>
          </table:table-cell>
          <table:table-cell table:style-name="ce11" table:formula="of:=IF([.B110]=&quot;Stripe&quot;; INT([.A110]) + 12 - WEEKDAY([.A110]; 2); INT([.A110]) + CHOOSE(WEEKDAY([.A110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27.2386789240722" calcext:value-type="currency">
            <text:p>$27.2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30T20:58:09" calcext:value-type="date">
            <text:p>30/03/2026 20:58:09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GojZQRhkM9CcvM1N2VhMgS</text:p>
          </table:table-cell>
          <table:table-cell table:style-name="ce4" office:value-type="string" calcext:value-type="string">
            <text:p>mm9148294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.9" calcext:value-type="currency">
            <text:p>€0.90</text:p>
          </table:table-cell>
          <table:table-cell table:style-name="ce5" office:value-type="currency" office:currency="EUR" office:value="19.1" calcext:value-type="currency">
            <text:p>€19.10</text:p>
          </table:table-cell>
          <table:table-cell table:style-name="ce9" table:content-validation-name="val1" table:formula="of:=IF([.B111]=&quot;SALDO DEUDOR SEMANA ANTERIOR&quot;; 0; ABS([.H111])*0.2)" office:value-type="currency" office:currency="EUR" office:value="3.82" calcext:value-type="currency">
            <text:p>€3.82</text:p>
          </table:table-cell>
          <table:table-cell table:style-name="ce9" table:content-validation-name="val1" table:formula="of:=[.H111]-[.I111]" office:value-type="currency" office:currency="EUR" office:value="15.28" calcext:value-type="currency">
            <text:p>€15.28</text:p>
          </table:table-cell>
          <table:table-cell table:style-name="ce11" table:formula="of:=IF([.B111]=&quot;Stripe&quot;; INT([.A111]) + 12 - WEEKDAY([.A111]; 2); INT([.A111]) + CHOOSE(WEEKDAY([.A111]; 2); 4; 3; 2; 1; 7; 6; 5))" office:value-type="date" office:date-value="2026-04-10" calcext:value-type="date">
            <text:p>10/04/2026</text:p>
          </table:table-cell>
          <table:table-cell table:style-name="ce14" table:content-validation-name="val2" office:value-type="string" calcext:value-type="string">
            <text:p>Pendiente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2" office:value-type="date" office:date-value="2026-03-31T12:20:07" calcext:value-type="date">
            <text:p>31/03/2026 12:20:07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Jorge C.F.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currency" office:currency="EUR" office:value="10" calcext:value-type="currency">
            <text:p>€1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10" calcext:value-type="currency">
            <text:p>€10.00</text:p>
          </table:table-cell>
          <table:table-cell table:style-name="ce9" table:content-validation-name="val1" table:formula="of:=IF([.B112]=&quot;SALDO DEUDOR SEMANA ANTERIOR&quot;; 0; ABS([.H112])*0.2)" office:value-type="currency" office:currency="EUR" office:value="2" calcext:value-type="currency">
            <text:p>€2.00</text:p>
          </table:table-cell>
          <table:table-cell table:style-name="ce9" table:content-validation-name="val1" table:formula="of:=[.H112]-[.I112]" office:value-type="currency" office:currency="EUR" office:value="8" calcext:value-type="currency">
            <text:p>€8.00</text:p>
          </table:table-cell>
          <table:table-cell table:style-name="ce11" table:formula="of:=IF([.B112]=&quot;Stripe&quot;; INT([.A112]) + 12 - WEEKDAY([.A112]; 2); INT([.A112]) + CHOOSE(WEEKDAY([.A112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9.07955964135739" calcext:value-type="currency">
            <text:p>$9.0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31T12:27:21" calcext:value-type="date">
            <text:p>31/03/2026 12:27:21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HECTOR A.O.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IF([.B113]=&quot;SALDO DEUDOR SEMANA ANTERIOR&quot;; 0; ABS([.H113])*0.2)" office:value-type="currency" office:currency="EUR" office:value="4" calcext:value-type="currency">
            <text:p>€4.00</text:p>
          </table:table-cell>
          <table:table-cell table:style-name="ce9" table:content-validation-name="val1" table:formula="of:=[.H113]-[.I113]" office:value-type="currency" office:currency="EUR" office:value="16" calcext:value-type="currency">
            <text:p>€16.00</text:p>
          </table:table-cell>
          <table:table-cell table:style-name="ce11" table:formula="of:=IF([.B113]=&quot;Stripe&quot;; INT([.A113]) + 12 - WEEKDAY([.A113]; 2); INT([.A113]) + CHOOSE(WEEKDAY([.A113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1591192827148" calcext:value-type="currency">
            <text:p>$18.1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31T13:39:32" calcext:value-type="date">
            <text:p>31/03/2026 13:39:32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Cibran L. V.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IF([.B114]=&quot;SALDO DEUDOR SEMANA ANTERIOR&quot;; 0; ABS([.H114])*0.2)" office:value-type="currency" office:currency="EUR" office:value="4" calcext:value-type="currency">
            <text:p>€4.00</text:p>
          </table:table-cell>
          <table:table-cell table:style-name="ce9" table:content-validation-name="val1" table:formula="of:=[.H114]-[.I114]" office:value-type="currency" office:currency="EUR" office:value="16" calcext:value-type="currency">
            <text:p>€16.00</text:p>
          </table:table-cell>
          <table:table-cell table:style-name="ce11" table:formula="of:=IF([.B114]=&quot;Stripe&quot;; INT([.A114]) + 12 - WEEKDAY([.A114]; 2); INT([.A114]) + CHOOSE(WEEKDAY([.A114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1591192827148" calcext:value-type="currency">
            <text:p>$18.1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31T13:55:24" calcext:value-type="date">
            <text:p>31/03/2026 13:55:24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H4d3QRhkM9CcvM0GodzHEb</text:p>
          </table:table-cell>
          <table:table-cell table:style-name="ce4" office:value-type="string" calcext:value-type="string">
            <text:p>fabian.holenweg.12@bluewin.ch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40" calcext:value-type="currency">
            <text:p>€40.00</text:p>
          </table:table-cell>
          <table:table-cell table:style-name="ce5" office:value-type="currency" office:currency="EUR" office:value="2.23" calcext:value-type="currency">
            <text:p>€2.23</text:p>
          </table:table-cell>
          <table:table-cell table:style-name="ce5" office:value-type="currency" office:currency="EUR" office:value="40.97" calcext:value-type="currency">
            <text:p>€40.97</text:p>
          </table:table-cell>
          <table:table-cell table:style-name="ce9" table:content-validation-name="val1" table:formula="of:=IF([.B115]=&quot;SALDO DEUDOR SEMANA ANTERIOR&quot;; 0; ABS([.H115])*0.2)" office:value-type="currency" office:currency="EUR" office:value="8.194" calcext:value-type="currency">
            <text:p>€8.19</text:p>
          </table:table-cell>
          <table:table-cell table:style-name="ce9" table:content-validation-name="val1" table:formula="of:=[.H115]-[.I115]" office:value-type="currency" office:currency="EUR" office:value="32.776" calcext:value-type="currency">
            <text:p>€32.78</text:p>
          </table:table-cell>
          <table:table-cell table:style-name="ce11" table:formula="of:=IF([.B115]=&quot;Stripe&quot;; INT([.A115]) + 12 - WEEKDAY([.A115]; 2); INT([.A115]) + CHOOSE(WEEKDAY([.A115]; 2); 4; 3; 2; 1; 7; 6; 5))" office:value-type="date" office:date-value="2026-04-10" calcext:value-type="date">
            <text:p>10/04/2026</text:p>
          </table:table-cell>
          <table:table-cell table:style-name="ce14" table:content-validation-name="val2" office:value-type="string" calcext:value-type="string">
            <text:p>Pendiente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2" office:value-type="date" office:date-value="2026-03-31T14:04:27" calcext:value-type="date">
            <text:p>31/03/2026 14:04:27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H4m4QRhkM9CcvM19wgBH5Y</text:p>
          </table:table-cell>
          <table:table-cell table:style-name="ce4" office:value-type="string" calcext:value-type="string">
            <text:p>ignacionoguera031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35" calcext:value-type="currency">
            <text:p>€35.00</text:p>
          </table:table-cell>
          <table:table-cell table:style-name="ce5" office:value-type="currency" office:currency="EUR" office:value="1.54" calcext:value-type="currency">
            <text:p>€1.54</text:p>
          </table:table-cell>
          <table:table-cell table:style-name="ce5" office:value-type="currency" office:currency="EUR" office:value="33.46" calcext:value-type="currency">
            <text:p>€33.46</text:p>
          </table:table-cell>
          <table:table-cell table:style-name="ce9" table:content-validation-name="val1" table:formula="of:=IF([.B116]=&quot;SALDO DEUDOR SEMANA ANTERIOR&quot;; 0; ABS([.H116])*0.2)" office:value-type="currency" office:currency="EUR" office:value="6.692" calcext:value-type="currency">
            <text:p>€6.69</text:p>
          </table:table-cell>
          <table:table-cell table:style-name="ce9" table:content-validation-name="val1" table:formula="of:=[.H116]-[.I116]" office:value-type="currency" office:currency="EUR" office:value="26.768" calcext:value-type="currency">
            <text:p>€26.77</text:p>
          </table:table-cell>
          <table:table-cell table:style-name="ce11" table:formula="of:=IF([.B116]=&quot;Stripe&quot;; INT([.A116]) + 12 - WEEKDAY([.A116]; 2); INT([.A116]) + CHOOSE(WEEKDAY([.A116]; 2); 4; 3; 2; 1; 7; 6; 5))" office:value-type="date" office:date-value="2026-04-10" calcext:value-type="date">
            <text:p>10/04/2026</text:p>
          </table:table-cell>
          <table:table-cell table:style-name="ce14" table:content-validation-name="val2" office:value-type="string" calcext:value-type="string">
            <text:p>Pendiente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2" office:value-type="date" office:date-value="2026-03-31T14:23:07" calcext:value-type="date">
            <text:p>31/03/2026 14:23:07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H53uQRhkM9CcvM1jyQGnMu</text:p>
          </table:table-cell>
          <table:table-cell table:style-name="ce4" office:value-type="string" calcext:value-type="string">
            <text:p>gionhaegi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55" calcext:value-type="currency">
            <text:p>€55.00</text:p>
          </table:table-cell>
          <table:table-cell table:style-name="ce5" office:value-type="currency" office:currency="EUR" office:value="2.99" calcext:value-type="currency">
            <text:p>€2.99</text:p>
          </table:table-cell>
          <table:table-cell table:style-name="ce5" office:value-type="currency" office:currency="EUR" office:value="56.5" calcext:value-type="currency">
            <text:p>€56.50</text:p>
          </table:table-cell>
          <table:table-cell table:style-name="ce9" table:content-validation-name="val1" table:formula="of:=IF([.B117]=&quot;SALDO DEUDOR SEMANA ANTERIOR&quot;; 0; ABS([.H117])*0.2)" office:value-type="currency" office:currency="EUR" office:value="11.3" calcext:value-type="currency">
            <text:p>€11.30</text:p>
          </table:table-cell>
          <table:table-cell table:style-name="ce9" table:content-validation-name="val1" table:formula="of:=[.H117]-[.I117]" office:value-type="currency" office:currency="EUR" office:value="45.2" calcext:value-type="currency">
            <text:p>€45.20</text:p>
          </table:table-cell>
          <table:table-cell table:style-name="ce11" table:formula="of:=IF([.B117]=&quot;Stripe&quot;; INT([.A117]) + 12 - WEEKDAY([.A117]; 2); INT([.A117]) + CHOOSE(WEEKDAY([.A117]; 2); 4; 3; 2; 1; 7; 6; 5))" office:value-type="date" office:date-value="2026-04-10" calcext:value-type="date">
            <text:p>10/04/2026</text:p>
          </table:table-cell>
          <table:table-cell table:style-name="ce14" table:content-validation-name="val2" office:value-type="string" calcext:value-type="string">
            <text:p>Pendiente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2" office:value-type="date" office:date-value="2026-03-31T15:03:07" calcext:value-type="date">
            <text:p>31/03/2026 15:03:07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Isaac M.G.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IF([.B118]=&quot;SALDO DEUDOR SEMANA ANTERIOR&quot;; 0; ABS([.H118])*0.2)" office:value-type="currency" office:currency="EUR" office:value="4" calcext:value-type="currency">
            <text:p>€4.00</text:p>
          </table:table-cell>
          <table:table-cell table:style-name="ce9" table:content-validation-name="val1" table:formula="of:=[.H118]-[.I118]" office:value-type="currency" office:currency="EUR" office:value="16" calcext:value-type="currency">
            <text:p>€16.00</text:p>
          </table:table-cell>
          <table:table-cell table:style-name="ce11" table:formula="of:=IF([.B118]=&quot;Stripe&quot;; INT([.A118]) + 12 - WEEKDAY([.A118]; 2); INT([.A118]) + CHOOSE(WEEKDAY([.A118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1591192827148" calcext:value-type="currency">
            <text:p>$18.1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31T15:52:24" calcext:value-type="date">
            <text:p>31/03/2026 15:52:24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Emilio M. A.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IF([.B119]=&quot;SALDO DEUDOR SEMANA ANTERIOR&quot;; 0; ABS([.H119])*0.2)" office:value-type="currency" office:currency="EUR" office:value="4" calcext:value-type="currency">
            <text:p>€4.00</text:p>
          </table:table-cell>
          <table:table-cell table:style-name="ce9" table:content-validation-name="val1" table:formula="of:=[.H119]-[.I119]" office:value-type="currency" office:currency="EUR" office:value="16" calcext:value-type="currency">
            <text:p>€16.00</text:p>
          </table:table-cell>
          <table:table-cell table:style-name="ce11" table:formula="of:=IF([.B119]=&quot;Stripe&quot;; INT([.A119]) + 12 - WEEKDAY([.A119]; 2); INT([.A119]) + CHOOSE(WEEKDAY([.A119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1591192827148" calcext:value-type="currency">
            <text:p>$18.1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3-31T22:33:23" calcext:value-type="date">
            <text:p>31/03/2026 22:33:23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Pablo P.A.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60" calcext:value-type="currency">
            <text:p>€6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60" calcext:value-type="currency">
            <text:p>€60.00</text:p>
          </table:table-cell>
          <table:table-cell table:style-name="ce9" table:content-validation-name="val1" table:formula="of:=IF([.B120]=&quot;SALDO DEUDOR SEMANA ANTERIOR&quot;; 0; ABS([.H120])*0.2)" office:value-type="currency" office:currency="EUR" office:value="12" calcext:value-type="currency">
            <text:p>€12.00</text:p>
          </table:table-cell>
          <table:table-cell table:style-name="ce9" table:content-validation-name="val1" table:formula="of:=[.H120]-[.I120]" office:value-type="currency" office:currency="EUR" office:value="48" calcext:value-type="currency">
            <text:p>€48.00</text:p>
          </table:table-cell>
          <table:table-cell table:style-name="ce11" table:formula="of:=IF([.B120]=&quot;Stripe&quot;; INT([.A120]) + 12 - WEEKDAY([.A120]; 2); INT([.A120]) + CHOOSE(WEEKDAY([.A120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54.4773578481444" calcext:value-type="currency">
            <text:p>$54.4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4-01T13:55:00" calcext:value-type="date">
            <text:p>01/04/2026 13:55:00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ANDRES L.K.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IF([.B121]=&quot;SALDO DEUDOR SEMANA ANTERIOR&quot;; 0; ABS([.H121])*0.2)" office:value-type="currency" office:currency="EUR" office:value="4" calcext:value-type="currency">
            <text:p>€4.00</text:p>
          </table:table-cell>
          <table:table-cell table:style-name="ce9" table:content-validation-name="val1" table:formula="of:=[.H121]-[.I121]" office:value-type="currency" office:currency="EUR" office:value="16" calcext:value-type="currency">
            <text:p>€16.00</text:p>
          </table:table-cell>
          <table:table-cell table:style-name="ce11" table:formula="of:=IF([.B121]=&quot;Stripe&quot;; INT([.A121]) + 12 - WEEKDAY([.A121]; 2); INT([.A121]) + CHOOSE(WEEKDAY([.A121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1591192827148" calcext:value-type="currency">
            <text:p>$18.1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4-01T14:05:37" calcext:value-type="date">
            <text:p>01/04/2026 14:05:37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Baltasar R.C.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IF([.B122]=&quot;SALDO DEUDOR SEMANA ANTERIOR&quot;; 0; ABS([.H122])*0.2)" office:value-type="currency" office:currency="EUR" office:value="4" calcext:value-type="currency">
            <text:p>€4.00</text:p>
          </table:table-cell>
          <table:table-cell table:style-name="ce9" table:content-validation-name="val1" table:formula="of:=[.H122]-[.I122]" office:value-type="currency" office:currency="EUR" office:value="16" calcext:value-type="currency">
            <text:p>€16.00</text:p>
          </table:table-cell>
          <table:table-cell table:style-name="ce11" table:formula="of:=IF([.B122]=&quot;Stripe&quot;; INT([.A122]) + 12 - WEEKDAY([.A122]; 2); INT([.A122]) + CHOOSE(WEEKDAY([.A122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8.1591192827148" calcext:value-type="currency">
            <text:p>$18.1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4-01T14:18:12" calcext:value-type="date">
            <text:p>01/04/2026 14:18:12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Cristian R.A.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40" calcext:value-type="currency">
            <text:p>€4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40" calcext:value-type="currency">
            <text:p>€40.00</text:p>
          </table:table-cell>
          <table:table-cell table:style-name="ce9" table:content-validation-name="val1" table:formula="of:=IF([.B123]=&quot;SALDO DEUDOR SEMANA ANTERIOR&quot;; 0; ABS([.H123])*0.2)" office:value-type="currency" office:currency="EUR" office:value="8" calcext:value-type="currency">
            <text:p>€8.00</text:p>
          </table:table-cell>
          <table:table-cell table:style-name="ce9" table:content-validation-name="val1" table:formula="of:=[.H123]-[.I123]" office:value-type="currency" office:currency="EUR" office:value="32" calcext:value-type="currency">
            <text:p>€32.00</text:p>
          </table:table-cell>
          <table:table-cell table:style-name="ce11" table:formula="of:=IF([.B123]=&quot;Stripe&quot;; INT([.A123]) + 12 - WEEKDAY([.A123]; 2); INT([.A123]) + CHOOSE(WEEKDAY([.A123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36.3182385654296" calcext:value-type="currency">
            <text:p>$36.3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4-01T14:40:01" calcext:value-type="date">
            <text:p>01/04/2026 14:40:01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HRo3QRhkM9CcvM1dj0M7Xo</text:p>
          </table:table-cell>
          <table:table-cell table:style-name="ce4" office:value-type="string" calcext:value-type="string">
            <text:p>yustegironesalberto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.55" calcext:value-type="currency">
            <text:p>€0.55</text:p>
          </table:table-cell>
          <table:table-cell table:style-name="ce5" office:value-type="currency" office:currency="EUR" office:value="19.45" calcext:value-type="currency">
            <text:p>€19.45</text:p>
          </table:table-cell>
          <table:table-cell table:style-name="ce9" table:content-validation-name="val1" table:formula="of:=IF([.B124]=&quot;SALDO DEUDOR SEMANA ANTERIOR&quot;; 0; ABS([.H124])*0.2)" office:value-type="currency" office:currency="EUR" office:value="3.89" calcext:value-type="currency">
            <text:p>€3.89</text:p>
          </table:table-cell>
          <table:table-cell table:style-name="ce9" table:content-validation-name="val1" table:formula="of:=[.H124]-[.I124]" office:value-type="currency" office:currency="EUR" office:value="15.56" calcext:value-type="currency">
            <text:p>€15.56</text:p>
          </table:table-cell>
          <table:table-cell table:style-name="ce11" table:formula="of:=IF([.B124]=&quot;Stripe&quot;; INT([.A124]) + 12 - WEEKDAY([.A124]; 2); INT([.A124]) + CHOOSE(WEEKDAY([.A124]; 2); 4; 3; 2; 1; 7; 6; 5))" office:value-type="date" office:date-value="2026-04-10" calcext:value-type="date">
            <text:p>10/04/2026</text:p>
          </table:table-cell>
          <table:table-cell table:style-name="ce14" table:content-validation-name="val2" office:value-type="string" calcext:value-type="string">
            <text:p>Pendiente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2" office:value-type="date" office:date-value="2026-04-01T15:32:42" calcext:value-type="date">
            <text:p>01/04/2026 15:32:42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VICTOR R.G.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currency" office:currency="EUR" office:value="12" calcext:value-type="currency">
            <text:p>€12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12" calcext:value-type="currency">
            <text:p>€12.00</text:p>
          </table:table-cell>
          <table:table-cell table:style-name="ce9" table:content-validation-name="val1" table:formula="of:=IF([.B125]=&quot;SALDO DEUDOR SEMANA ANTERIOR&quot;; 0; ABS([.H125])*0.2)" office:value-type="currency" office:currency="EUR" office:value="2.4" calcext:value-type="currency">
            <text:p>€2.40</text:p>
          </table:table-cell>
          <table:table-cell table:style-name="ce9" table:content-validation-name="val1" table:formula="of:=[.H125]-[.I125]" office:value-type="currency" office:currency="EUR" office:value="9.6" calcext:value-type="currency">
            <text:p>€9.60</text:p>
          </table:table-cell>
          <table:table-cell table:style-name="ce11" table:formula="of:=IF([.B125]=&quot;Stripe&quot;; INT([.A125]) + 12 - WEEKDAY([.A125]; 2); INT([.A125]) + CHOOSE(WEEKDAY([.A125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10.8954715696289" calcext:value-type="currency">
            <text:p>$10.90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4-01T15:45:51" calcext:value-type="date">
            <text:p>01/04/2026 15:45:51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ch_3THSpmQRhkM9CcvM0jsMgOEd</text:p>
          </table:table-cell>
          <table:table-cell table:style-name="ce4" office:value-type="string" calcext:value-type="string">
            <text:p>josemanuel160392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40" calcext:value-type="currency">
            <text:p>€40.00</text:p>
          </table:table-cell>
          <table:table-cell table:style-name="ce5" office:value-type="currency" office:currency="EUR" office:value="0.85" calcext:value-type="currency">
            <text:p>€0.85</text:p>
          </table:table-cell>
          <table:table-cell table:style-name="ce5" office:value-type="currency" office:currency="EUR" office:value="39.15" calcext:value-type="currency">
            <text:p>€39.15</text:p>
          </table:table-cell>
          <table:table-cell table:style-name="ce9" table:content-validation-name="val1" table:formula="of:=IF([.B126]=&quot;SALDO DEUDOR SEMANA ANTERIOR&quot;; 0; ABS([.H126])*0.2)" office:value-type="currency" office:currency="EUR" office:value="7.83" calcext:value-type="currency">
            <text:p>€7.83</text:p>
          </table:table-cell>
          <table:table-cell table:style-name="ce9" table:content-validation-name="val1" table:formula="of:=[.H126]-[.I126]" office:value-type="currency" office:currency="EUR" office:value="31.32" calcext:value-type="currency">
            <text:p>€31.32</text:p>
          </table:table-cell>
          <table:table-cell table:style-name="ce11" table:formula="of:=IF([.B126]=&quot;Stripe&quot;; INT([.A126]) + 12 - WEEKDAY([.A126]; 2); INT([.A126]) + CHOOSE(WEEKDAY([.A126]; 2); 4; 3; 2; 1; 7; 6; 5))" office:value-type="date" office:date-value="2026-04-10" calcext:value-type="date">
            <text:p>10/04/2026</text:p>
          </table:table-cell>
          <table:table-cell table:style-name="ce14" table:content-validation-name="val2" office:value-type="string" calcext:value-type="string">
            <text:p>Pendiente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2" office:value-type="date" office:date-value="2026-04-02T14:33:09" calcext:value-type="date">
            <text:p>02/04/2026 14:33:09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y_3THoAfQRhkM9CcvM1m3H9G8t</text:p>
          </table:table-cell>
          <table:table-cell table:style-name="ce4" office:value-type="string" calcext:value-type="string">
            <text:p>florian.ceni04@gmail.com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30" calcext:value-type="currency">
            <text:p>€30.00</text:p>
          </table:table-cell>
          <table:table-cell table:style-name="ce5" office:value-type="currency" office:currency="EUR" office:value="1.75" calcext:value-type="currency">
            <text:p>€1.75</text:p>
          </table:table-cell>
          <table:table-cell table:style-name="ce5" office:value-type="currency" office:currency="EUR" office:value="30.79" calcext:value-type="currency">
            <text:p>€30.79</text:p>
          </table:table-cell>
          <table:table-cell table:style-name="ce9" table:content-validation-name="val1" table:formula="of:=IF([.B127]=&quot;SALDO DEUDOR SEMANA ANTERIOR&quot;; 0; ABS([.H127])*0.2)" office:value-type="currency" office:currency="EUR" office:value="6.158" calcext:value-type="currency">
            <text:p>€6.16</text:p>
          </table:table-cell>
          <table:table-cell table:style-name="ce9" table:content-validation-name="val1" table:formula="of:=[.H127]-[.I127]" office:value-type="currency" office:currency="EUR" office:value="24.632" calcext:value-type="currency">
            <text:p>€24.63</text:p>
          </table:table-cell>
          <table:table-cell table:style-name="ce11" table:formula="of:=IF([.B127]=&quot;Stripe&quot;; INT([.A127]) + 12 - WEEKDAY([.A127]; 2); INT([.A127]) + CHOOSE(WEEKDAY([.A127]; 2); 4; 3; 2; 1; 7; 6; 5))" office:value-type="date" office:date-value="2026-04-10" calcext:value-type="date">
            <text:p>10/04/2026</text:p>
          </table:table-cell>
          <table:table-cell table:style-name="ce14" table:content-validation-name="val2" office:value-type="string" calcext:value-type="string">
            <text:p>Pendiente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2" office:value-type="date" office:date-value="2026-04-02T15:55:59" calcext:value-type="date">
            <text:p>02/04/2026 15:55:59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MIGUEL ANGEL.V.D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currency" office:currency="EUR" office:value="30" calcext:value-type="currency">
            <text:p>€3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9" table:content-validation-name="val1" table:formula="of:=IF([.B128]=&quot;SALDO DEUDOR SEMANA ANTERIOR&quot;; 0; ABS([.H128])*0.2)" office:value-type="currency" office:currency="EUR" office:value="6" calcext:value-type="currency">
            <text:p>€6.00</text:p>
          </table:table-cell>
          <table:table-cell table:style-name="ce9" table:content-validation-name="val1" table:formula="of:=[.H128]-[.I128]" office:value-type="currency" office:currency="EUR" office:value="24" calcext:value-type="currency">
            <text:p>€24.00</text:p>
          </table:table-cell>
          <table:table-cell table:style-name="ce11" table:formula="of:=IF([.B128]=&quot;Stripe&quot;; INT([.A128]) + 12 - WEEKDAY([.A128]; 2); INT([.A128]) + CHOOSE(WEEKDAY([.A128]; 2); 4; 3; 2; 1; 7; 6; 5))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27.2386789240722" calcext:value-type="currency">
            <text:p>$27.2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4-02T21:55:15" calcext:value-type="date">
            <text:p>02/04/2026 21:55:15</text:p>
          </table:table-cell>
          <table:table-cell table:style-name="ce4" office:value-type="string" calcext:value-type="string">
            <text:p>RESERVA ADS</text:p>
          </table:table-cell>
          <table:table-cell table:style-name="ce4" table:number-columns-repeated="2"/>
          <table:table-cell table:style-name="ce4" office:value-type="float" office:value="21" calcext:value-type="float">
            <text:p>21</text:p>
          </table:table-cell>
          <table:table-cell table:style-name="ce6" office:value-type="currency" office:currency="EUR" office:value="-150" calcext:value-type="currency">
            <text:p>-€15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-150" calcext:value-type="currency">
            <text:p>-€150.00</text:p>
          </table:table-cell>
          <table:table-cell table:style-name="ce9" table:content-validation-name="val1" office:value-type="currency" office:currency="EUR" office:value="0" calcext:value-type="currency">
            <text:p>€0.00</text:p>
          </table:table-cell>
          <table:table-cell table:style-name="ce9" table:content-validation-name="val1" table:formula="of:=[.H129]-[.I129]" office:value-type="currency" office:currency="EUR" office:value="-150" calcext:value-type="currency">
            <text:p>-€150.00</text:p>
          </table:table-cell>
          <table:table-cell table:style-name="ce11" office:value-type="date" office:date-value="2026-04-03" calcext:value-type="date">
            <text:p>03/04/2026</text:p>
          </table:table-cell>
          <table:table-cell table:style-name="ce14" table:content-validation-name="val2" office:value-type="string" calcext:value-type="string">
            <text:p>Procesado</text:p>
          </table:table-cell>
          <table:table-cell table:style-name="ce16" office:value-type="currency" office:currency="USD" office:value="-170.241743275451" calcext:value-type="currency">
            <text:p>-$170.2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6-04-03T12:08:35" calcext:value-type="date">
            <text:p>03/04/2026 12:08:35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Mario G.Q.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currency" office:currency="EUR" office:value="25" calcext:value-type="currency">
            <text:p>€25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5" calcext:value-type="currency">
            <text:p>€25.00</text:p>
          </table:table-cell>
          <table:table-cell table:style-name="ce9" table:content-validation-name="val1" table:formula="of:=IF([.B130]=&quot;SALDO DEUDOR SEMANA ANTERIOR&quot;; 0; ABS([.H130])*0.2)" office:value-type="currency" office:currency="EUR" office:value="5" calcext:value-type="currency">
            <text:p>€5.00</text:p>
          </table:table-cell>
          <table:table-cell table:style-name="ce9" table:content-validation-name="val1" table:formula="of:=[.H130]-[.I130]" office:value-type="currency" office:currency="EUR" office:value="20" calcext:value-type="currency">
            <text:p>€20.00</text:p>
          </table:table-cell>
          <table:table-cell table:style-name="ce11" table:formula="of:=IF([.B130]=&quot;Stripe&quot;; INT([.A130]) + 12 - WEEKDAY([.A130]; 2); INT([.A130]) + CHOOSE(WEEKDAY([.A130]; 2); 4; 3; 2; 1; 7; 6; 5))" office:value-type="date" office:date-value="2026-04-10" calcext:value-type="date">
            <text:p>10/04/2026</text:p>
          </table:table-cell>
          <table:table-cell table:style-name="ce14" table:content-validation-name="val2" office:value-type="string" calcext:value-type="string">
            <text:p>Pendiente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2" office:value-type="date" office:date-value="2026-04-03T14:02:06" calcext:value-type="date">
            <text:p>03/04/2026 14:02:06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ADRIA M.M.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IF([.B131]=&quot;SALDO DEUDOR SEMANA ANTERIOR&quot;; 0; ABS([.H131])*0.2)" office:value-type="currency" office:currency="EUR" office:value="4" calcext:value-type="currency">
            <text:p>€4.00</text:p>
          </table:table-cell>
          <table:table-cell table:style-name="ce9" table:content-validation-name="val1" table:formula="of:=[.H131]-[.I131]" office:value-type="currency" office:currency="EUR" office:value="16" calcext:value-type="currency">
            <text:p>€16.00</text:p>
          </table:table-cell>
          <table:table-cell table:style-name="ce11" table:formula="of:=IF([.B131]=&quot;Stripe&quot;; INT([.A131]) + 12 - WEEKDAY([.A131]; 2); INT([.A131]) + CHOOSE(WEEKDAY([.A131]; 2); 4; 3; 2; 1; 7; 6; 5))" office:value-type="date" office:date-value="2026-04-10" calcext:value-type="date">
            <text:p>10/04/2026</text:p>
          </table:table-cell>
          <table:table-cell table:style-name="ce14" table:content-validation-name="val2" office:value-type="string" calcext:value-type="string">
            <text:p>Pendiente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2" office:value-type="date" office:date-value="2026-04-04T18:43:19" calcext:value-type="date">
            <text:p>04/04/2026 18:43:19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Simon D.V.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currency" office:currency="EUR" office:value="30" calcext:value-type="currency">
            <text:p>€3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9" table:content-validation-name="val1" table:formula="of:=IF([.B132]=&quot;SALDO DEUDOR SEMANA ANTERIOR&quot;; 0; ABS([.H132])*0.2)" office:value-type="currency" office:currency="EUR" office:value="6" calcext:value-type="currency">
            <text:p>€6.00</text:p>
          </table:table-cell>
          <table:table-cell table:style-name="ce9" table:content-validation-name="val1" table:formula="of:=[.H132]-[.I132]" office:value-type="currency" office:currency="EUR" office:value="24" calcext:value-type="currency">
            <text:p>€24.00</text:p>
          </table:table-cell>
          <table:table-cell table:style-name="ce11" table:formula="of:=IF([.B132]=&quot;Stripe&quot;; INT([.A132]) + 12 - WEEKDAY([.A132]; 2); INT([.A132]) + CHOOSE(WEEKDAY([.A132]; 2); 4; 3; 2; 1; 7; 6; 5))" office:value-type="date" office:date-value="2026-04-10" calcext:value-type="date">
            <text:p>10/04/2026</text:p>
          </table:table-cell>
          <table:table-cell table:style-name="ce14" table:content-validation-name="val2" office:value-type="string" calcext:value-type="string">
            <text:p>Pendiente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2" office:value-type="date" office:date-value="2026-04-04T19:38:49" calcext:value-type="date">
            <text:p>04/04/2026 19:38:49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Aitor R.N.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currency" office:currency="EUR" office:value="30" calcext:value-type="currency">
            <text:p>€3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30" calcext:value-type="currency">
            <text:p>€30.00</text:p>
          </table:table-cell>
          <table:table-cell table:style-name="ce9" table:content-validation-name="val1" table:formula="of:=IF([.B133]=&quot;SALDO DEUDOR SEMANA ANTERIOR&quot;; 0; ABS([.H133])*0.2)" office:value-type="currency" office:currency="EUR" office:value="6" calcext:value-type="currency">
            <text:p>€6.00</text:p>
          </table:table-cell>
          <table:table-cell table:style-name="ce9" table:content-validation-name="val1" table:formula="of:=[.H133]-[.I133]" office:value-type="currency" office:currency="EUR" office:value="24" calcext:value-type="currency">
            <text:p>€24.00</text:p>
          </table:table-cell>
          <table:table-cell table:style-name="ce11" table:formula="of:=IF([.B133]=&quot;Stripe&quot;; INT([.A133]) + 12 - WEEKDAY([.A133]; 2); INT([.A133]) + CHOOSE(WEEKDAY([.A133]; 2); 4; 3; 2; 1; 7; 6; 5))" office:value-type="date" office:date-value="2026-04-10" calcext:value-type="date">
            <text:p>10/04/2026</text:p>
          </table:table-cell>
          <table:table-cell table:style-name="ce14" table:content-validation-name="val2" office:value-type="string" calcext:value-type="string">
            <text:p>Pendiente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2" office:value-type="date" office:date-value="2026-04-04T20:50:36" calcext:value-type="date">
            <text:p>04/04/2026 20:50:36</text:p>
          </table:table-cell>
          <table:table-cell table:style-name="ce4" office:value-type="string" calcext:value-type="string">
            <text:p>BIZUM</text:p>
          </table:table-cell>
          <table:table-cell table:style-name="ce4"/>
          <table:table-cell table:style-name="ce4" office:value-type="string" calcext:value-type="string">
            <text:p>Carlos G.D.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currency" office:currency="EUR" office:value="20" calcext:value-type="currency">
            <text:p>€20.00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office:value-type="currency" office:currency="EUR" office:value="20" calcext:value-type="currency">
            <text:p>€20.00</text:p>
          </table:table-cell>
          <table:table-cell table:style-name="ce9" table:content-validation-name="val1" table:formula="of:=IF([.B134]=&quot;SALDO DEUDOR SEMANA ANTERIOR&quot;; 0; ABS([.H134])*0.2)" office:value-type="currency" office:currency="EUR" office:value="4" calcext:value-type="currency">
            <text:p>€4.00</text:p>
          </table:table-cell>
          <table:table-cell table:style-name="ce9" table:content-validation-name="val1" table:formula="of:=[.H134]-[.I134]" office:value-type="currency" office:currency="EUR" office:value="16" calcext:value-type="currency">
            <text:p>€16.00</text:p>
          </table:table-cell>
          <table:table-cell table:style-name="ce11" table:formula="of:=IF([.B134]=&quot;Stripe&quot;; INT([.A134]) + 12 - WEEKDAY([.A134]; 2); INT([.A134]) + CHOOSE(WEEKDAY([.A134]; 2); 4; 3; 2; 1; 7; 6; 5))" office:value-type="date" office:date-value="2026-04-10" calcext:value-type="date">
            <text:p>10/04/2026</text:p>
          </table:table-cell>
          <table:table-cell table:style-name="ce14" table:content-validation-name="val2" office:value-type="string" calcext:value-type="string">
            <text:p>Pendiente</text:p>
          </table:table-cell>
          <table:table-cell table:style-name="ce16"/>
          <table:table-cell table:number-columns-repeated="1011"/>
        </table:table-row>
        <table:table-row table:style-name="ro2" table:number-rows-repeated="852">
          <table:table-cell table:number-columns-repeated="5"/>
          <table:table-cell table:style-name="ce7"/>
          <table:table-cell table:style-name="ce8" table:number-columns-repeated="2"/>
          <table:table-cell table:number-columns-repeated="2"/>
          <table:table-cell table:style-name="ce12"/>
          <table:table-cell/>
          <table:table-cell table:style-name="ce17"/>
          <table:table-cell table:number-columns-repeated="1011"/>
        </table:table-row>
        <table:table-row table:style-name="ro3" table:number-rows-repeated="104758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Transacciones.F1:Transacciones.F79 Transacciones.G1:Transacciones.H986">
            <calcext:condition calcext:apply-style-name="ConditionalStyle_6" calcext:value="formula-is(LEN(TRIM([.F1]))&gt;0)" calcext:base-cell-address="Transacciones.F1"/>
          </calcext:conditional-format>
          <calcext:conditional-format calcext:target-range-address="Transacciones.L2:Transacciones.L4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Semanal - Liquidacion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6" table:default-cell-style-name="Default"/>
        <table:table-column table:style-name="co17" table:default-cell-style-name="Default"/>
        <table:table-column table:style-name="co13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3" table:number-columns-repeated="1005" table:default-cell-style-name="Default"/>
        <table:table-row table:style-name="ro2">
          <table:table-cell table:style-name="ce20" office:value-type="string" calcext:value-type="string" table:number-columns-spanned="4" table:number-rows-spanned="1">
            <text:p>Liquidacion Viernes - Actual - Tabla Dinamica</text:p>
          </table:table-cell>
          <table:covered-table-cell table:number-columns-repeated="3"/>
          <table:table-cell>
            <draw:g table:end-cell-address="'Semanal - Liquidacion'.G4" table:end-x="61.43pt" table:end-y="12.73pt" draw:z-index="2" draw:name="Shape 2">
              <draw:custom-shape draw:name="Shape 9" draw:style-name="gr1" draw:text-style-name="P1" svg:width="161.97pt" svg:height="71.23pt" svg:x="39.74pt" svg:y="2.24pt">
                <text:p text:style-name="P3"><text:span text:style-name="T3"/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Shape 10" draw:style-name="gr2" draw:text-style-name="P2" svg:width="153.84pt" svg:height="63.21pt" svg:x="43.82pt" svg:y="6.24pt">
                <text:p text:style-name="P3"><text:span text:style-name="T3"/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Shape 11" draw:style-name="gr3" draw:text-style-name="P4" svg:width="148.82pt" svg:height="46.35pt" svg:x="46.32pt" svg:y="13.01pt">
                <text:p text:style-name="P3"><text:span text:style-name="T1">Ingresar EUR/USD </text:span><text:span text:style-name="T1"><text:line-break/></text:span><text:span text:style-name="T1">Kraken Rate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/>
          <table:table-cell>
            <draw:g table:end-cell-address="'Semanal - Liquidacion'.J4" table:end-x="45.27pt" table:end-y="13.46pt" draw:z-index="0" draw:name="Shape 2">
              <draw:custom-shape draw:name="Shape 3" draw:style-name="gr1" draw:text-style-name="P1" svg:width="197.01pt" svg:height="72.71pt" svg:x="57.43pt" svg:y="1.5pt">
                <text:p text:style-name="P3"><text:span text:style-name="T3"/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Shape 4" draw:style-name="gr2" draw:text-style-name="P2" svg:width="188.5pt" svg:height="64.86pt" svg:x="61.37pt" svg:y="5.47pt">
                <text:p text:style-name="P3"><text:span text:style-name="T3"/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Shape 5" draw:style-name="gr3" draw:text-style-name="P4" svg:width="200.21pt" svg:height="50.54pt" svg:x="55.5pt" svg:y="13.18pt">
                <text:p text:style-name="P3"><text:span text:style-name="T2">Actualizar Estados de</text:span><text:span text:style-name="T2"><text:line-break/></text:span><text:span text:style-name="T2">Liquidacion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3"/>
          <table:table-cell table:style-name="ce18" table:number-columns-repeated="3"/>
          <table:table-cell table:number-columns-repeated="1011"/>
        </table:table-row>
        <table:table-row table:style-name="ro1">
          <table:table-cell table:style-name="ce19" office:value-type="string" calcext:value-type="string">
            <text:p>ID Proveedor</text:p>
          </table:table-cell>
          <table:table-cell table:style-name="ce19" office:value-type="string" calcext:value-type="string">
            <text:p>SUM of A Liquidar</text:p>
          </table:table-cell>
          <table:table-cell table:style-name="ce19" office:value-type="string" calcext:value-type="string">
            <text:p>SUM of Honorarios</text:p>
          </table:table-cell>
          <table:table-cell table:style-name="ce19" office:value-type="string" calcext:value-type="string">
            <text:p>USDT a Enviar</text:p>
          </table:table-cell>
          <table:table-cell table:number-columns-repeated="6"/>
          <table:table-cell table:style-name="ce25" office:value-type="string" calcext:value-type="string">
            <text:p>Fecha</text:p>
          </table:table-cell>
          <table:table-cell table:style-name="ce25" office:value-type="string" calcext:value-type="string">
            <text:p>Rate</text:p>
          </table:table-cell>
          <table:table-cell table:style-name="ce25" office:value-type="string" calcext:value-type="string">
            <text:p>Column 1</text:p>
          </table:table-cell>
          <table:table-cell/>
          <table:table-cell table:style-name="ce25" office:value-type="string" calcext:value-type="string">
            <text:p>ID</text:p>
          </table:table-cell>
          <table:table-cell table:style-name="ce28" office:value-type="string" calcext:value-type="string">
            <text:p>Telegram</text:p>
          </table:table-cell>
          <table:table-cell table:style-name="ce25" office:value-type="string" calcext:value-type="string">
            <text:p>Email</text:p>
          </table:table-cell>
          <table:table-cell table:style-name="ce25" office:value-type="string" calcext:value-type="string">
            <text:p>Ultimo Extracto</text:p>
          </table:table-cell>
          <table:table-cell table:style-name="ce25" office:value-type="string" calcext:value-type="string">
            <text:p>Nombre Completo</text:p>
          </table:table-cell>
          <table:table-cell table:style-name="ce25" office:value-type="string" calcext:value-type="string">
            <text:p>CUIT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Grand Total</text:p>
          </table:table-cell>
          <table:table-cell table:style-name="ce19" table:number-columns-repeated="2"/>
          <table:table-cell table:style-name="ce17"/>
          <table:table-cell table:number-columns-repeated="6"/>
          <table:table-cell table:style-name="ce26" table:content-validation-name="val3" office:value-type="date" office:date-value="2026-02-27T11:24:40.559" calcext:value-type="date">
            <text:p>2/27/2026</text:p>
          </table:table-cell>
          <table:table-cell table:style-name="ce27" office:value-type="float" office:value="0.8626" calcext:value-type="float">
            <text:p>0.8626</text:p>
          </table:table-cell>
          <table:table-cell table:style-name="ce27"/>
          <table:table-cell/>
          <table:table-cell table:style-name="ce27" office:value-type="float" office:value="21" calcext:value-type="float">
            <text:p>21</text:p>
          </table:table-cell>
          <table:table-cell table:style-name="ce27" office:value-type="string" calcext:value-type="string">
            <text:p>Lilithmalon1</text:p>
          </table:table-cell>
          <table:table-cell table:style-name="ce27" office:value-type="string" calcext:value-type="string">
            <text:p>delahesy@hotmail.com</text:p>
          </table:table-cell>
          <table:table-cell table:style-name="ce29" office:value-type="date" office:date-value="2026-03-27" calcext:value-type="date">
            <text:p>27/03/2026</text:p>
          </table:table-cell>
          <table:table-cell table:style-name="ce27" office:value-type="string" calcext:value-type="string">
            <text:p>SOFIA YAEL DE LA HERA</text:p>
          </table:table-cell>
          <table:table-cell table:style-name="ce27" office:value-type="string" calcext:value-type="string">
            <text:p>20-36124425-8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7"/>
          <table:table-cell>
            <draw:g table:end-cell-address="'Semanal - Liquidacion'.H7" table:end-x="8.53pt" table:end-y="21.71pt" draw:z-index="1" draw:name="Shape 2">
              <draw:custom-shape draw:name="Shape 6" draw:style-name="gr1" draw:text-style-name="P1" svg:width="179.23pt" svg:height="71.97pt" svg:x="39.74pt" svg:y="13.49pt">
                <text:p text:style-name="P3"><text:span text:style-name="T3"/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Shape 7" draw:style-name="gr2" draw:text-style-name="P2" svg:width="172.74pt" svg:height="65.42pt" svg:x="42.97pt" svg:y="16.78pt">
                <text:p text:style-name="P3"><text:span text:style-name="T3"/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Shape 8" draw:style-name="gr3" draw:text-style-name="P4" svg:width="118.66pt" svg:height="32.46pt" svg:x="70.04pt" svg:y="33.36pt">
                <text:p text:style-name="P3"><text:span text:style-name="T2">Cargar Gasto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5"/>
          <table:table-cell table:style-name="ce26" table:content-validation-name="val3" office:value-type="date" office:date-value="2026-03-06T15:57:43.948" calcext:value-type="date">
            <text:p>3/6/2026</text:p>
          </table:table-cell>
          <table:table-cell table:style-name="ce27" office:value-type="float" office:value="0.8798" calcext:value-type="float">
            <text:p>0.8798</text:p>
          </table:table-cell>
          <table:table-cell table:style-name="ce27"/>
          <table:table-cell/>
          <table:table-cell table:style-name="ce27" office:value-type="float" office:value="42" calcext:value-type="float">
            <text:p>42</text:p>
          </table:table-cell>
          <table:table-cell table:style-name="ce27" office:value-type="string" calcext:value-type="string">
            <text:p>Ninaflores2023</text:p>
          </table:table-cell>
          <table:table-cell table:style-name="ce27" office:value-type="string" calcext:value-type="string">
            <text:p>Direnzoyanina@gmail.com</text:p>
          </table:table-cell>
          <table:table-cell table:style-name="ce29" office:value-type="date" office:date-value="2026-03-13" calcext:value-type="date">
            <text:p>13/03/2026</text:p>
          </table:table-cell>
          <table:table-cell table:style-name="ce27" office:value-type="string" calcext:value-type="string">
            <text:p>YANINA DIRENZO</text:p>
          </table:table-cell>
          <table:table-cell table:style-name="ce27" office:value-type="string" calcext:value-type="string">
            <text:p>27-35580246-4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17"/>
          <table:table-cell table:number-columns-repeated="6"/>
          <table:table-cell table:style-name="ce26" table:content-validation-name="val3" office:value-type="date" office:date-value="2026-03-13" calcext:value-type="date">
            <text:p>3/13/2026</text:p>
          </table:table-cell>
          <table:table-cell table:style-name="ce27" office:value-type="float" office:value="0.8898" calcext:value-type="float">
            <text:p>0.8898</text:p>
          </table:table-cell>
          <table:table-cell table:style-name="ce27"/>
          <table:table-cell/>
          <table:table-cell table:style-name="ce27" office:value-type="float" office:value="63" calcext:value-type="float">
            <text:p>63</text:p>
          </table:table-cell>
          <table:table-cell table:style-name="ce27" office:value-type="string" calcext:value-type="string">
            <text:p>AngieStone1</text:p>
          </table:table-cell>
          <table:table-cell table:style-name="ce27" office:value-type="string" calcext:value-type="string">
            <text:p>grenetiercarla@gmail.com</text:p>
          </table:table-cell>
          <table:table-cell table:style-name="ce29" office:value-type="date" office:date-value="2026-03-13" calcext:value-type="date">
            <text:p>13/03/2026</text:p>
          </table:table-cell>
          <table:table-cell table:style-name="ce27" office:value-type="string" calcext:value-type="string">
            <text:p>CARLA SOFIA GRENETIER</text:p>
          </table:table-cell>
          <table:table-cell table:style-name="ce27" office:value-type="string" calcext:value-type="string">
            <text:p>27-40685119-8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7"/>
          <table:table-cell table:number-columns-repeated="6"/>
          <table:table-cell table:style-name="ce26" table:content-validation-name="val3" office:value-type="date" office:date-value="2026-03-27T10:54:14.022" calcext:value-type="date">
            <text:p>3/27/2026</text:p>
          </table:table-cell>
          <table:table-cell table:style-name="ce27" office:value-type="float" office:value="0.883" calcext:value-type="float">
            <text:p>0.883</text:p>
          </table:table-cell>
          <table:table-cell table:style-name="ce27"/>
          <table:table-cell/>
          <table:table-cell table:style-name="ce27" office:value-type="float" office:value="36" calcext:value-type="float">
            <text:p>36</text:p>
          </table:table-cell>
          <table:table-cell table:style-name="ce27" office:value-type="string" calcext:value-type="string">
            <text:p>RTJonas</text:p>
          </table:table-cell>
          <table:table-cell table:style-name="ce27" office:value-type="string" calcext:value-type="string">
            <text:p>jonramireztor@gmail.com</text:p>
          </table:table-cell>
          <table:table-cell table:style-name="ce29" office:value-type="date" office:date-value="2026-03-13" calcext:value-type="date">
            <text:p>13/03/2026</text:p>
          </table:table-cell>
          <table:table-cell table:style-name="ce27"/>
          <table:table-cell table:number-columns-repeated="1005"/>
        </table:table-row>
        <table:table-row table:style-name="ro1">
          <table:table-cell table:number-columns-repeated="3"/>
          <table:table-cell table:style-name="ce17"/>
          <table:table-cell table:number-columns-repeated="6"/>
          <table:table-cell table:style-name="ce26" table:content-validation-name="val3" office:value-type="date" office:date-value="2026-04-03" calcext:value-type="date">
            <text:p>4/3/2026</text:p>
          </table:table-cell>
          <table:table-cell table:style-name="ce27" office:value-type="float" office:value="0.8811" calcext:value-type="float">
            <text:p>0.8811</text:p>
          </table:table-cell>
          <table:table-cell table:style-name="ce27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2">
          <table:table-cell table:style-name="ce18" office:value-type="string" calcext:value-type="string">
            <text:p>Esta tabla calcula lo que esta disponible para enviar hasta el dia de le fecha, teniendo </text:p>
          </table:table-cell>
          <table:table-cell table:number-columns-repeated="3"/>
          <table:table-cell>
            <draw:g table:end-cell-address="'Semanal - Liquidacion'.H13" table:end-x="8.53pt" table:end-y="10.46pt" draw:z-index="5" draw:name="Shape 2">
              <draw:custom-shape draw:name="Shape 18" draw:style-name="gr1" draw:text-style-name="P1" svg:width="167.22pt" svg:height="72.71pt" svg:x="51.76pt" svg:y="0.74pt">
                <text:p text:style-name="P3"><text:span text:style-name="T3"/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Shape 19" draw:style-name="gr2" draw:text-style-name="P2" svg:width="160.13pt" svg:height="65.54pt" svg:x="55.7pt" svg:y="4.34pt">
                <text:p text:style-name="P3"><text:span text:style-name="T3"/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Shape 20" draw:style-name="gr3" draw:text-style-name="P4" svg:width="149.87pt" svg:height="29.93pt" svg:x="60.43pt" svg:y="20.98pt">
                <text:p text:style-name="P5"><text:span text:style-name="T3">Generar Factura Mes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2"/>
          <table:table-cell>
            <draw:g table:end-cell-address="'Semanal - Liquidacion'.J13" table:end-x="14.17pt" table:end-y="8.25pt" draw:z-index="3" draw:name="Shape 2">
              <draw:custom-shape draw:name="Shape 12" draw:style-name="gr1" draw:text-style-name="P1" svg:width="146.07pt" svg:height="68.23pt" svg:x="6.83pt" svg:y="3pt">
                <text:p text:style-name="P3"><text:span text:style-name="T3"/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Shape 13" draw:style-name="gr2" draw:text-style-name="P2" svg:width="138.95pt" svg:height="61.09pt" svg:x="10.37pt" svg:y="6.58pt">
                <text:p text:style-name="P3"><text:span text:style-name="T3"/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Shape 14" draw:style-name="gr3" draw:text-style-name="P4" svg:width="149.22pt" svg:height="45.44pt" svg:x="5.24pt" svg:y="12.47pt">
                <text:p text:style-name="P3"><text:span text:style-name="T3">Extracto Periodo de </text:span><text:span text:style-name="T3"><text:line-break/></text:span><text:span text:style-name="T3">Liquidación por ID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como referencia, teniendo en cuenta que el dia de liquidacion es cada Viernes.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>
            <draw:g table:end-cell-address="'Semanal - Liquidacion'.H18" table:end-x="8.53pt" table:end-y="8.19pt" draw:z-index="6" draw:name="Shape 2">
              <draw:custom-shape draw:name="Shape 21" draw:style-name="gr1" draw:text-style-name="P1" svg:width="167.22pt" svg:height="72.71pt" svg:x="51.76pt" svg:y="14.26pt">
                <text:p text:style-name="P3"><text:span text:style-name="T3"/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Shape 22" draw:style-name="gr2" draw:text-style-name="P2" svg:width="160.13pt" svg:height="65.54pt" svg:x="55.7pt" svg:y="17.86pt">
                <text:p text:style-name="P3"><text:span text:style-name="T3"/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Shape 23" draw:style-name="gr3" draw:text-style-name="P4" svg:width="149.87pt" svg:height="45.44pt" svg:x="60.43pt" svg:y="25.8pt">
                <text:p text:style-name="P3"><text:span text:style-name="T3">Enviar eMail con Facturas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 table:number-columns-spanned="4" table:number-rows-spanned="1">
            <text:p>Acumulado a la fecha</text:p>
          </table:table-cell>
          <table:covered-table-cell table:number-columns-repeated="3"/>
          <table:table-cell table:number-columns-repeated="3"/>
          <table:table-cell>
            <draw:g table:end-cell-address="'Semanal - Liquidacion'.J18" table:end-x="16.44pt" table:end-y="5.95pt" draw:z-index="4" draw:name="Shape 2">
              <draw:custom-shape draw:name="Shape 15" draw:style-name="gr1" draw:text-style-name="P1" svg:width="152.99pt" svg:height="68.23pt" svg:x="3.74pt" svg:y="0.74pt">
                <text:p text:style-name="P3"><text:span text:style-name="T3"/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Shape 16" draw:style-name="gr2" draw:text-style-name="P2" svg:width="145.87pt" svg:height="60.29pt" svg:x="7.29pt" svg:y="4.71pt">
                <text:p text:style-name="P3"><text:span text:style-name="T3"/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Shape 17" draw:style-name="gr3" draw:text-style-name="P4" svg:width="134.84pt" svg:height="45.44pt" svg:x="12.81pt" svg:y="10.2pt">
                <text:p text:style-name="P3"><text:span text:style-name="T3">Enviar eMail con </text:span><text:span text:style-name="T3"><text:line-break/></text:span><text:span text:style-name="T3">Extracto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016"/>
        </table:table-row>
        <table:table-row table:style-name="ro2">
          <table:table-cell table:style-name="ce19" office:value-type="string" calcext:value-type="string">
            <text:p>ID Proveedor</text:p>
          </table:table-cell>
          <table:table-cell table:style-name="ce19" office:value-type="string" calcext:value-type="string">
            <text:p>SUM of A Liquidar</text:p>
          </table:table-cell>
          <table:table-cell table:style-name="ce19" office:value-type="string" calcext:value-type="string">
            <text:p>SUM of Honorarios</text:p>
          </table:table-cell>
          <table:table-cell table:style-name="ce19" office:value-type="string" calcext:value-type="string">
            <text:p>SUM of USDT a Enviar</text:p>
          </table:table-cell>
          <table:table-cell table:number-columns-repeated="1020"/>
        </table:table-row>
        <table:table-row table:style-name="ro2">
          <table:table-cell table:style-name="ce19" office:value-type="float" office:value="21" calcext:value-type="float">
            <text:p>21</text:p>
          </table:table-cell>
          <table:table-cell table:style-name="ce7" office:value-type="currency" office:currency="EUR" office:value="191.536" calcext:value-type="currency">
            <text:p>€191.54</text:p>
          </table:table-cell>
          <table:table-cell table:style-name="ce7" office:value-type="currency" office:currency="EUR" office:value="47.884" calcext:value-type="currency">
            <text:p>€47.88</text:p>
          </table:table-cell>
          <table:table-cell table:style-name="ce17" office:value-type="currency" office:currency="USD" office:value="0" calcext:value-type="currency">
            <text:p>$0.00</text:p>
          </table:table-cell>
          <table:table-cell table:number-columns-repeated="9"/>
          <table:table-cell table:style-name="ce18"/>
          <table:table-cell table:number-columns-repeated="1010"/>
        </table:table-row>
        <table:table-row table:style-name="ro2">
          <table:table-cell table:style-name="ce19" office:value-type="float" office:value="63" calcext:value-type="float">
            <text:p>63</text:p>
          </table:table-cell>
          <table:table-cell table:style-name="ce7" office:value-type="currency" office:currency="EUR" office:value="100" calcext:value-type="currency">
            <text:p>€100.00</text:p>
          </table:table-cell>
          <table:table-cell table:style-name="ce7" office:value-type="currency" office:currency="EUR" office:value="25" calcext:value-type="currency">
            <text:p>€25.00</text:p>
          </table:table-cell>
          <table:table-cell table:style-name="ce17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Grand Total</text:p>
          </table:table-cell>
          <table:table-cell table:style-name="ce7" office:value-type="currency" office:currency="EUR" office:value="291.536" calcext:value-type="currency">
            <text:p>€291.54</text:p>
          </table:table-cell>
          <table:table-cell table:style-name="ce7" office:value-type="currency" office:currency="EUR" office:value="72.884" calcext:value-type="currency">
            <text:p>€72.88</text:p>
          </table:table-cell>
          <table:table-cell table:style-name="ce17" office:value-type="currency" office:currency="USD" office:value="0" calcext:value-type="currency">
            <text:p>$0.00</text:p>
          </table:table-cell>
          <table:table-cell table:number-columns-repeated="10"/>
          <table:table-cell table:style-name="ce19" table:number-columns-repeated="4"/>
          <table:table-cell table:number-columns-repeated="1006"/>
        </table:table-row>
        <table:table-row table:style-name="ro2" table:number-rows-repeated="3">
          <table:table-cell table:number-columns-repeated="14"/>
          <table:table-cell table:style-name="ce19" table:number-columns-repeated="4"/>
          <table:table-cell table:number-columns-repeated="1006"/>
        </table:table-row>
        <table:table-row table:style-name="ro2">
          <table:table-cell table:style-name="ce18" office:value-type="string" calcext:value-type="string">
            <text:p>Esta tabla suma todos lo Pendiente hasta la fecha, es para que cada proveedor sepa</text:p>
          </table:table-cell>
          <table:table-cell table:number-columns-repeated="1023"/>
        </table:table-row>
        <table:table-row table:style-name="ro2">
          <table:table-cell table:style-name="ce18" office:value-type="string" calcext:value-type="string">
            <text:p>el dinero acumulado al dia de hoy y proximo a liquidar.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21" office:value-type="string" calcext:value-type="string">
            <text:p>1. Preparación de Datos (Pestaña "Transacciones")</text:p>
          </table:table-cell>
          <table:table-cell table:number-columns-repeated="1023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table:style-name="ce21" office:value-type="string" calcext:value-type="string">
            <text:p>Revisión: Asegúrate de que todas las transacciones de la semana tengan su ID Proveedor (la chica) y el Bruto cargado.</text:p>
          </table:table-cell>
          <table:table-cell table:number-columns-repeated="1023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table:style-name="ce21" office:value-type="string" calcext:value-type="string">
            <text:p>Estado: Verifica que las que quieres liquidar hoy estén en estado "Pendiente" en la columna Estado Liquidacion.</text:p>
          </table:table-cell>
          <table:table-cell table:number-columns-repeated="1023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table:style-name="ce21" office:value-type="string" calcext:value-type="string">
            <text:p>Fecha: La columna Fecha de Liquidacion debe tener la fecha de hoy (o una fecha pasada). El script no procesará fechas futuras.</text:p>
          </table:table-cell>
          <table:table-cell table:number-columns-repeated="1023"/>
        </table:table-row>
        <table:table-row table:style-name="ro2">
          <table:table-cell table:style-name="ce21" office:value-type="string" calcext:value-type="string">
            <text:p>2. Carga del Tipo de Cambio (Pestaña "Semanal - Liquidacion")</text:p>
          </table:table-cell>
          <table:table-cell table:number-columns-repeated="1023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table:style-name="ce21" office:value-type="string" calcext:value-type="string">
            <text:p>Antes de tocar ningún botón, ve a la tabla de la derecha (donde están las fechas y el Exchange Rate).</text:p>
          </table:table-cell>
          <table:table-cell table:number-columns-repeated="1023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table:style-name="ce21" office:value-type="string" calcext:value-type="string">
            <text:p>Busca la fecha de hoy y carga el Tipo de Cambio (EUR/USDT) que vas a usar para pagarles.</text:p>
          </table:table-cell>
          <table:table-cell table:number-columns-repeated="1023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table:style-name="ce23" office:value-type="string" calcext:value-type="string">
            <text:p>Nota: Si no lo pones, el script marcará "No especificado" en el historial.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3. Ejecución del Script (El botón "Liquidar")</text:p>
          </table:table-cell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3" office:value-type="string" calcext:value-type="string">
            <text:p>Haz clic en tu botón de "Cerrar Liquidación Semanal".</text:p>
          </table:table-cell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3" office:value-type="string" calcext:value-type="string">
            <text:p>¿Qué hace el script en este momento?</text:p>
          </table:table-cell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3" office:value-type="string" calcext:value-type="string">
            <text:p>Busca todo lo "Pendiente" hasta la fecha de hoy.</text:p>
          </table:table-cell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3" office:value-type="string" calcext:value-type="string">
            <text:p>Calcula los Honorarios Talaria y lo que le toca a cada chica (A Liquidar).</text:p>
          </table:table-cell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3" office:value-type="string" calcext:value-type="string">
            <text:p>Convierte el pago a USDT (truncando decimales para que no haya errores de envío).</text:p>
          </table:table-cell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3" office:value-type="string" calcext:value-type="string">
            <text:p>Cambia el estado de las transacciones a "Procesado" y les pone un candado (protección) para que no se borren por error.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4. Control y Registro (Pestaña "Historial de Pagos")</text:p>
          </table:table-cell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3" office:value-type="string" calcext:value-type="string">
            <text:p>Ve a la pestaña Historial de Pagos. Verás que se crearon filas nuevas agrupadas por cada ID de las chicas.</text:p>
          </table:table-cell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3" office:value-type="string" calcext:value-type="string">
            <text:p>Fila Verde (Control Fiscal): Al final de la lista, verás una fila resaltada en verde.</text:p>
          </table:table-cell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3" office:value-type="string" calcext:value-type="string">
            <text:p>Mira la columna G (Reserva IRPF). Ese es el monto exacto que debes apartar de tu cuenta (al BBVA o una subcuenta) para Hacienda.</text:p>
          </table:table-cell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3" office:value-type="string" calcext:value-type="string">
            <text:p>¡No lo toques! Ese dinero es tu ahorro para los impuestos trimestrales.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5. Pago Real (Kraken/Binance)</text:p>
          </table:table-cell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3" office:value-type="string" calcext:value-type="string">
            <text:p>Usa los montos de la columna G (USDT) del Historial para hacer los envíos reales a las billeteras de las chicas.</text:p>
          </table:table-cell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3" office:value-type="string" calcext:value-type="string">
            <text:p>Una vez enviado, puedes marcar esa fila en el historial con un color o un "OK" manual para saber que ya salió de tu cuenta.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⚠️ Reglas de Oro para no romper nada:</text:p>
          </table:table-cell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3" office:value-type="string" calcext:value-type="string">
            <text:p>No cambies los nombres de las pestañas: El código busca exactamente "Transacciones", "Historial de Pagos" y "Semanal - Liquidacion".</text:p>
          </table:table-cell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3" office:value-type="string" calcext:value-type="string">
            <text:p>No insertes columnas nuevas entre las que ya existen sin avisarme, porque el script "cuenta" las columnas para saber dónde escribir.</text:p>
          </table:table-cell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3" office:value-type="string" calcext:value-type="string">
            <text:p>NIE/TIE: Ahora que tienes PayPal Empresa, recuerda que si PayPal te pide factura, la Razón Social eres tú (tu nombre) y el Nombre Comercial es Talaria.</text:p>
          </table:table-cell>
          <table:table-cell table:number-columns-repeated="1023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storial de Pagos" table:style-name="ta3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3" table:number-columns-repeated="1016" table:default-cell-style-name="Default"/>
        <table:table-row table:style-name="ro1">
          <table:table-cell table:style-name="ce25" office:value-type="string" calcext:value-type="string">
            <text:p>Fecha de Liquidación</text:p>
          </table:table-cell>
          <table:table-cell table:style-name="ce25" office:value-type="string" calcext:value-type="string">
            <text:p>ID Proveedor</text:p>
          </table:table-cell>
          <table:table-cell table:style-name="ce30" office:value-type="string" calcext:value-type="string">
            <text:p>Bruto</text:p>
          </table:table-cell>
          <table:table-cell table:style-name="ce30" office:value-type="string" calcext:value-type="string">
            <text:p>Comisiones</text:p>
          </table:table-cell>
          <table:table-cell table:style-name="ce30" office:value-type="string" calcext:value-type="string">
            <text:p>Honorarios</text:p>
          </table:table-cell>
          <table:table-cell table:style-name="ce30" office:value-type="string" calcext:value-type="string">
            <text:p>A Liquidar</text:p>
          </table:table-cell>
          <table:table-cell table:style-name="ce32" office:value-type="string" calcext:value-type="string">
            <text:p>USDT Enviados</text:p>
          </table:table-cell>
          <table:table-cell table:style-name="ce25" office:value-type="string" calcext:value-type="string">
            <text:p>Exchange Rate</text:p>
          </table:table-cell>
          <table:table-cell table:style-name="ce30" office:value-type="string" calcext:value-type="string">
            <text:p>IRPF</text:p>
          </table:table-cell>
          <table:table-cell table:number-columns-repeated="1015"/>
        </table:table-row>
        <table:table-row table:style-name="ro1">
          <table:table-cell table:style-name="ce29" office:value-type="date" office:date-value="2026-04-03" calcext:value-type="date">
            <text:p>03/04/2026</text:p>
          </table:table-cell>
          <table:table-cell table:style-name="ce27" office:value-type="float" office:value="21" calcext:value-type="float">
            <text:p>21</text:p>
          </table:table-cell>
          <table:table-cell table:style-name="ce31" office:value-type="currency" office:currency="EUR" office:value="440" calcext:value-type="currency">
            <text:p>€440.00</text:p>
          </table:table-cell>
          <table:table-cell table:style-name="ce31" office:value-type="currency" office:currency="EUR" office:value="10.25" calcext:value-type="currency">
            <text:p>€10.25</text:p>
          </table:table-cell>
          <table:table-cell table:style-name="ce31" office:value-type="currency" office:currency="EUR" office:value="117.106" calcext:value-type="currency">
            <text:p>€117.11</text:p>
          </table:table-cell>
          <table:table-cell table:style-name="ce31" office:value-type="currency" office:currency="EUR" office:value="318.424" calcext:value-type="currency">
            <text:p>€318.42</text:p>
          </table:table-cell>
          <table:table-cell table:style-name="ce16" office:value-type="currency" office:currency="USD" office:value="361" calcext:value-type="currency">
            <text:p>$361.00</text:p>
          </table:table-cell>
          <table:table-cell table:style-name="ce27" office:value-type="float" office:value="0.8811" calcext:value-type="float">
            <text:p>0.8811</text:p>
          </table:table-cell>
          <table:table-cell table:style-name="ce31" office:value-type="currency" office:currency="EUR" office:value="23.4212" calcext:value-type="currency">
            <text:p>€23.42</text:p>
          </table:table-cell>
          <table:table-cell/>
          <table:table-cell table:style-name="ce33"/>
          <table:table-cell table:style-name="ce38" office:value-type="string" calcext:value-type="string">
            <text:p>Data</text:p>
          </table:table-cell>
          <table:table-cell table:style-name="ce44"/>
          <table:table-cell table:number-columns-repeated="1011"/>
        </table:table-row>
        <table:table-row table:style-name="ro1">
          <table:table-cell table:style-name="ce29" office:value-type="date" office:date-value="2026-03-27" calcext:value-type="date">
            <text:p>27/03/2026</text:p>
          </table:table-cell>
          <table:table-cell table:style-name="ce27" office:value-type="float" office:value="21" calcext:value-type="float">
            <text:p>21</text:p>
          </table:table-cell>
          <table:table-cell table:style-name="ce31" office:value-type="currency" office:currency="EUR" office:value="790" calcext:value-type="currency">
            <text:p>€790.00</text:p>
          </table:table-cell>
          <table:table-cell table:style-name="ce31" office:value-type="currency" office:currency="EUR" office:value="14.22" calcext:value-type="currency">
            <text:p>€14.22</text:p>
          </table:table-cell>
          <table:table-cell table:style-name="ce31" office:value-type="currency" office:currency="EUR" office:value="155.156" calcext:value-type="currency">
            <text:p>€155.16</text:p>
          </table:table-cell>
          <table:table-cell table:style-name="ce31" office:value-type="currency" office:currency="EUR" office:value="269.534" calcext:value-type="currency">
            <text:p>€269.53</text:p>
          </table:table-cell>
          <table:table-cell table:style-name="ce16" office:value-type="currency" office:currency="USD" office:value="305" calcext:value-type="currency">
            <text:p>$305.00</text:p>
          </table:table-cell>
          <table:table-cell table:style-name="ce27" office:value-type="float" office:value="0.883" calcext:value-type="float">
            <text:p>0.883</text:p>
          </table:table-cell>
          <table:table-cell table:style-name="ce31" office:value-type="currency" office:currency="EUR" office:value="31.0312" calcext:value-type="currency">
            <text:p>€31.03</text:p>
          </table:table-cell>
          <table:table-cell/>
          <table:table-cell table:style-name="ce34" office:value-type="string" calcext:value-type="string">
            <text:p>Fecha de Liquidación</text:p>
          </table:table-cell>
          <table:table-cell table:style-name="ce39" office:value-type="string" calcext:value-type="string">
            <text:p>Sum - IRPF</text:p>
          </table:table-cell>
          <table:table-cell table:style-name="ce45" office:value-type="string" calcext:value-type="string">
            <text:p>Sum - Honorarios</text:p>
          </table:table-cell>
          <table:table-cell table:number-columns-repeated="1011"/>
        </table:table-row>
        <table:table-row table:style-name="ro1">
          <table:table-cell table:style-name="ce29" office:value-type="date" office:date-value="2026-03-13" calcext:value-type="date">
            <text:p>13/03/2026</text:p>
          </table:table-cell>
          <table:table-cell table:style-name="ce27" office:value-type="float" office:value="21" calcext:value-type="float">
            <text:p>21</text:p>
          </table:table-cell>
          <table:table-cell table:style-name="ce31" office:value-type="currency" office:currency="EUR" office:value="232" calcext:value-type="currency">
            <text:p>€232.00</text:p>
          </table:table-cell>
          <table:table-cell table:style-name="ce31" office:value-type="currency" office:currency="EUR" office:value="8.06" calcext:value-type="currency">
            <text:p>€8.06</text:p>
          </table:table-cell>
          <table:table-cell table:style-name="ce31" office:value-type="currency" office:currency="EUR" office:value="44.788" calcext:value-type="currency">
            <text:p>€44.79</text:p>
          </table:table-cell>
          <table:table-cell table:style-name="ce31" office:value-type="currency" office:currency="EUR" office:value="179.152" calcext:value-type="currency">
            <text:p>€179.15</text:p>
          </table:table-cell>
          <table:table-cell table:style-name="ce16" office:value-type="currency" office:currency="USD" office:value="201" calcext:value-type="currency">
            <text:p>$201.00</text:p>
          </table:table-cell>
          <table:table-cell table:style-name="ce27" office:value-type="float" office:value="0.8898" calcext:value-type="float">
            <text:p>0.8898</text:p>
          </table:table-cell>
          <table:table-cell table:style-name="ce31" office:value-type="currency" office:currency="EUR" office:value="8.9576" calcext:value-type="currency">
            <text:p>€8.96</text:p>
          </table:table-cell>
          <table:table-cell/>
          <table:table-cell table:style-name="ce35" office:value-type="date" office:date-value="2026-02-27" calcext:value-type="date">
            <text:p>27/02/2026</text:p>
          </table:table-cell>
          <table:table-cell table:style-name="ce40" office:value-type="currency" office:currency="EUR" office:value="18.6" calcext:value-type="currency">
            <text:p>€18.60</text:p>
          </table:table-cell>
          <table:table-cell table:style-name="ce46" office:value-type="currency" office:currency="EUR" office:value="93" calcext:value-type="currency">
            <text:p>€93.00</text:p>
          </table:table-cell>
          <table:table-cell table:number-columns-repeated="1011"/>
        </table:table-row>
        <table:table-row table:style-name="ro1">
          <table:table-cell table:style-name="ce29" office:value-type="date" office:date-value="2026-03-06" calcext:value-type="date">
            <text:p>06/03/2026</text:p>
          </table:table-cell>
          <table:table-cell table:style-name="ce27" office:value-type="float" office:value="21" calcext:value-type="float">
            <text:p>21</text:p>
          </table:table-cell>
          <table:table-cell table:style-name="ce31" office:value-type="currency" office:currency="EUR" office:value="531" calcext:value-type="currency">
            <text:p>€531.00</text:p>
          </table:table-cell>
          <table:table-cell table:style-name="ce31" office:value-type="currency" office:currency="EUR" office:value="4.33" calcext:value-type="currency">
            <text:p>€4.33</text:p>
          </table:table-cell>
          <table:table-cell table:style-name="ce31" office:value-type="currency" office:currency="EUR" office:value="105.334" calcext:value-type="currency">
            <text:p>€105.33</text:p>
          </table:table-cell>
          <table:table-cell table:style-name="ce31" office:value-type="currency" office:currency="EUR" office:value="284.826" calcext:value-type="currency">
            <text:p>€284.83</text:p>
          </table:table-cell>
          <table:table-cell table:style-name="ce16" office:value-type="currency" office:currency="USD" office:value="323" calcext:value-type="currency">
            <text:p>$323.00</text:p>
          </table:table-cell>
          <table:table-cell table:style-name="ce27" office:value-type="float" office:value="0.8798" calcext:value-type="float">
            <text:p>0.8798</text:p>
          </table:table-cell>
          <table:table-cell table:style-name="ce31" table:formula="of:=0.2*[.E5]" office:value-type="currency" office:currency="EUR" office:value="21.0668" calcext:value-type="currency">
            <text:p>€21.07</text:p>
          </table:table-cell>
          <table:table-cell/>
          <table:table-cell table:style-name="ce36" office:value-type="date" office:date-value="2026-03-06" calcext:value-type="date">
            <text:p>06/03/2026</text:p>
          </table:table-cell>
          <table:table-cell table:style-name="ce41" office:value-type="currency" office:currency="EUR" office:value="30.6668" calcext:value-type="currency">
            <text:p>€30.67</text:p>
          </table:table-cell>
          <table:table-cell table:style-name="ce47" office:value-type="currency" office:currency="EUR" office:value="153.334" calcext:value-type="currency">
            <text:p>€153.33</text:p>
          </table:table-cell>
          <table:table-cell table:number-columns-repeated="1011"/>
        </table:table-row>
        <table:table-row table:style-name="ro1">
          <table:table-cell table:style-name="ce29" office:value-type="date" office:date-value="2026-02-27" calcext:value-type="date">
            <text:p>27/02/2026</text:p>
          </table:table-cell>
          <table:table-cell table:style-name="ce27" office:value-type="float" office:value="21" calcext:value-type="float">
            <text:p>21</text:p>
          </table:table-cell>
          <table:table-cell table:style-name="ce31" office:value-type="currency" office:currency="EUR" office:value="285" calcext:value-type="currency">
            <text:p>€285.00</text:p>
          </table:table-cell>
          <table:table-cell table:style-name="ce31" office:value-type="currency" office:currency="EUR" office:value="0" calcext:value-type="currency">
            <text:p>€0.00</text:p>
          </table:table-cell>
          <table:table-cell table:style-name="ce31" office:value-type="currency" office:currency="EUR" office:value="57" calcext:value-type="currency">
            <text:p>€57.00</text:p>
          </table:table-cell>
          <table:table-cell table:style-name="ce31" office:value-type="currency" office:currency="EUR" office:value="228" calcext:value-type="currency">
            <text:p>€228.00</text:p>
          </table:table-cell>
          <table:table-cell table:style-name="ce16" office:value-type="currency" office:currency="USD" office:value="264" calcext:value-type="currency">
            <text:p>$264.00</text:p>
          </table:table-cell>
          <table:table-cell table:style-name="ce27" office:value-type="float" office:value="0.8626" calcext:value-type="float">
            <text:p>0.8626</text:p>
          </table:table-cell>
          <table:table-cell table:style-name="ce31" table:formula="of:=0.2*[.E6]" office:value-type="currency" office:currency="EUR" office:value="11.4" calcext:value-type="currency">
            <text:p>€11.40</text:p>
          </table:table-cell>
          <table:table-cell/>
          <table:table-cell table:style-name="ce36" office:value-type="date" office:date-value="2026-03-13" calcext:value-type="date">
            <text:p>13/03/2026</text:p>
          </table:table-cell>
          <table:table-cell table:style-name="ce41" office:value-type="currency" office:currency="EUR" office:value="14.922" calcext:value-type="currency">
            <text:p>€14.92</text:p>
          </table:table-cell>
          <table:table-cell table:style-name="ce47" office:value-type="currency" office:currency="EUR" office:value="74.61" calcext:value-type="currency">
            <text:p>€74.61</text:p>
          </table:table-cell>
          <table:table-cell table:number-columns-repeated="1011"/>
        </table:table-row>
        <table:table-row table:style-name="ro1">
          <table:table-cell table:style-name="ce29" office:value-type="date" office:date-value="2026-04-03" calcext:value-type="date">
            <text:p>03/04/2026</text:p>
          </table:table-cell>
          <table:table-cell table:style-name="ce27" office:value-type="float" office:value="42" calcext:value-type="float">
            <text:p>42</text:p>
          </table:table-cell>
          <table:table-cell table:style-name="ce31" office:value-type="currency" office:currency="EUR" office:value="92" calcext:value-type="currency">
            <text:p>€92.00</text:p>
          </table:table-cell>
          <table:table-cell table:style-name="ce31" office:value-type="currency" office:currency="EUR" office:value="0" calcext:value-type="currency">
            <text:p>€0.00</text:p>
          </table:table-cell>
          <table:table-cell table:style-name="ce31" office:value-type="currency" office:currency="EUR" office:value="18.4" calcext:value-type="currency">
            <text:p>€18.40</text:p>
          </table:table-cell>
          <table:table-cell table:style-name="ce31" office:value-type="currency" office:currency="EUR" office:value="73.6" calcext:value-type="currency">
            <text:p>€73.60</text:p>
          </table:table-cell>
          <table:table-cell table:style-name="ce16" office:value-type="currency" office:currency="USD" office:value="83" calcext:value-type="currency">
            <text:p>$83.00</text:p>
          </table:table-cell>
          <table:table-cell table:style-name="ce27" office:value-type="float" office:value="0.8811" calcext:value-type="float">
            <text:p>0.8811</text:p>
          </table:table-cell>
          <table:table-cell table:style-name="ce31" office:value-type="currency" office:currency="EUR" office:value="3.68" calcext:value-type="currency">
            <text:p>€3.68</text:p>
          </table:table-cell>
          <table:table-cell/>
          <table:table-cell table:style-name="ce36" office:value-type="date" office:date-value="2026-03-27" calcext:value-type="date">
            <text:p>27/03/2026</text:p>
          </table:table-cell>
          <table:table-cell table:style-name="ce41" office:value-type="currency" office:currency="EUR" office:value="31.0312" calcext:value-type="currency">
            <text:p>€31.03</text:p>
          </table:table-cell>
          <table:table-cell table:style-name="ce47" office:value-type="currency" office:currency="EUR" office:value="155.156" calcext:value-type="currency">
            <text:p>€155.16</text:p>
          </table:table-cell>
          <table:table-cell table:number-columns-repeated="1011"/>
        </table:table-row>
        <table:table-row table:style-name="ro1">
          <table:table-cell table:style-name="ce29" office:value-type="date" office:date-value="2026-03-13" calcext:value-type="date">
            <text:p>13/03/2026</text:p>
          </table:table-cell>
          <table:table-cell table:style-name="ce27" office:value-type="float" office:value="42" calcext:value-type="float">
            <text:p>42</text:p>
          </table:table-cell>
          <table:table-cell table:style-name="ce31" office:value-type="currency" office:currency="EUR" office:value="101" calcext:value-type="currency">
            <text:p>€101.00</text:p>
          </table:table-cell>
          <table:table-cell table:style-name="ce31" office:value-type="currency" office:currency="EUR" office:value="1.89" calcext:value-type="currency">
            <text:p>€1.89</text:p>
          </table:table-cell>
          <table:table-cell table:style-name="ce31" office:value-type="currency" office:currency="EUR" office:value="19.822" calcext:value-type="currency">
            <text:p>€19.82</text:p>
          </table:table-cell>
          <table:table-cell table:style-name="ce31" office:value-type="currency" office:currency="EUR" office:value="79.288" calcext:value-type="currency">
            <text:p>€79.29</text:p>
          </table:table-cell>
          <table:table-cell table:style-name="ce16" office:value-type="currency" office:currency="USD" office:value="89" calcext:value-type="currency">
            <text:p>$89.00</text:p>
          </table:table-cell>
          <table:table-cell table:style-name="ce27" office:value-type="float" office:value="0.8898" calcext:value-type="float">
            <text:p>0.8898</text:p>
          </table:table-cell>
          <table:table-cell table:style-name="ce31" office:value-type="currency" office:currency="EUR" office:value="3.9644" calcext:value-type="currency">
            <text:p>€3.96</text:p>
          </table:table-cell>
          <table:table-cell/>
          <table:table-cell table:style-name="ce36" office:value-type="date" office:date-value="2026-04-03" calcext:value-type="date">
            <text:p>03/04/2026</text:p>
          </table:table-cell>
          <table:table-cell table:style-name="ce41" office:value-type="currency" office:currency="EUR" office:value="32.5024" calcext:value-type="currency">
            <text:p>€32.50</text:p>
          </table:table-cell>
          <table:table-cell table:style-name="ce47" office:value-type="currency" office:currency="EUR" office:value="162.512" calcext:value-type="currency">
            <text:p>€162.51</text:p>
          </table:table-cell>
          <table:table-cell table:number-columns-repeated="1011"/>
        </table:table-row>
        <table:table-row table:style-name="ro1">
          <table:table-cell table:style-name="ce29" office:value-type="date" office:date-value="2026-03-06" calcext:value-type="date">
            <text:p>06/03/2026</text:p>
          </table:table-cell>
          <table:table-cell table:style-name="ce27" office:value-type="float" office:value="42" calcext:value-type="float">
            <text:p>42</text:p>
          </table:table-cell>
          <table:table-cell table:style-name="ce31" office:value-type="currency" office:currency="EUR" office:value="75" calcext:value-type="currency">
            <text:p>€75.00</text:p>
          </table:table-cell>
          <table:table-cell table:style-name="ce31" office:value-type="currency" office:currency="EUR" office:value="0" calcext:value-type="currency">
            <text:p>€0.00</text:p>
          </table:table-cell>
          <table:table-cell table:style-name="ce31" office:value-type="currency" office:currency="EUR" office:value="15" calcext:value-type="currency">
            <text:p>€15.00</text:p>
          </table:table-cell>
          <table:table-cell table:style-name="ce31" office:value-type="currency" office:currency="EUR" office:value="60" calcext:value-type="currency">
            <text:p>€60.00</text:p>
          </table:table-cell>
          <table:table-cell table:style-name="ce16" office:value-type="currency" office:currency="USD" office:value="68" calcext:value-type="currency">
            <text:p>$68.00</text:p>
          </table:table-cell>
          <table:table-cell table:style-name="ce27" office:value-type="float" office:value="0.8798" calcext:value-type="float">
            <text:p>0.8798</text:p>
          </table:table-cell>
          <table:table-cell table:style-name="ce31" table:formula="of:=0.2*[.E9]" office:value-type="currency" office:currency="EUR" office:value="3" calcext:value-type="currency">
            <text:p>€3.00</text:p>
          </table:table-cell>
          <table:table-cell/>
          <table:table-cell table:style-name="ce36" office:value-type="string" calcext:value-type="string">
            <text:p>(empty)</text:p>
          </table:table-cell>
          <table:table-cell table:style-name="ce42"/>
          <table:table-cell table:style-name="ce48"/>
          <table:table-cell table:number-columns-repeated="1011"/>
        </table:table-row>
        <table:table-row table:style-name="ro1">
          <table:table-cell table:style-name="ce29" office:value-type="date" office:date-value="2026-02-27" calcext:value-type="date">
            <text:p>27/02/2026</text:p>
          </table:table-cell>
          <table:table-cell table:style-name="ce27" office:value-type="float" office:value="42" calcext:value-type="float">
            <text:p>42</text:p>
          </table:table-cell>
          <table:table-cell table:style-name="ce31" office:value-type="currency" office:currency="EUR" office:value="75" calcext:value-type="currency">
            <text:p>€75.00</text:p>
          </table:table-cell>
          <table:table-cell table:style-name="ce31" office:value-type="currency" office:currency="EUR" office:value="0" calcext:value-type="currency">
            <text:p>€0.00</text:p>
          </table:table-cell>
          <table:table-cell table:style-name="ce31" office:value-type="currency" office:currency="EUR" office:value="15" calcext:value-type="currency">
            <text:p>€15.00</text:p>
          </table:table-cell>
          <table:table-cell table:style-name="ce31" office:value-type="currency" office:currency="EUR" office:value="60" calcext:value-type="currency">
            <text:p>€60.00</text:p>
          </table:table-cell>
          <table:table-cell table:style-name="ce16" office:value-type="currency" office:currency="USD" office:value="69" calcext:value-type="currency">
            <text:p>$69.00</text:p>
          </table:table-cell>
          <table:table-cell table:style-name="ce27" office:value-type="float" office:value="0.8626" calcext:value-type="float">
            <text:p>0.8626</text:p>
          </table:table-cell>
          <table:table-cell table:style-name="ce31" table:formula="of:=0.2*[.E10]" office:value-type="currency" office:currency="EUR" office:value="3" calcext:value-type="currency">
            <text:p>€3.00</text:p>
          </table:table-cell>
          <table:table-cell/>
          <table:table-cell table:style-name="ce37" office:value-type="string" calcext:value-type="string">
            <text:p>Total Result</text:p>
          </table:table-cell>
          <table:table-cell table:style-name="ce43" office:value-type="currency" office:currency="EUR" office:value="127.7224" calcext:value-type="currency">
            <text:p>€127.72</text:p>
          </table:table-cell>
          <table:table-cell table:style-name="ce49" office:value-type="currency" office:currency="EUR" office:value="638.612" calcext:value-type="currency">
            <text:p>€638.61</text:p>
          </table:table-cell>
          <table:table-cell table:number-columns-repeated="1011"/>
        </table:table-row>
        <table:table-row table:style-name="ro1">
          <table:table-cell table:style-name="ce29" office:value-type="date" office:date-value="2026-04-03" calcext:value-type="date">
            <text:p>03/04/2026</text:p>
          </table:table-cell>
          <table:table-cell table:style-name="ce27" office:value-type="float" office:value="63" calcext:value-type="float">
            <text:p>63</text:p>
          </table:table-cell>
          <table:table-cell table:style-name="ce31" office:value-type="currency" office:currency="EUR" office:value="136" calcext:value-type="currency">
            <text:p>€136.00</text:p>
          </table:table-cell>
          <table:table-cell table:style-name="ce31" office:value-type="currency" office:currency="EUR" office:value="0.97" calcext:value-type="currency">
            <text:p>€0.97</text:p>
          </table:table-cell>
          <table:table-cell table:style-name="ce31" office:value-type="currency" office:currency="EUR" office:value="27.006" calcext:value-type="currency">
            <text:p>€27.01</text:p>
          </table:table-cell>
          <table:table-cell table:style-name="ce31" office:value-type="currency" office:currency="EUR" office:value="108.024" calcext:value-type="currency">
            <text:p>€108.02</text:p>
          </table:table-cell>
          <table:table-cell table:style-name="ce16" office:value-type="currency" office:currency="USD" office:value="122" calcext:value-type="currency">
            <text:p>$122.00</text:p>
          </table:table-cell>
          <table:table-cell table:style-name="ce27" office:value-type="float" office:value="0.8811" calcext:value-type="float">
            <text:p>0.8811</text:p>
          </table:table-cell>
          <table:table-cell table:style-name="ce31" office:value-type="currency" office:currency="EUR" office:value="5.4012" calcext:value-type="currency">
            <text:p>€5.40</text:p>
          </table:table-cell>
          <table:table-cell table:number-columns-repeated="1015"/>
        </table:table-row>
        <table:table-row table:style-name="ro1">
          <table:table-cell table:style-name="ce29" office:value-type="date" office:date-value="2026-03-13" calcext:value-type="date">
            <text:p>13/03/2026</text:p>
          </table:table-cell>
          <table:table-cell table:style-name="ce27" office:value-type="float" office:value="63" calcext:value-type="float">
            <text:p>63</text:p>
          </table:table-cell>
          <table:table-cell table:style-name="ce31" office:value-type="currency" office:currency="EUR" office:value="50" calcext:value-type="currency">
            <text:p>€50.00</text:p>
          </table:table-cell>
          <table:table-cell table:style-name="ce31" office:value-type="currency" office:currency="EUR" office:value="0" calcext:value-type="currency">
            <text:p>€0.00</text:p>
          </table:table-cell>
          <table:table-cell table:style-name="ce31" office:value-type="currency" office:currency="EUR" office:value="10" calcext:value-type="currency">
            <text:p>€10.00</text:p>
          </table:table-cell>
          <table:table-cell table:style-name="ce31" office:value-type="currency" office:currency="EUR" office:value="40" calcext:value-type="currency">
            <text:p>€40.00</text:p>
          </table:table-cell>
          <table:table-cell table:style-name="ce16" office:value-type="currency" office:currency="USD" office:value="44" calcext:value-type="currency">
            <text:p>$44.00</text:p>
          </table:table-cell>
          <table:table-cell table:style-name="ce27" office:value-type="float" office:value="0.8898" calcext:value-type="float">
            <text:p>0.8898</text:p>
          </table:table-cell>
          <table:table-cell table:style-name="ce31" office:value-type="currency" office:currency="EUR" office:value="2" calcext:value-type="currency">
            <text:p>€2.00</text:p>
          </table:table-cell>
          <table:table-cell table:number-columns-repeated="1015"/>
        </table:table-row>
        <table:table-row table:style-name="ro1">
          <table:table-cell table:style-name="ce29" office:value-type="date" office:date-value="2026-03-06" calcext:value-type="date">
            <text:p>06/03/2026</text:p>
          </table:table-cell>
          <table:table-cell table:style-name="ce27" office:value-type="float" office:value="63" calcext:value-type="float">
            <text:p>63</text:p>
          </table:table-cell>
          <table:table-cell table:style-name="ce31" office:value-type="currency" office:currency="EUR" office:value="165" calcext:value-type="currency">
            <text:p>€165.00</text:p>
          </table:table-cell>
          <table:table-cell table:style-name="ce31" office:value-type="currency" office:currency="EUR" office:value="0" calcext:value-type="currency">
            <text:p>€0.00</text:p>
          </table:table-cell>
          <table:table-cell table:style-name="ce31" office:value-type="currency" office:currency="EUR" office:value="33" calcext:value-type="currency">
            <text:p>€33.00</text:p>
          </table:table-cell>
          <table:table-cell table:style-name="ce31" office:value-type="currency" office:currency="EUR" office:value="132" calcext:value-type="currency">
            <text:p>€132.00</text:p>
          </table:table-cell>
          <table:table-cell table:style-name="ce16" office:value-type="currency" office:currency="USD" office:value="150" calcext:value-type="currency">
            <text:p>$150.00</text:p>
          </table:table-cell>
          <table:table-cell table:style-name="ce27" office:value-type="float" office:value="0.8798" calcext:value-type="float">
            <text:p>0.8798</text:p>
          </table:table-cell>
          <table:table-cell table:style-name="ce31" table:formula="of:=0.2*[.E13]" office:value-type="currency" office:currency="EUR" office:value="6.6" calcext:value-type="currency">
            <text:p>€6.60</text:p>
          </table:table-cell>
          <table:table-cell table:number-columns-repeated="1015"/>
        </table:table-row>
        <table:table-row table:style-name="ro1">
          <table:table-cell table:style-name="ce29" office:value-type="date" office:date-value="2026-02-27" calcext:value-type="date">
            <text:p>27/02/2026</text:p>
          </table:table-cell>
          <table:table-cell table:style-name="ce27" office:value-type="float" office:value="63" calcext:value-type="float">
            <text:p>63</text:p>
          </table:table-cell>
          <table:table-cell table:style-name="ce31" office:value-type="currency" office:currency="EUR" office:value="105" calcext:value-type="currency">
            <text:p>€105.00</text:p>
          </table:table-cell>
          <table:table-cell table:style-name="ce31" office:value-type="currency" office:currency="EUR" office:value="0" calcext:value-type="currency">
            <text:p>€0.00</text:p>
          </table:table-cell>
          <table:table-cell table:style-name="ce31" office:value-type="currency" office:currency="EUR" office:value="21" calcext:value-type="currency">
            <text:p>€21.00</text:p>
          </table:table-cell>
          <table:table-cell table:style-name="ce31" office:value-type="currency" office:currency="EUR" office:value="84" calcext:value-type="currency">
            <text:p>€84.00</text:p>
          </table:table-cell>
          <table:table-cell table:style-name="ce16" office:value-type="currency" office:currency="USD" office:value="97" calcext:value-type="currency">
            <text:p>$97.00</text:p>
          </table:table-cell>
          <table:table-cell table:style-name="ce27" office:value-type="float" office:value="0.8626" calcext:value-type="float">
            <text:p>0.8626</text:p>
          </table:table-cell>
          <table:table-cell table:style-name="ce31" table:formula="of:=0.2*[.E14]" office:value-type="currency" office:currency="EUR" office:value="4.2" calcext:value-type="currency">
            <text:p>€4.20</text:p>
          </table:table-cell>
          <table:table-cell table:number-columns-repeated="1015"/>
        </table:table-row>
        <table:table-row table:style-name="ro2" table:number-rows-repeated="984">
          <table:table-cell table:number-columns-repeated="2"/>
          <table:table-cell table:style-name="ce7" table:number-columns-repeated="4"/>
          <table:table-cell table:style-name="ce17"/>
          <table:table-cell/>
          <table:table-cell table:style-name="ce7"/>
          <table:table-cell table:number-columns-repeated="1015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ndimientos" table:style-name="ta4">
        <table:table-column table:style-name="co13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number-columns-repeated="1019" table:default-cell-style-name="Default"/>
        <table:table-row table:style-name="ro2">
          <table:table-cell table:style-name="ce19" office:value-type="string" calcext:value-type="string">
            <text:p>ID Proveedor</text:p>
          </table:table-cell>
          <table:table-cell table:style-name="ce19" office:value-type="string" calcext:value-type="string">
            <text:p>Fecha y Hora - Year-Month</text:p>
          </table:table-cell>
          <table:table-cell table:style-name="ce19" office:value-type="string" calcext:value-type="string">
            <text:p>SUM of A Liquidar</text:p>
          </table:table-cell>
          <table:table-cell table:style-name="ce19" office:value-type="string" calcext:value-type="string">
            <text:p>SUM of Honorarios</text:p>
          </table:table-cell>
          <table:table-cell table:style-name="ce51" office:value-type="string" calcext:value-type="string">
            <text:p>SUM of USDT</text:p>
          </table:table-cell>
          <table:table-cell table:number-columns-repeated="1019"/>
        </table:table-row>
        <table:table-row table:style-name="ro2">
          <table:table-cell table:style-name="ce19"/>
          <table:table-cell table:style-name="ce50" office:value-type="string" calcext:value-type="string">
            <text:p>2026-Feb</text:p>
          </table:table-cell>
          <table:table-cell table:style-name="ce7" office:value-type="currency" office:currency="EUR" office:value="16" calcext:value-type="currency">
            <text:p>€16.00</text:p>
          </table:table-cell>
          <table:table-cell table:style-name="ce7" office:value-type="currency" office:currency="EUR" office:value="4" calcext:value-type="currency">
            <text:p>€4.00</text:p>
          </table:table-cell>
          <table:table-cell table:style-name="ce51" office:value-type="float" office:value="18.1859513525801" calcext:value-type="float">
            <text:p>18.19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<text:s/>Total</text:p>
          </table:table-cell>
          <table:table-cell table:style-name="ce19"/>
          <table:table-cell table:style-name="ce7" office:value-type="currency" office:currency="EUR" office:value="16" calcext:value-type="currency">
            <text:p>€16.00</text:p>
          </table:table-cell>
          <table:table-cell table:style-name="ce7" office:value-type="currency" office:currency="EUR" office:value="4" calcext:value-type="currency">
            <text:p>€4.00</text:p>
          </table:table-cell>
          <table:table-cell table:style-name="ce51" office:value-type="float" office:value="18.1859513525801" calcext:value-type="float">
            <text:p>18.19</text:p>
          </table:table-cell>
          <table:table-cell table:number-columns-repeated="1019"/>
        </table:table-row>
        <table:table-row table:style-name="ro2">
          <table:table-cell table:style-name="ce19" office:value-type="float" office:value="21" calcext:value-type="float">
            <text:p>21</text:p>
          </table:table-cell>
          <table:table-cell table:style-name="ce50" office:value-type="string" calcext:value-type="string">
            <text:p>2026-Feb</text:p>
          </table:table-cell>
          <table:table-cell table:style-name="ce7" office:value-type="currency" office:currency="EUR" office:value="313.896" calcext:value-type="currency">
            <text:p>€313.90</text:p>
          </table:table-cell>
          <table:table-cell table:style-name="ce7" office:value-type="currency" office:currency="EUR" office:value="78.474" calcext:value-type="currency">
            <text:p>€78.47</text:p>
          </table:table-cell>
          <table:table-cell table:style-name="ce51" office:value-type="float" office:value="361.948460453066" calcext:value-type="float">
            <text:p>361.95</text:p>
          </table:table-cell>
          <table:table-cell table:number-columns-repeated="1019"/>
        </table:table-row>
        <table:table-row table:style-name="ro2">
          <table:table-cell table:style-name="ce19"/>
          <table:table-cell table:style-name="ce50" office:value-type="string" calcext:value-type="string">
            <text:p>2026-Mar</text:p>
          </table:table-cell>
          <table:table-cell table:style-name="ce7" office:value-type="currency" office:currency="EUR" office:value="1052.04" calcext:value-type="currency">
            <text:p>€1,052.04</text:p>
          </table:table-cell>
          <table:table-cell table:style-name="ce7" office:value-type="currency" office:currency="EUR" office:value="384.91" calcext:value-type="currency">
            <text:p>€384.91</text:p>
          </table:table-cell>
          <table:table-cell table:style-name="ce51" office:value-type="float" office:value="1191.69482996258" calcext:value-type="float">
            <text:p>1191.69</text:p>
          </table:table-cell>
          <table:table-cell table:number-columns-repeated="1019"/>
        </table:table-row>
        <table:table-row table:style-name="ro2">
          <table:table-cell table:style-name="ce19"/>
          <table:table-cell table:style-name="ce50" office:value-type="string" calcext:value-type="string">
            <text:p>2026-Apr</text:p>
          </table:table-cell>
          <table:table-cell table:style-name="ce7" office:value-type="currency" office:currency="EUR" office:value="-86" calcext:value-type="currency">
            <text:p>-€86.00</text:p>
          </table:table-cell>
          <table:table-cell table:style-name="ce7" office:value-type="currency" office:currency="EUR" office:value="16" calcext:value-type="currency">
            <text:p>€16.00</text:p>
          </table:table-cell>
          <table:table-cell table:style-name="ce51" office:value-type="float" office:value="-97.605266144592" calcext:value-type="float">
            <text:p>-97.61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21 Total</text:p>
          </table:table-cell>
          <table:table-cell table:style-name="ce19"/>
          <table:table-cell table:style-name="ce7" office:value-type="currency" office:currency="EUR" office:value="1279.936" calcext:value-type="currency">
            <text:p>€1,279.94</text:p>
          </table:table-cell>
          <table:table-cell table:style-name="ce7" office:value-type="currency" office:currency="EUR" office:value="479.384" calcext:value-type="currency">
            <text:p>€479.38</text:p>
          </table:table-cell>
          <table:table-cell table:style-name="ce51" office:value-type="float" office:value="1456.03802427105" calcext:value-type="float">
            <text:p>1456.04</text:p>
          </table:table-cell>
          <table:table-cell table:number-columns-repeated="1019"/>
        </table:table-row>
        <table:table-row table:style-name="ro2">
          <table:table-cell table:style-name="ce19" office:value-type="float" office:value="42" calcext:value-type="float">
            <text:p>42</text:p>
          </table:table-cell>
          <table:table-cell table:style-name="ce50" office:value-type="string" calcext:value-type="string">
            <text:p>2026-Feb</text:p>
          </table:table-cell>
          <table:table-cell table:style-name="ce7" office:value-type="currency" office:currency="EUR" office:value="60" calcext:value-type="currency">
            <text:p>€60.00</text:p>
          </table:table-cell>
          <table:table-cell table:style-name="ce7" office:value-type="currency" office:currency="EUR" office:value="15" calcext:value-type="currency">
            <text:p>€15.00</text:p>
          </table:table-cell>
          <table:table-cell table:style-name="ce51" office:value-type="float" office:value="69.557152793879" calcext:value-type="float">
            <text:p>69.56</text:p>
          </table:table-cell>
          <table:table-cell table:number-columns-repeated="1019"/>
        </table:table-row>
        <table:table-row table:style-name="ro2">
          <table:table-cell table:style-name="ce19"/>
          <table:table-cell table:style-name="ce50" office:value-type="string" calcext:value-type="string">
            <text:p>2026-Mar</text:p>
          </table:table-cell>
          <table:table-cell table:style-name="ce7" office:value-type="currency" office:currency="EUR" office:value="179.288" calcext:value-type="currency">
            <text:p>€179.29</text:p>
          </table:table-cell>
          <table:table-cell table:style-name="ce7" office:value-type="currency" office:currency="EUR" office:value="44.822" calcext:value-type="currency">
            <text:p>€44.82</text:p>
          </table:table-cell>
          <table:table-cell table:style-name="ce51" office:value-type="float" office:value="202.702780422703" calcext:value-type="float">
            <text:p>202.70</text:p>
          </table:table-cell>
          <table:table-cell table:number-columns-repeated="1019"/>
        </table:table-row>
        <table:table-row table:style-name="ro2">
          <table:table-cell table:style-name="ce19"/>
          <table:table-cell table:style-name="ce50" office:value-type="string" calcext:value-type="string">
            <text:p>2026-Apr</text:p>
          </table:table-cell>
          <table:table-cell table:style-name="ce7" office:value-type="currency" office:currency="EUR" office:value="33.6" calcext:value-type="currency">
            <text:p>€33.60</text:p>
          </table:table-cell>
          <table:table-cell table:style-name="ce7" office:value-type="currency" office:currency="EUR" office:value="8.4" calcext:value-type="currency">
            <text:p>€8.40</text:p>
          </table:table-cell>
          <table:table-cell table:style-name="ce51" office:value-type="float" office:value="38.1341504937011" calcext:value-type="float">
            <text:p>38.13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42 Total</text:p>
          </table:table-cell>
          <table:table-cell table:style-name="ce19"/>
          <table:table-cell table:style-name="ce7" office:value-type="currency" office:currency="EUR" office:value="272.888" calcext:value-type="currency">
            <text:p>€272.89</text:p>
          </table:table-cell>
          <table:table-cell table:style-name="ce7" office:value-type="currency" office:currency="EUR" office:value="68.222" calcext:value-type="currency">
            <text:p>€68.22</text:p>
          </table:table-cell>
          <table:table-cell table:style-name="ce51" office:value-type="float" office:value="310.394083710283" calcext:value-type="float">
            <text:p>310.39</text:p>
          </table:table-cell>
          <table:table-cell table:number-columns-repeated="1019"/>
        </table:table-row>
        <table:table-row table:style-name="ro2">
          <table:table-cell table:style-name="ce19" office:value-type="float" office:value="63" calcext:value-type="float">
            <text:p>63</text:p>
          </table:table-cell>
          <table:table-cell table:style-name="ce50" office:value-type="string" calcext:value-type="string">
            <text:p>2026-Feb</text:p>
          </table:table-cell>
          <table:table-cell table:style-name="ce7" office:value-type="currency" office:currency="EUR" office:value="100" calcext:value-type="currency">
            <text:p>€100.00</text:p>
          </table:table-cell>
          <table:table-cell table:style-name="ce7" office:value-type="currency" office:currency="EUR" office:value="25" calcext:value-type="currency">
            <text:p>€25.00</text:p>
          </table:table-cell>
          <table:table-cell table:style-name="ce51" office:value-type="float" office:value="115.565965264011" calcext:value-type="float">
            <text:p>115.57</text:p>
          </table:table-cell>
          <table:table-cell table:number-columns-repeated="1019"/>
        </table:table-row>
        <table:table-row table:style-name="ro2">
          <table:table-cell table:style-name="ce19"/>
          <table:table-cell table:style-name="ce50" office:value-type="string" calcext:value-type="string">
            <text:p>2026-Mar</text:p>
          </table:table-cell>
          <table:table-cell table:style-name="ce7" office:value-type="currency" office:currency="EUR" office:value="264.024" calcext:value-type="currency">
            <text:p>€264.02</text:p>
          </table:table-cell>
          <table:table-cell table:style-name="ce7" office:value-type="currency" office:currency="EUR" office:value="66.006" calcext:value-type="currency">
            <text:p>€66.01</text:p>
          </table:table-cell>
          <table:table-cell table:style-name="ce51" office:value-type="float" office:value="299.403363373169" calcext:value-type="float">
            <text:p>299.40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63 Total</text:p>
          </table:table-cell>
          <table:table-cell table:style-name="ce19"/>
          <table:table-cell table:style-name="ce7" office:value-type="currency" office:currency="EUR" office:value="364.024" calcext:value-type="currency">
            <text:p>€364.02</text:p>
          </table:table-cell>
          <table:table-cell table:style-name="ce7" office:value-type="currency" office:currency="EUR" office:value="91.006" calcext:value-type="currency">
            <text:p>€91.01</text:p>
          </table:table-cell>
          <table:table-cell table:style-name="ce51" office:value-type="float" office:value="414.96932863718" calcext:value-type="float">
            <text:p>414.97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Grand Total</text:p>
          </table:table-cell>
          <table:table-cell table:style-name="ce19"/>
          <table:table-cell table:style-name="ce7" office:value-type="currency" office:currency="EUR" office:value="1932.848" calcext:value-type="currency">
            <text:p>€1,932.85</text:p>
          </table:table-cell>
          <table:table-cell table:style-name="ce7" office:value-type="currency" office:currency="EUR" office:value="642.612" calcext:value-type="currency">
            <text:p>€642.61</text:p>
          </table:table-cell>
          <table:table-cell table:style-name="ce51" office:value-type="float" office:value="2199.5873879711" calcext:value-type="float">
            <text:p>2199.59</text:p>
          </table:table-cell>
          <table:table-cell table:number-columns-repeated="1019"/>
        </table:table-row>
        <table:table-row table:style-name="ro2" table:number-rows-repeated="985">
          <table:table-cell table:number-columns-repeated="4"/>
          <table:table-cell table:style-name="ce51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youts Stripe" table:style-name="ta5"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number-columns-repeated="1020" table:default-cell-style-name="Default"/>
        <table:table-row table:style-name="ro1">
          <table:table-cell table:style-name="ce25" office:value-type="string" calcext:value-type="string">
            <text:p>Fecha</text:p>
          </table:table-cell>
          <table:table-cell table:style-name="ce30" office:value-type="string" calcext:value-type="string">
            <text:p>Monto Recibido</text:p>
          </table:table-cell>
          <table:table-cell table:style-name="ce25" office:value-type="string" calcext:value-type="string">
            <text:p>ID Payout Stripe</text:p>
          </table:table-cell>
          <table:table-cell table:style-name="ce25" office:value-type="string" calcext:value-type="string">
            <text:p>Estado / Notas</text:p>
          </table:table-cell>
          <table:table-cell table:number-columns-repeated="1020"/>
        </table:table-row>
        <table:table-row table:style-name="ro1">
          <table:table-cell table:style-name="ce29" office:value-type="date" office:date-value="2026-03-02" calcext:value-type="date">
            <text:p>02/03/2026</text:p>
          </table:table-cell>
          <table:table-cell table:style-name="ce31" office:value-type="currency" office:currency="EUR" office:value="108.83" calcext:value-type="currency">
            <text:p>€108.83</text:p>
          </table:table-cell>
          <table:table-cell table:style-name="ce27" office:value-type="string" calcext:value-type="string">
            <text:p>po_1T6KSJQRhkM9CcvM6ySE97GM</text:p>
          </table:table-cell>
          <table:table-cell table:style-name="ce14" table:content-validation-name="val4" office:value-type="string" calcext:value-type="string">
            <text:p>Procesado</text:p>
          </table:table-cell>
          <table:table-cell table:number-columns-repeated="1020"/>
        </table:table-row>
        <table:table-row table:style-name="ro1">
          <table:table-cell table:style-name="ce52" office:value-type="date" office:date-value="2026-03-09T07:14:00" calcext:value-type="date">
            <text:p>09/03/2026 07:14</text:p>
          </table:table-cell>
          <table:table-cell table:style-name="ce31" office:value-type="currency" office:currency="EUR" office:value="68.67" calcext:value-type="currency">
            <text:p>€68.67</text:p>
          </table:table-cell>
          <table:table-cell table:style-name="ce27" office:value-type="string" calcext:value-type="string">
            <text:p>po_1T8rzRQRhkM9CcvMUWG08CTK</text:p>
          </table:table-cell>
          <table:table-cell table:style-name="ce14" table:content-validation-name="val4" office:value-type="string" calcext:value-type="string">
            <text:p>Procesado</text:p>
          </table:table-cell>
          <table:table-cell table:number-columns-repeated="1020"/>
        </table:table-row>
        <table:table-row table:style-name="ro1">
          <table:table-cell table:style-name="ce52" office:value-type="date" office:date-value="2026-03-12T07:08:00" calcext:value-type="date">
            <text:p>12/03/2026 07:08</text:p>
          </table:table-cell>
          <table:table-cell table:style-name="ce31" office:value-type="currency" office:currency="EUR" office:value="188.68" calcext:value-type="currency">
            <text:p>€188.68</text:p>
          </table:table-cell>
          <table:table-cell table:style-name="ce27" office:value-type="string" calcext:value-type="string">
            <text:p>po_1T9xM9QRhkM9CcvMcdXAiBdn</text:p>
          </table:table-cell>
          <table:table-cell table:style-name="ce14" table:content-validation-name="val4" office:value-type="string" calcext:value-type="string">
            <text:p>Procesado</text:p>
          </table:table-cell>
          <table:table-cell table:number-columns-repeated="1020"/>
        </table:table-row>
        <table:table-row table:style-name="ro1">
          <table:table-cell table:style-name="ce52" office:value-type="date" office:date-value="2026-03-16T07:09:00" calcext:value-type="date">
            <text:p>16/03/2026 07:09</text:p>
          </table:table-cell>
          <table:table-cell table:style-name="ce31" office:value-type="currency" office:currency="EUR" office:value="49" calcext:value-type="currency">
            <text:p>€49.00</text:p>
          </table:table-cell>
          <table:table-cell table:style-name="ce27" office:value-type="string" calcext:value-type="string">
            <text:p>po_1TBPHTQRhkM9CcvMj37ze7w8</text:p>
          </table:table-cell>
          <table:table-cell table:style-name="ce14" table:content-validation-name="val4" office:value-type="string" calcext:value-type="string">
            <text:p>Procesado</text:p>
          </table:table-cell>
          <table:table-cell table:number-columns-repeated="1020"/>
        </table:table-row>
        <table:table-row table:style-name="ro1">
          <table:table-cell table:style-name="ce52" office:value-type="date" office:date-value="2026-03-19T07:10:00" calcext:value-type="date">
            <text:p>19/03/2026 07:10</text:p>
          </table:table-cell>
          <table:table-cell table:style-name="ce31" office:value-type="currency" office:currency="EUR" office:value="277.06" calcext:value-type="currency">
            <text:p>€277.06</text:p>
          </table:table-cell>
          <table:table-cell table:style-name="ce27" office:value-type="string" calcext:value-type="string">
            <text:p>po_1TCUNGQRhkM9CcvMeIuD4wbI</text:p>
          </table:table-cell>
          <table:table-cell table:style-name="ce14" table:content-validation-name="val4" office:value-type="string" calcext:value-type="string">
            <text:p>Procesado</text:p>
          </table:table-cell>
          <table:table-cell table:number-columns-repeated="1020"/>
        </table:table-row>
        <table:table-row table:style-name="ro1">
          <table:table-cell table:style-name="ce52" office:value-type="date" office:date-value="2026-03-23T07:18:00" calcext:value-type="date">
            <text:p>23/03/2026 07:18</text:p>
          </table:table-cell>
          <table:table-cell table:style-name="ce31" office:value-type="currency" office:currency="EUR" office:value="34.22" calcext:value-type="currency">
            <text:p>€34.22</text:p>
          </table:table-cell>
          <table:table-cell table:style-name="ce27" office:value-type="string" calcext:value-type="string">
            <text:p>po_1TDwP7QRhkM9CcvMR8JMMsU8</text:p>
          </table:table-cell>
          <table:table-cell table:style-name="ce14" table:content-validation-name="val4" office:value-type="string" calcext:value-type="string">
            <text:p>Procesado</text:p>
          </table:table-cell>
          <table:table-cell table:number-columns-repeated="1020"/>
        </table:table-row>
        <table:table-row table:style-name="ro1">
          <table:table-cell table:style-name="ce52" office:value-type="date" office:date-value="2026-03-26T07:16:00" calcext:value-type="date">
            <text:p>26/03/2026 07:16</text:p>
          </table:table-cell>
          <table:table-cell table:style-name="ce31" office:value-type="currency" office:currency="EUR" office:value="245.5" calcext:value-type="currency">
            <text:p>€245.50</text:p>
          </table:table-cell>
          <table:table-cell table:style-name="ce27" office:value-type="string" calcext:value-type="string">
            <text:p>po_1TF1S4QRhkM9CcvMhtoTvskO</text:p>
          </table:table-cell>
          <table:table-cell table:style-name="ce14" table:content-validation-name="val4" office:value-type="string" calcext:value-type="string">
            <text:p>Procesado</text:p>
          </table:table-cell>
          <table:table-cell table:number-columns-repeated="1020"/>
        </table:table-row>
        <table:table-row table:style-name="ro1">
          <table:table-cell table:style-name="ce52" office:value-type="date" office:date-value="2026-03-30T07:13:00" calcext:value-type="date">
            <text:p>30/03/2026 07:13</text:p>
          </table:table-cell>
          <table:table-cell table:style-name="ce31" office:value-type="currency" office:currency="EUR" office:value="210.19" calcext:value-type="currency">
            <text:p>€210.19</text:p>
          </table:table-cell>
          <table:table-cell table:style-name="ce27" office:value-type="string" calcext:value-type="string">
            <text:p>po_1TGTo0QRhkM9CcvMbUDpmYSt</text:p>
          </table:table-cell>
          <table:table-cell table:style-name="ce14" table:content-validation-name="val4" office:value-type="string" calcext:value-type="string">
            <text:p>Procesado</text:p>
          </table:table-cell>
          <table:table-cell table:number-columns-repeated="1020"/>
        </table:table-row>
        <table:table-row table:style-name="ro1">
          <table:table-cell table:style-name="ce52" office:value-type="date" office:date-value="2026-04-02T07:16:00" calcext:value-type="date">
            <text:p>02/04/2026 07:16</text:p>
          </table:table-cell>
          <table:table-cell table:style-name="ce31" office:value-type="currency" office:currency="EUR" office:value="144.47" calcext:value-type="currency">
            <text:p>€144.47</text:p>
          </table:table-cell>
          <table:table-cell table:style-name="ce27" office:value-type="string" calcext:value-type="string">
            <text:p>po_1THZKQQRhkM9CcvMbVbmxEpk</text:p>
          </table:table-cell>
          <table:table-cell table:style-name="ce14" table:content-validation-name="val4" office:value-type="string" calcext:value-type="string">
            <text:p>Procesado</text:p>
          </table:table-cell>
          <table:table-cell table:number-columns-repeated="1020"/>
        </table:table-row>
        <table:table-row table:style-name="ro2" table:number-rows-repeated="998">
          <table:table-cell/>
          <table:table-cell table:style-name="ce7"/>
          <table:table-cell table:number-columns-repeated="1022"/>
        </table:table-row>
        <table:table-row table:style-name="ro3" table:number-rows-repeated="1047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astos Talaria" table:style-name="ta6"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13" table:number-columns-repeated="1017" table:default-cell-style-name="Default"/>
        <table:table-row table:style-name="ro1">
          <table:table-cell table:style-name="ce25" office:value-type="string" calcext:value-type="string">
            <text:p>Fecha</text:p>
          </table:table-cell>
          <table:table-cell table:style-name="ce25" office:value-type="string" calcext:value-type="string">
            <text:p>Proveedor</text:p>
          </table:table-cell>
          <table:table-cell table:style-name="ce25" office:value-type="string" calcext:value-type="string">
            <text:p>NIF/VAT Proveedor</text:p>
          </table:table-cell>
          <table:table-cell table:style-name="ce25" office:value-type="string" calcext:value-type="string">
            <text:p>Concepto</text:p>
          </table:table-cell>
          <table:table-cell table:style-name="ce30" office:value-type="string" calcext:value-type="string">
            <text:p>Base Imponible</text:p>
          </table:table-cell>
          <table:table-cell table:style-name="ce54" office:value-type="string" calcext:value-type="string">
            <text:p>% IVA</text:p>
          </table:table-cell>
          <table:table-cell table:style-name="ce30" office:value-type="string" calcext:value-type="string">
            <text:p>Total Pagado</text:p>
          </table:table-cell>
          <table:table-cell table:style-name="ce25" office:value-type="string" calcext:value-type="string">
            <text:p>Link Factura</text:p>
          </table:table-cell>
          <table:table-cell table:number-columns-repeated="1016"/>
        </table:table-row>
        <table:table-row table:style-name="ro1">
          <table:table-cell table:style-name="ce29" office:value-type="date" office:date-value="2026-03-04" calcext:value-type="date">
            <text:p>04/03/2026</text:p>
          </table:table-cell>
          <table:table-cell table:style-name="ce27" office:value-type="string" calcext:value-type="string">
            <text:p>OMSAG</text:p>
          </table:table-cell>
          <table:table-cell table:style-name="ce27" office:value-type="string" calcext:value-type="string">
            <text:p>CHE-382.339.392</text:p>
          </table:table-cell>
          <table:table-cell table:style-name="ce27" office:value-type="string" calcext:value-type="string">
            <text:p>Publicidad</text:p>
          </table:table-cell>
          <table:table-cell table:style-name="ce31" office:value-type="currency" office:currency="EUR" office:value="22.75" calcext:value-type="currency">
            <text:p>€22.75</text:p>
          </table:table-cell>
          <table:table-cell table:style-name="ce55" office:value-type="percentage" office:value="0" calcext:value-type="percentage">
            <text:p>0.00%</text:p>
          </table:table-cell>
          <table:table-cell table:style-name="ce31" table:formula="of:=[$'Gastos Talaria'.$E$2:.$E$11]+[$'Gastos Talaria'.$E$2:.$E$11]*[$'Gastos Talaria'.$F$2:.$F$11]" office:value-type="currency" office:currency="EUR" office:value="22.75" calcext:value-type="currency">
            <text:p>€22.75</text:p>
          </table:table-cell>
          <table:table-cell table:style-name="ce53" office:value-type="string" calcext:value-type="string">
            <text:p><text:a xlink:href="https://drive.google.com/file/d/1TXPAmOuE12OxelGo70Bq_5Y3gxxv0_bD/view?usp=drive_link" xlink:type="simple">https://drive.google.com/file/d/1TXPAmOuE12OxelGo70Bq_5Y3gxxv0_bD/view?usp=drive_link</text:a></text:p>
          </table:table-cell>
          <table:table-cell table:number-columns-repeated="1016"/>
        </table:table-row>
        <table:table-row table:style-name="ro1">
          <table:table-cell table:style-name="ce29" office:value-type="date" office:date-value="2026-03-04" calcext:value-type="date">
            <text:p>04/03/2026</text:p>
          </table:table-cell>
          <table:table-cell table:style-name="ce27" office:value-type="string" calcext:value-type="string">
            <text:p>OMSAG</text:p>
          </table:table-cell>
          <table:table-cell table:style-name="ce27" office:value-type="string" calcext:value-type="string">
            <text:p>CHE-382.339.392</text:p>
          </table:table-cell>
          <table:table-cell table:style-name="ce27" office:value-type="string" calcext:value-type="string">
            <text:p>Publicidad</text:p>
          </table:table-cell>
          <table:table-cell table:style-name="ce31" office:value-type="currency" office:currency="EUR" office:value="113.76" calcext:value-type="currency">
            <text:p>€113.76</text:p>
          </table:table-cell>
          <table:table-cell table:style-name="ce55" office:value-type="percentage" office:value="0" calcext:value-type="percentage">
            <text:p>0.00%</text:p>
          </table:table-cell>
          <table:table-cell table:style-name="ce31" table:formula="of:=[$'Gastos Talaria'.$E$2:.$E$11]+[$'Gastos Talaria'.$E$2:.$E$11]*[$'Gastos Talaria'.$F$2:.$F$11]" office:value-type="currency" office:currency="EUR" office:value="113.76" calcext:value-type="currency">
            <text:p>€113.76</text:p>
          </table:table-cell>
          <table:table-cell table:style-name="ce53" office:value-type="string" calcext:value-type="string">
            <text:p><text:a xlink:href="https://drive.google.com/file/d/1TXPAmOuE12OxelGo70Bq_5Y3gxxv0_bD/view?usp=drive_link" xlink:type="simple">https://drive.google.com/file/d/1TXPAmOuE12OxelGo70Bq_5Y3gxxv0_bD/view?usp=drive_link</text:a></text:p>
          </table:table-cell>
          <table:table-cell table:number-columns-repeated="1016"/>
        </table:table-row>
        <table:table-row table:style-name="ro1">
          <table:table-cell table:style-name="ce29" office:value-type="date" office:date-value="2026-03-05" calcext:value-type="date">
            <text:p>05/03/2026</text:p>
          </table:table-cell>
          <table:table-cell table:style-name="ce53" office:value-type="string" calcext:value-type="string">
            <text:p><text:a xlink:href="http://www.make.com/" xlink:type="simple">www.make.com</text:a></text:p>
          </table:table-cell>
          <table:table-cell table:style-name="ce27" office:value-type="string" calcext:value-type="string">
            <text:p>US EIN 61-1797223</text:p>
          </table:table-cell>
          <table:table-cell table:style-name="ce27" office:value-type="string" calcext:value-type="string">
            <text:p>Licencias de software</text:p>
          </table:table-cell>
          <table:table-cell table:style-name="ce31" office:value-type="currency" office:currency="EUR" office:value="9.42" calcext:value-type="currency">
            <text:p>€9.42</text:p>
          </table:table-cell>
          <table:table-cell table:style-name="ce55" office:value-type="percentage" office:value="0" calcext:value-type="percentage">
            <text:p>0.00%</text:p>
          </table:table-cell>
          <table:table-cell table:style-name="ce31" table:formula="of:=[$'Gastos Talaria'.$E$2:.$E$11]+[$'Gastos Talaria'.$E$2:.$E$11]*[$'Gastos Talaria'.$F$2:.$F$11]" office:value-type="currency" office:currency="EUR" office:value="9.42" calcext:value-type="currency">
            <text:p>€9.42</text:p>
          </table:table-cell>
          <table:table-cell table:number-columns-repeated="1017"/>
        </table:table-row>
        <table:table-row table:style-name="ro1">
          <table:table-cell table:style-name="ce29" office:value-type="date" office:date-value="2026-03-14" calcext:value-type="date">
            <text:p>14/03/2026</text:p>
          </table:table-cell>
          <table:table-cell table:style-name="ce27" office:value-type="string" calcext:value-type="string">
            <text:p>FORMA GROUP SRL</text:p>
          </table:table-cell>
          <table:table-cell table:style-name="ce27" office:value-type="string" calcext:value-type="string">
            <text:p>BE.0450.877.378</text:p>
          </table:table-cell>
          <table:table-cell table:style-name="ce27" office:value-type="string" calcext:value-type="string">
            <text:p>Publicidad</text:p>
          </table:table-cell>
          <table:table-cell table:style-name="ce31" office:value-type="currency" office:currency="EUR" office:value="294" calcext:value-type="currency">
            <text:p>€294.00</text:p>
          </table:table-cell>
          <table:table-cell table:style-name="ce55" office:value-type="percentage" office:value="0" calcext:value-type="percentage">
            <text:p>0.00%</text:p>
          </table:table-cell>
          <table:table-cell table:style-name="ce31" office:value-type="currency" office:currency="EUR" office:value="294" calcext:value-type="currency">
            <text:p>€294.00</text:p>
          </table:table-cell>
          <table:table-cell table:style-name="ce53" office:value-type="string" calcext:value-type="string">
            <text:p><text:a xlink:href="https://drive.google.com/file/d/1CKwKnT38l3UfZUhxCsYoA8evVDGfu1Rl/view?usp=drive_link" xlink:type="simple">https://drive.google.com/file/d/1CKwKnT38l3UfZUhxCsYoA8evVDGfu1Rl/view?usp=drive_link</text:a></text:p>
          </table:table-cell>
          <table:table-cell table:number-columns-repeated="1016"/>
        </table:table-row>
        <table:table-row table:style-name="ro1">
          <table:table-cell table:style-name="ce29" office:value-type="date" office:date-value="2026-03-19" calcext:value-type="date">
            <text:p>19/03/2026</text:p>
          </table:table-cell>
          <table:table-cell table:style-name="ce27" office:value-type="string" calcext:value-type="string">
            <text:p>Anthropic</text:p>
          </table:table-cell>
          <table:table-cell table:style-name="ce27"/>
          <table:table-cell table:style-name="ce27" office:value-type="string" calcext:value-type="string">
            <text:p>Agent</text:p>
          </table:table-cell>
          <table:table-cell table:style-name="ce31" office:value-type="currency" office:currency="EUR" office:value="18" calcext:value-type="currency">
            <text:p>€18.00</text:p>
          </table:table-cell>
          <table:table-cell table:style-name="ce55" office:value-type="percentage" office:value="0" calcext:value-type="percentage">
            <text:p>0.00%</text:p>
          </table:table-cell>
          <table:table-cell table:style-name="ce31" office:value-type="currency" office:currency="EUR" office:value="18" calcext:value-type="currency">
            <text:p>€18.00</text:p>
          </table:table-cell>
          <table:table-cell table:number-columns-repeated="1017"/>
        </table:table-row>
        <table:table-row table:style-name="ro1">
          <table:table-cell table:style-name="ce29" office:value-type="date" office:date-value="2026-03-19" calcext:value-type="date">
            <text:p>19/03/2026</text:p>
          </table:table-cell>
          <table:table-cell table:style-name="ce27" office:value-type="string" calcext:value-type="string">
            <text:p>Anthropic, PBC</text:p>
          </table:table-cell>
          <table:table-cell table:style-name="ce27"/>
          <table:table-cell table:style-name="ce27" office:value-type="string" calcext:value-type="string">
            <text:p>One-time credit purchase</text:p>
          </table:table-cell>
          <table:table-cell table:style-name="ce31" office:value-type="currency" office:currency="EUR" office:value="5" calcext:value-type="currency">
            <text:p>€5.00</text:p>
          </table:table-cell>
          <table:table-cell table:style-name="ce55" office:value-type="percentage" office:value="0.21" calcext:value-type="percentage">
            <text:p>21.00%</text:p>
          </table:table-cell>
          <table:table-cell table:style-name="ce31" office:value-type="currency" office:currency="EUR" office:value="6.05" calcext:value-type="currency">
            <text:p>€6.05</text:p>
          </table:table-cell>
          <table:table-cell table:number-columns-repeated="1017"/>
        </table:table-row>
        <table:table-row table:style-name="ro1">
          <table:table-cell table:style-name="ce29" office:value-type="date" office:date-value="2026-03-30" calcext:value-type="date">
            <text:p>30/03/2026</text:p>
          </table:table-cell>
          <table:table-cell table:style-name="ce27" office:value-type="string" calcext:value-type="string">
            <text:p>Pedro - Wallapop</text:p>
          </table:table-cell>
          <table:table-cell table:style-name="ce27" office:value-type="string" calcext:value-type="string">
            <text:p>N/A</text:p>
          </table:table-cell>
          <table:table-cell table:style-name="ce27" office:value-type="string" calcext:value-type="string">
            <text:p>Silla ergonómica de oficina (Segunda mano - Wallapop)</text:p>
          </table:table-cell>
          <table:table-cell table:style-name="ce31" office:value-type="currency" office:currency="EUR" office:value="112" calcext:value-type="currency">
            <text:p>€112.00</text:p>
          </table:table-cell>
          <table:table-cell table:style-name="ce55" office:value-type="percentage" office:value="0" calcext:value-type="percentage">
            <text:p>0.00%</text:p>
          </table:table-cell>
          <table:table-cell table:style-name="ce31" office:value-type="currency" office:currency="EUR" office:value="112" calcext:value-type="currency">
            <text:p>€112.00</text:p>
          </table:table-cell>
          <table:table-cell table:style-name="ce53" office:value-type="string" calcext:value-type="string">
            <text:p><text:a xlink:href="https://drive.google.com/drive/u/3/folders/1u-uwUhmoX6GznQ7XTL3JC8TjIetwFoWb" xlink:type="simple">https://drive.google.com/drive/u/3/folders/1u-uwUhmoX6GznQ7XTL3JC8TjIetwFoWb</text:a></text:p>
          </table:table-cell>
          <table:table-cell table:number-columns-repeated="1016"/>
        </table:table-row>
        <table:table-row table:style-name="ro1">
          <table:table-cell table:style-name="ce29" office:value-type="date" office:date-value="2026-04-01" calcext:value-type="date">
            <text:p>01/04/2026</text:p>
          </table:table-cell>
          <table:table-cell table:style-name="ce27" office:value-type="string" calcext:value-type="string">
            <text:p>Soluciones Corporativas IP, S.L.</text:p>
          </table:table-cell>
          <table:table-cell table:style-name="ce27" office:value-type="string" calcext:value-type="string">
            <text:p>ESB57333601</text:p>
          </table:table-cell>
          <table:table-cell table:style-name="ce27" office:value-type="string" calcext:value-type="string">
            <text:p>Domain registration</text:p>
          </table:table-cell>
          <table:table-cell table:style-name="ce31" office:value-type="currency" office:currency="EUR" office:value="6.95" calcext:value-type="currency">
            <text:p>€6.95</text:p>
          </table:table-cell>
          <table:table-cell table:style-name="ce55" office:value-type="percentage" office:value="0.21" calcext:value-type="percentage">
            <text:p>21.00%</text:p>
          </table:table-cell>
          <table:table-cell table:style-name="ce31" office:value-type="currency" office:currency="EUR" office:value="8.41" calcext:value-type="currency">
            <text:p>€8.41</text:p>
          </table:table-cell>
          <table:table-cell table:style-name="ce53" office:value-type="string" calcext:value-type="string">
            <text:p><text:a xlink:href="https://drive.google.com/file/d/1Bz88OFAGS1kqXETIb3-Nsp5HvqLZxnUi/view?usp=drivesdk" xlink:type="simple">https://drive.google.com/file/d/1Bz88OFAGS1kqXETIb3-Nsp5HvqLZxnUi/view?usp=drivesdk</text:a></text:p>
          </table:table-cell>
          <table:table-cell table:number-columns-repeated="1016"/>
        </table:table-row>
        <table:table-row table:style-name="ro1">
          <table:table-cell table:style-name="ce29" office:value-type="date" office:date-value="2026-04-05" calcext:value-type="date">
            <text:p>05/04/2026</text:p>
          </table:table-cell>
          <table:table-cell table:style-name="ce27" office:value-type="string" calcext:value-type="string">
            <text:p>Celonis Inc.</text:p>
          </table:table-cell>
          <table:table-cell table:style-name="ce27" office:value-type="string" calcext:value-type="string">
            <text:p>US EIN 61-1797223</text:p>
          </table:table-cell>
          <table:table-cell table:style-name="ce27" office:value-type="string" calcext:value-type="string">
            <text:p>Make Core plan (10000 operations / month) - monthly subscription</text:p>
          </table:table-cell>
          <table:table-cell table:style-name="ce31" office:value-type="currency" office:currency="EUR" office:value="10.59" calcext:value-type="currency">
            <text:p>€10.59</text:p>
          </table:table-cell>
          <table:table-cell table:style-name="ce27" office:value-type="float" office:value="0" calcext:value-type="float">
            <text:p>0</text:p>
          </table:table-cell>
          <table:table-cell table:style-name="ce31" office:value-type="currency" office:currency="EUR" office:value="10.59" calcext:value-type="currency">
            <text:p>€10.59</text:p>
          </table:table-cell>
          <table:table-cell table:style-name="ce53" office:value-type="string" calcext:value-type="string">
            <text:p><text:a xlink:href="https://drive.google.com/file/d/1wizDpgCU0dn1qnrV9i1jZBKe58Zd2-6-/view?usp=drivesdk" xlink:type="simple">https://drive.google.com/file/d/1wizDpgCU0dn1qnrV9i1jZBKe58Zd2-6-/view?usp=drivesdk</text:a></text:p>
          </table:table-cell>
          <table:table-cell table:number-columns-repeated="1016"/>
        </table:table-row>
        <table:table-row table:style-name="ro1">
          <table:table-cell table:style-name="ce29" office:value-type="date" office:date-value="2026-04-05" calcext:value-type="date">
            <text:p>05/04/2026</text:p>
          </table:table-cell>
          <table:table-cell table:style-name="ce27" office:value-type="string" calcext:value-type="string">
            <text:p>Stripe</text:p>
          </table:table-cell>
          <table:table-cell table:style-name="ce27" office:value-type="string" calcext:value-type="string">
            <text:p>IE 3206488LH</text:p>
          </table:table-cell>
          <table:table-cell table:style-name="ce27" office:value-type="string" calcext:value-type="string">
            <text:p>Processing Fees</text:p>
          </table:table-cell>
          <table:table-cell table:style-name="ce31" office:value-type="currency" office:currency="EUR" office:value="40.14" calcext:value-type="currency">
            <text:p>€40.14</text:p>
          </table:table-cell>
          <table:table-cell table:style-name="ce27" office:value-type="float" office:value="0" calcext:value-type="float">
            <text:p>0</text:p>
          </table:table-cell>
          <table:table-cell table:style-name="ce31" office:value-type="currency" office:currency="EUR" office:value="40.14" calcext:value-type="currency">
            <text:p>€40.14</text:p>
          </table:table-cell>
          <table:table-cell table:style-name="ce53" office:value-type="string" calcext:value-type="string">
            <text:p><text:a xlink:href="https://drive.google.com/file/d/1VBcVDQ4YdQtuQnI_oZAbXkDYeprzCuJb/view?usp=drive_link" xlink:type="simple">https://drive.google.com/file/d/1VBcVDQ4YdQtuQnI_oZAbXkDYeprzCuJb/view?usp=drive_link</text:a></text:p>
          </table:table-cell>
          <table:table-cell table:number-columns-repeated="1016"/>
        </table:table-row>
        <table:table-row table:style-name="ro2" table:number-rows-repeated="993">
          <table:table-cell table:number-columns-repeated="4"/>
          <table:table-cell table:style-name="ce7"/>
          <table:table-cell table:style-name="ce56"/>
          <table:table-cell table:style-name="ce7"/>
          <table:table-cell table:number-columns-repeated="1017"/>
        </table:table-row>
        <table:table-row table:style-name="ro3" table:number-rows-repeated="1047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ndeo Kraken" table:style-name="ta7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3" table:number-columns-repeated="1019" table:default-cell-style-name="Default"/>
        <table:table-row table:style-name="ro1">
          <table:table-cell table:style-name="ce57" office:value-type="string" calcext:value-type="string">
            <text:p>Fecha Envío (BBVA)</text:p>
          </table:table-cell>
          <table:table-cell table:style-name="ce59" office:value-type="string" calcext:value-type="string">
            <text:p>Monto EUR Enviado</text:p>
          </table:table-cell>
          <table:table-cell table:style-name="ce61" office:value-type="string" calcext:value-type="string">
            <text:p>USDT Comprados</text:p>
          </table:table-cell>
          <table:table-cell table:style-name="ce57" office:value-type="string" calcext:value-type="string">
            <text:p>Tipo de Cambio (EUR/USDT)</text:p>
          </table:table-cell>
          <table:table-cell table:style-name="ce57" office:value-type="string" calcext:value-type="string">
            <text:p>Notas / Ref Liquidación</text:p>
          </table:table-cell>
          <table:table-cell table:number-columns-repeated="1019"/>
        </table:table-row>
        <table:table-row table:style-name="ro1">
          <table:table-cell table:style-name="ce58" table:content-validation-name="val5" office:value-type="date" office:date-value="2026-02-27" calcext:value-type="date">
            <text:p>27/02/2026</text:p>
          </table:table-cell>
          <table:table-cell table:style-name="ce60" office:value-type="currency" office:currency="EUR" office:value="372" calcext:value-type="currency">
            <text:p>€372.00</text:p>
          </table:table-cell>
          <table:table-cell table:style-name="ce62" table:formula="of:=[.B2]/[.D2]" office:value-type="currency" office:currency="USD" office:value="431.25434732205" calcext:value-type="currency">
            <text:p>$431.25</text:p>
          </table:table-cell>
          <table:table-cell table:style-name="ce63" office:value-type="float" office:value="0.8626" calcext:value-type="float">
            <text:p>0.8626</text:p>
          </table:table-cell>
          <table:table-cell table:style-name="ce64" office:value-type="string" calcext:value-type="string">
            <text:p>Liq. Viernes 27/02</text:p>
          </table:table-cell>
          <table:table-cell table:number-columns-repeated="1019"/>
        </table:table-row>
        <table:table-row table:style-name="ro1">
          <table:table-cell table:style-name="ce58" table:content-validation-name="val5" office:value-type="date" office:date-value="2026-03-06" calcext:value-type="date">
            <text:p>06/03/2026</text:p>
          </table:table-cell>
          <table:table-cell table:style-name="ce60" office:value-type="currency" office:currency="EUR" office:value="493" calcext:value-type="currency">
            <text:p>€493.00</text:p>
          </table:table-cell>
          <table:table-cell table:style-name="ce62" table:formula="of:=[.B3]/[.D3]" office:value-type="currency" office:currency="USD" office:value="560.354626051375" calcext:value-type="currency">
            <text:p>$560.35</text:p>
          </table:table-cell>
          <table:table-cell table:style-name="ce27" office:value-type="float" office:value="0.8798" calcext:value-type="float">
            <text:p>0.8798</text:p>
          </table:table-cell>
          <table:table-cell table:style-name="ce64" office:value-type="string" calcext:value-type="string">
            <text:p>Liq. Viernes 06/03</text:p>
          </table:table-cell>
          <table:table-cell table:number-columns-repeated="1019"/>
        </table:table-row>
        <table:table-row table:style-name="ro1">
          <table:table-cell table:style-name="ce58" table:content-validation-name="val5" office:value-type="date" office:date-value="2026-03-16" calcext:value-type="date">
            <text:p>16/03/2026</text:p>
          </table:table-cell>
          <table:table-cell table:style-name="ce60" office:value-type="currency" office:currency="EUR" office:value="299" calcext:value-type="currency">
            <text:p>€299.00</text:p>
          </table:table-cell>
          <table:table-cell table:style-name="ce62" table:formula="of:=[.B4]/[.D4]" office:value-type="currency" office:currency="USD" office:value="336.030568667116" calcext:value-type="currency">
            <text:p>$336.03</text:p>
          </table:table-cell>
          <table:table-cell table:style-name="ce27" office:value-type="float" office:value="0.8898" calcext:value-type="float">
            <text:p>0.8898</text:p>
          </table:table-cell>
          <table:table-cell table:style-name="ce64" office:value-type="string" calcext:value-type="string">
            <text:p>Liq. Viernes 13/03</text:p>
          </table:table-cell>
          <table:table-cell table:number-columns-repeated="1019"/>
        </table:table-row>
        <table:table-row table:style-name="ro1">
          <table:table-cell table:style-name="ce58" table:content-validation-name="val5" office:value-type="date" office:date-value="2026-03-27" calcext:value-type="date">
            <text:p>27/03/2026</text:p>
          </table:table-cell>
          <table:table-cell table:style-name="ce60" office:value-type="currency" office:currency="EUR" office:value="269.53" calcext:value-type="currency">
            <text:p>€269.53</text:p>
          </table:table-cell>
          <table:table-cell table:style-name="ce62" office:value-type="currency" office:currency="USD" office:value="304.96" calcext:value-type="currency">
            <text:p>$304.96</text:p>
          </table:table-cell>
          <table:table-cell table:style-name="ce27" office:value-type="float" office:value="0.883" calcext:value-type="float">
            <text:p>0.883</text:p>
          </table:table-cell>
          <table:table-cell table:style-name="ce64" office:value-type="string" calcext:value-type="string">
            <text:p>Liq. 20/03/2026</text:p>
          </table:table-cell>
          <table:table-cell table:number-columns-repeated="1019"/>
        </table:table-row>
        <table:table-row table:style-name="ro1">
          <table:table-cell table:style-name="ce58" table:content-validation-name="val5" office:value-type="date" office:date-value="2026-04-03" calcext:value-type="date">
            <text:p>03/04/2026</text:p>
          </table:table-cell>
          <table:table-cell table:style-name="ce60" office:value-type="currency" office:currency="EUR" office:value="500" calcext:value-type="currency">
            <text:p>€500.00</text:p>
          </table:table-cell>
          <table:table-cell table:style-name="ce62" office:value-type="currency" office:currency="USD" office:value="567.47" calcext:value-type="currency">
            <text:p>$567.47</text:p>
          </table:table-cell>
          <table:table-cell table:style-name="ce27" office:value-type="float" office:value="0.8811" calcext:value-type="float">
            <text:p>0.8811</text:p>
          </table:table-cell>
          <table:table-cell table:style-name="ce64" office:value-type="string" calcext:value-type="string">
            <text:p>Liq. 06/04/2026</text:p>
          </table:table-cell>
          <table:table-cell table:number-columns-repeated="1019"/>
        </table:table-row>
        <table:table-row table:style-name="ro2" table:number-rows-repeated="6">
          <table:table-cell/>
          <table:table-cell table:style-name="ce7"/>
          <table:table-cell table:style-name="ce17"/>
          <table:table-cell table:number-columns-repeated="1021"/>
        </table:table-row>
        <table:table-row table:style-name="ro2">
          <table:table-cell/>
          <table:table-cell table:style-name="ce7"/>
          <table:table-cell table:style-name="ce17"/>
          <table:table-cell/>
          <table:table-cell table:style-name="ce18"/>
          <table:table-cell table:number-columns-repeated="1019"/>
        </table:table-row>
        <table:table-row table:style-name="ro2" table:number-rows-repeated="987">
          <table:table-cell/>
          <table:table-cell table:style-name="ce7"/>
          <table:table-cell table:style-name="ce17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lance Stripe" table:style-name="ta8">
        <table:table-column table:style-name="co13" table:number-columns-repeated="1024" table:default-cell-style-name="Default"/>
        <table:table-row table:style-name="ro2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Source</text:p>
          </table:table-cell>
          <table:table-cell table:style-name="ce18" office:value-type="string" calcext:value-type="string">
            <text:p>Amount</text:p>
          </table:table-cell>
          <table:table-cell table:style-name="ce18" office:value-type="string" calcext:value-type="string">
            <text:p>Fee</text:p>
          </table:table-cell>
          <table:table-cell table:style-name="ce18" office:value-type="string" calcext:value-type="string">
            <text:p>Net</text:p>
          </table:table-cell>
          <table:table-cell table:style-name="ce18" office:value-type="string" calcext:value-type="string">
            <text:p>Currency</text:p>
          </table:table-cell>
          <table:table-cell table:style-name="ce18" office:value-type="string" calcext:value-type="string">
            <text:p>Created (UTC)</text:p>
          </table:table-cell>
          <table:table-cell table:style-name="ce18" office:value-type="string" calcext:value-type="string">
            <text:p>Available On (UTC)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3vThQRhkM9CcvM1MbA02WJ</text:p>
          </table:table-cell>
          <table:table-cell table:style-name="ce18" office:value-type="string" calcext:value-type="string">
            <text:p>charge</text:p>
          </table:table-cell>
          <table:table-cell table:style-name="ce18" office:value-type="string" calcext:value-type="string">
            <text:p>ch_3T3vThQRhkM9CcvM1Nlcd9Sx</text:p>
          </table:table-cell>
          <table:table-cell table:style-name="ce18" office:value-type="string" calcext:value-type="string">
            <text:p>1,00</text:p>
          </table:table-cell>
          <table:table-cell table:style-name="ce18" office:value-type="string" calcext:value-type="string">
            <text:p>0,28</text:p>
          </table:table-cell>
          <table:table-cell table:style-name="ce18" office:value-type="string" calcext:value-type="string">
            <text:p>0,72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3T09:30:00" calcext:value-type="date">
            <text:p>2026-02-23 09:30</text:p>
          </table:table-cell>
          <table:table-cell table:style-name="ce65" office:value-type="date" office:date-value="2026-03-02" calcext:value-type="date">
            <text:p>2026-03-02 00:0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3ukyQRhkM9CcvM1dVLOJjO</text:p>
          </table:table-cell>
          <table:table-cell table:style-name="ce18" office:value-type="string" calcext:value-type="string">
            <text:p>charge</text:p>
          </table:table-cell>
          <table:table-cell table:style-name="ce18" office:value-type="string" calcext:value-type="string">
            <text:p>ch_3T3ukyQRhkM9CcvM15lLbPIj</text:p>
          </table:table-cell>
          <table:table-cell table:style-name="ce18" office:value-type="string" calcext:value-type="string">
            <text:p>1,00</text:p>
          </table:table-cell>
          <table:table-cell table:style-name="ce18" office:value-type="string" calcext:value-type="string">
            <text:p>0,28</text:p>
          </table:table-cell>
          <table:table-cell table:style-name="ce18" office:value-type="string" calcext:value-type="string">
            <text:p>0,72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3T08:44:00" calcext:value-type="date">
            <text:p>2026-02-23 08:44</text:p>
          </table:table-cell>
          <table:table-cell table:style-name="ce65" office:value-type="date" office:date-value="2026-03-02" calcext:value-type="date">
            <text:p>2026-03-02 00:0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3ueNQRhkM9CcvM1smkosBR</text:p>
          </table:table-cell>
          <table:table-cell table:style-name="ce18" office:value-type="string" calcext:value-type="string">
            <text:p>charge</text:p>
          </table:table-cell>
          <table:table-cell table:style-name="ce18" office:value-type="string" calcext:value-type="string">
            <text:p>ch_3T3ueNQRhkM9CcvM1gXVJwD5</text:p>
          </table:table-cell>
          <table:table-cell table:style-name="ce18" office:value-type="string" calcext:value-type="string">
            <text:p>1,00</text:p>
          </table:table-cell>
          <table:table-cell table:style-name="ce18" office:value-type="string" calcext:value-type="string">
            <text:p>0,28</text:p>
          </table:table-cell>
          <table:table-cell table:style-name="ce18" office:value-type="string" calcext:value-type="string">
            <text:p>0,72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3T08:37:00" calcext:value-type="date">
            <text:p>2026-02-23 08:37</text:p>
          </table:table-cell>
          <table:table-cell table:style-name="ce65" office:value-type="date" office:date-value="2026-03-02" calcext:value-type="date">
            <text:p>2026-03-02 00:0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3ubRQRhkM9CcvM0FuqZt9T</text:p>
          </table:table-cell>
          <table:table-cell table:style-name="ce18" office:value-type="string" calcext:value-type="string">
            <text:p>charge</text:p>
          </table:table-cell>
          <table:table-cell table:style-name="ce18" office:value-type="string" calcext:value-type="string">
            <text:p>ch_3T3ubRQRhkM9CcvM0tducYkb</text:p>
          </table:table-cell>
          <table:table-cell table:style-name="ce18" office:value-type="string" calcext:value-type="string">
            <text:p>1,00</text:p>
          </table:table-cell>
          <table:table-cell table:style-name="ce18" office:value-type="string" calcext:value-type="string">
            <text:p>0,28</text:p>
          </table:table-cell>
          <table:table-cell table:style-name="ce18" office:value-type="string" calcext:value-type="string">
            <text:p>0,72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3T08:34:00" calcext:value-type="date">
            <text:p>2026-02-23 08:34</text:p>
          </table:table-cell>
          <table:table-cell table:style-name="ce65" office:value-type="date" office:date-value="2026-03-02" calcext:value-type="date">
            <text:p>2026-03-02 00:0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2z6IQRhkM9CcvM0MseUoB5</text:p>
          </table:table-cell>
          <table:table-cell table:style-name="ce18" office:value-type="string" calcext:value-type="string">
            <text:p>charge</text:p>
          </table:table-cell>
          <table:table-cell table:style-name="ce18" office:value-type="string" calcext:value-type="string">
            <text:p>ch_3T2z6IQRhkM9CcvM0M1xesT5</text:p>
          </table:table-cell>
          <table:table-cell table:style-name="ce18" office:value-type="string" calcext:value-type="string">
            <text:p>1,00</text:p>
          </table:table-cell>
          <table:table-cell table:style-name="ce18" office:value-type="string" calcext:value-type="string">
            <text:p>0,28</text:p>
          </table:table-cell>
          <table:table-cell table:style-name="ce18" office:value-type="string" calcext:value-type="string">
            <text:p>0,72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0T19:10:00" calcext:value-type="date">
            <text:p>2026-02-20 19:10</text:p>
          </table:table-cell>
          <table:table-cell table:style-name="ce65" office:value-type="date" office:date-value="2026-02-27" calcext:value-type="date">
            <text:p>2026-02-27 00:0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2yzhQRhkM9CcvM0gDRP6Yx</text:p>
          </table:table-cell>
          <table:table-cell table:style-name="ce18" office:value-type="string" calcext:value-type="string">
            <text:p>charge</text:p>
          </table:table-cell>
          <table:table-cell table:style-name="ce18" office:value-type="string" calcext:value-type="string">
            <text:p>ch_3T2yzhQRhkM9CcvM0o0fZbOD</text:p>
          </table:table-cell>
          <table:table-cell table:style-name="ce18" office:value-type="string" calcext:value-type="string">
            <text:p>23,00</text:p>
          </table:table-cell>
          <table:table-cell table:style-name="ce18" office:value-type="string" calcext:value-type="string">
            <text:p>1,00</text:p>
          </table:table-cell>
          <table:table-cell table:style-name="ce18" office:value-type="string" calcext:value-type="string">
            <text:p>22,00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0T19:04:00" calcext:value-type="date">
            <text:p>2026-02-20 19:04</text:p>
          </table:table-cell>
          <table:table-cell table:style-name="ce65" office:value-type="date" office:date-value="2026-02-27" calcext:value-type="date">
            <text:p>2026-02-27 00:0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2wqcQRhkM9CcvM1EMhoGBw</text:p>
          </table:table-cell>
          <table:table-cell table:style-name="ce18" office:value-type="string" calcext:value-type="string">
            <text:p>refund</text:p>
          </table:table-cell>
          <table:table-cell table:style-name="ce18" office:value-type="string" calcext:value-type="string">
            <text:p>ch_3T2wqcQRhkM9CcvM11xsHuBE</text:p>
          </table:table-cell>
          <table:table-cell table:style-name="ce18" office:value-type="string" calcext:value-type="string">
            <text:p>-6,00</text:p>
          </table:table-cell>
          <table:table-cell table:style-name="ce18" office:value-type="string" calcext:value-type="string">
            <text:p>0,00</text:p>
          </table:table-cell>
          <table:table-cell table:style-name="ce18" office:value-type="string" calcext:value-type="string">
            <text:p>-6,00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0T18:41:00" calcext:value-type="date">
            <text:p>2026-02-20 18:41</text:p>
          </table:table-cell>
          <table:table-cell table:style-name="ce65" office:value-type="date" office:date-value="2026-02-27" calcext:value-type="date">
            <text:p>2026-02-27 00:0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2wu9QRhkM9CcvM11UQNIQL</text:p>
          </table:table-cell>
          <table:table-cell table:style-name="ce18" office:value-type="string" calcext:value-type="string">
            <text:p>refund</text:p>
          </table:table-cell>
          <table:table-cell table:style-name="ce18" office:value-type="string" calcext:value-type="string">
            <text:p>ch_3T2wu9QRhkM9CcvM1xP45x9f</text:p>
          </table:table-cell>
          <table:table-cell table:style-name="ce18" office:value-type="string" calcext:value-type="string">
            <text:p>-12,00</text:p>
          </table:table-cell>
          <table:table-cell table:style-name="ce18" office:value-type="string" calcext:value-type="string">
            <text:p>0,00</text:p>
          </table:table-cell>
          <table:table-cell table:style-name="ce18" office:value-type="string" calcext:value-type="string">
            <text:p>-12,00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0T18:17:00" calcext:value-type="date">
            <text:p>2026-02-20 18:17</text:p>
          </table:table-cell>
          <table:table-cell table:style-name="ce65" office:value-type="date" office:date-value="2026-02-27" calcext:value-type="date">
            <text:p>2026-02-27 00:0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2wybQRhkM9CcvM1mTXz7lP</text:p>
          </table:table-cell>
          <table:table-cell table:style-name="ce18" office:value-type="string" calcext:value-type="string">
            <text:p>refund</text:p>
          </table:table-cell>
          <table:table-cell table:style-name="ce18" office:value-type="string" calcext:value-type="string">
            <text:p>ch_3T2wybQRhkM9CcvM1xF4w8M2</text:p>
          </table:table-cell>
          <table:table-cell table:style-name="ce18" office:value-type="string" calcext:value-type="string">
            <text:p>-100,00</text:p>
          </table:table-cell>
          <table:table-cell table:style-name="ce18" office:value-type="string" calcext:value-type="string">
            <text:p>0,00</text:p>
          </table:table-cell>
          <table:table-cell table:style-name="ce18" office:value-type="string" calcext:value-type="string">
            <text:p>-100,00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0T18:10:00" calcext:value-type="date">
            <text:p>2026-02-20 18:10</text:p>
          </table:table-cell>
          <table:table-cell table:style-name="ce65" office:value-type="date" office:date-value="2026-02-27" calcext:value-type="date">
            <text:p>2026-02-27 00:0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2wybQRhkM9CcvM1o24Ztti</text:p>
          </table:table-cell>
          <table:table-cell table:style-name="ce18" office:value-type="string" calcext:value-type="string">
            <text:p>charge</text:p>
          </table:table-cell>
          <table:table-cell table:style-name="ce18" office:value-type="string" calcext:value-type="string">
            <text:p>ch_3T2wybQRhkM9CcvM1xF4w8M2</text:p>
          </table:table-cell>
          <table:table-cell table:style-name="ce18" office:value-type="string" calcext:value-type="string">
            <text:p>100,00</text:p>
          </table:table-cell>
          <table:table-cell table:style-name="ce18" office:value-type="string" calcext:value-type="string">
            <text:p>3,50</text:p>
          </table:table-cell>
          <table:table-cell table:style-name="ce18" office:value-type="string" calcext:value-type="string">
            <text:p>96,50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0T16:54:00" calcext:value-type="date">
            <text:p>2026-02-20 16:54</text:p>
          </table:table-cell>
          <table:table-cell table:style-name="ce65" office:value-type="date" office:date-value="2026-02-27" calcext:value-type="date">
            <text:p>2026-02-27 00:0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2wu9QRhkM9CcvM15bhDQE0</text:p>
          </table:table-cell>
          <table:table-cell table:style-name="ce18" office:value-type="string" calcext:value-type="string">
            <text:p>charge</text:p>
          </table:table-cell>
          <table:table-cell table:style-name="ce18" office:value-type="string" calcext:value-type="string">
            <text:p>ch_3T2wu9QRhkM9CcvM1xP45x9f</text:p>
          </table:table-cell>
          <table:table-cell table:style-name="ce18" office:value-type="string" calcext:value-type="string">
            <text:p>12,00</text:p>
          </table:table-cell>
          <table:table-cell table:style-name="ce18" office:value-type="string" calcext:value-type="string">
            <text:p>0,64</text:p>
          </table:table-cell>
          <table:table-cell table:style-name="ce18" office:value-type="string" calcext:value-type="string">
            <text:p>11,36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0T16:50:00" calcext:value-type="date">
            <text:p>2026-02-20 16:50</text:p>
          </table:table-cell>
          <table:table-cell table:style-name="ce65" office:value-type="date" office:date-value="2026-02-27" calcext:value-type="date">
            <text:p>2026-02-27 00:0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2wqcQRhkM9CcvM1UJxk756</text:p>
          </table:table-cell>
          <table:table-cell table:style-name="ce18" office:value-type="string" calcext:value-type="string">
            <text:p>charge</text:p>
          </table:table-cell>
          <table:table-cell table:style-name="ce18" office:value-type="string" calcext:value-type="string">
            <text:p>ch_3T2wqcQRhkM9CcvM11xsHuBE</text:p>
          </table:table-cell>
          <table:table-cell table:style-name="ce18" office:value-type="string" calcext:value-type="string">
            <text:p>6,00</text:p>
          </table:table-cell>
          <table:table-cell table:style-name="ce18" office:value-type="string" calcext:value-type="string">
            <text:p>0,45</text:p>
          </table:table-cell>
          <table:table-cell table:style-name="ce18" office:value-type="string" calcext:value-type="string">
            <text:p>5,55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0T16:46:00" calcext:value-type="date">
            <text:p>2026-02-20 16:46</text:p>
          </table:table-cell>
          <table:table-cell table:style-name="ce65" office:value-type="date" office:date-value="2026-02-27" calcext:value-type="date">
            <text:p>2026-02-27 00:0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2wpGQRhkM9CcvM1L2iAdOe</text:p>
          </table:table-cell>
          <table:table-cell table:style-name="ce18" office:value-type="string" calcext:value-type="string">
            <text:p>charge</text:p>
          </table:table-cell>
          <table:table-cell table:style-name="ce18" office:value-type="string" calcext:value-type="string">
            <text:p>ch_3T2wpGQRhkM9CcvM1D8RopuQ</text:p>
          </table:table-cell>
          <table:table-cell table:style-name="ce18" office:value-type="string" calcext:value-type="string">
            <text:p>7,00</text:p>
          </table:table-cell>
          <table:table-cell table:style-name="ce18" office:value-type="string" calcext:value-type="string">
            <text:p>0,48</text:p>
          </table:table-cell>
          <table:table-cell table:style-name="ce18" office:value-type="string" calcext:value-type="string">
            <text:p>6,52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0T16:45:00" calcext:value-type="date">
            <text:p>2026-02-20 16:45</text:p>
          </table:table-cell>
          <table:table-cell table:style-name="ce65" office:value-type="date" office:date-value="2026-02-27" calcext:value-type="date">
            <text:p>2026-02-27 00:0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2wcwQRhkM9CcvM18YjUDJK</text:p>
          </table:table-cell>
          <table:table-cell table:style-name="ce18" office:value-type="string" calcext:value-type="string">
            <text:p>charge</text:p>
          </table:table-cell>
          <table:table-cell table:style-name="ce18" office:value-type="string" calcext:value-type="string">
            <text:p>ch_3T2wcwQRhkM9CcvM1AGOln33</text:p>
          </table:table-cell>
          <table:table-cell table:style-name="ce18" office:value-type="string" calcext:value-type="string">
            <text:p>1,00</text:p>
          </table:table-cell>
          <table:table-cell table:style-name="ce18" office:value-type="string" calcext:value-type="string">
            <text:p>0,28</text:p>
          </table:table-cell>
          <table:table-cell table:style-name="ce18" office:value-type="string" calcext:value-type="string">
            <text:p>0,72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0T16:32:00" calcext:value-type="date">
            <text:p>2026-02-20 16:32</text:p>
          </table:table-cell>
          <table:table-cell table:style-name="ce65" office:value-type="date" office:date-value="2026-02-27" calcext:value-type="date">
            <text:p>2026-02-27 00:0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2wXXQRhkM9CcvM05qEcGvS</text:p>
          </table:table-cell>
          <table:table-cell table:style-name="ce18" office:value-type="string" calcext:value-type="string">
            <text:p>charge</text:p>
          </table:table-cell>
          <table:table-cell table:style-name="ce18" office:value-type="string" calcext:value-type="string">
            <text:p>ch_3T2wXXQRhkM9CcvM0oigg1qQ</text:p>
          </table:table-cell>
          <table:table-cell table:style-name="ce18" office:value-type="string" calcext:value-type="string">
            <text:p>15,00</text:p>
          </table:table-cell>
          <table:table-cell table:style-name="ce18" office:value-type="string" calcext:value-type="string">
            <text:p>0,74</text:p>
          </table:table-cell>
          <table:table-cell table:style-name="ce18" office:value-type="string" calcext:value-type="string">
            <text:p>14,26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0T16:26:00" calcext:value-type="date">
            <text:p>2026-02-20 16:26</text:p>
          </table:table-cell>
          <table:table-cell table:style-name="ce65" office:value-type="date" office:date-value="2026-02-27" calcext:value-type="date">
            <text:p>2026-02-27 00:0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2vHOQRhkM9CcvM0vU6ik3L</text:p>
          </table:table-cell>
          <table:table-cell table:style-name="ce18" office:value-type="string" calcext:value-type="string">
            <text:p>charge</text:p>
          </table:table-cell>
          <table:table-cell table:style-name="ce18" office:value-type="string" calcext:value-type="string">
            <text:p>ch_3T2vHOQRhkM9CcvM0mMzEZ8G</text:p>
          </table:table-cell>
          <table:table-cell table:style-name="ce18" office:value-type="string" calcext:value-type="string">
            <text:p>1,00</text:p>
          </table:table-cell>
          <table:table-cell table:style-name="ce18" office:value-type="string" calcext:value-type="string">
            <text:p>0,28</text:p>
          </table:table-cell>
          <table:table-cell table:style-name="ce18" office:value-type="string" calcext:value-type="string">
            <text:p>0,72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0T15:06:00" calcext:value-type="date">
            <text:p>2026-02-20 15:06</text:p>
          </table:table-cell>
          <table:table-cell table:style-name="ce65" office:value-type="date" office:date-value="2026-02-27" calcext:value-type="date">
            <text:p>2026-02-27 00:0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2r1QQRhkM9CcvM0126SsrW</text:p>
          </table:table-cell>
          <table:table-cell table:style-name="ce18" office:value-type="string" calcext:value-type="string">
            <text:p>charge</text:p>
          </table:table-cell>
          <table:table-cell table:style-name="ce18" office:value-type="string" calcext:value-type="string">
            <text:p>ch_3T2r1QQRhkM9CcvM0rJuAvyN</text:p>
          </table:table-cell>
          <table:table-cell table:style-name="ce18" office:value-type="string" calcext:value-type="string">
            <text:p>1,00</text:p>
          </table:table-cell>
          <table:table-cell table:style-name="ce18" office:value-type="string" calcext:value-type="string">
            <text:p>0,28</text:p>
          </table:table-cell>
          <table:table-cell table:style-name="ce18" office:value-type="string" calcext:value-type="string">
            <text:p>0,72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0T10:33:00" calcext:value-type="date">
            <text:p>2026-02-20 10:33</text:p>
          </table:table-cell>
          <table:table-cell table:style-name="ce65" office:value-type="date" office:date-value="2026-02-27" calcext:value-type="date">
            <text:p>2026-02-27 00:0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2qwBQRhkM9CcvM0mBQATeu</text:p>
          </table:table-cell>
          <table:table-cell table:style-name="ce18" office:value-type="string" calcext:value-type="string">
            <text:p>charge</text:p>
          </table:table-cell>
          <table:table-cell table:style-name="ce18" office:value-type="string" calcext:value-type="string">
            <text:p>ch_3T2qwBQRhkM9CcvM0UlPN9bm</text:p>
          </table:table-cell>
          <table:table-cell table:style-name="ce18" office:value-type="string" calcext:value-type="string">
            <text:p>1,00</text:p>
          </table:table-cell>
          <table:table-cell table:style-name="ce18" office:value-type="string" calcext:value-type="string">
            <text:p>0,28</text:p>
          </table:table-cell>
          <table:table-cell table:style-name="ce18" office:value-type="string" calcext:value-type="string">
            <text:p>0,72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0T10:27:00" calcext:value-type="date">
            <text:p>2026-02-20 10:27</text:p>
          </table:table-cell>
          <table:table-cell table:style-name="ce65" office:value-type="date" office:date-value="2026-02-27" calcext:value-type="date">
            <text:p>2026-02-27 00:0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2qhBQRhkM9CcvM0tYARgWW</text:p>
          </table:table-cell>
          <table:table-cell table:style-name="ce18" office:value-type="string" calcext:value-type="string">
            <text:p>charge</text:p>
          </table:table-cell>
          <table:table-cell table:style-name="ce18" office:value-type="string" calcext:value-type="string">
            <text:p>ch_3T2qhBQRhkM9CcvM0Gs1Nqar</text:p>
          </table:table-cell>
          <table:table-cell table:style-name="ce18" office:value-type="string" calcext:value-type="string">
            <text:p>35,00</text:p>
          </table:table-cell>
          <table:table-cell table:style-name="ce18" office:value-type="string" calcext:value-type="string">
            <text:p>1,39</text:p>
          </table:table-cell>
          <table:table-cell table:style-name="ce18" office:value-type="string" calcext:value-type="string">
            <text:p>33,61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0T10:12:00" calcext:value-type="date">
            <text:p>2026-02-20 10:12</text:p>
          </table:table-cell>
          <table:table-cell table:style-name="ce65" office:value-type="date" office:date-value="2026-02-27" calcext:value-type="date">
            <text:p>2026-02-27 00:0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2qb9QRhkM9CcvM0jZKWbpf</text:p>
          </table:table-cell>
          <table:table-cell table:style-name="ce18" office:value-type="string" calcext:value-type="string">
            <text:p>charge</text:p>
          </table:table-cell>
          <table:table-cell table:style-name="ce18" office:value-type="string" calcext:value-type="string">
            <text:p>ch_3T2qb9QRhkM9CcvM0tFnqHOU</text:p>
          </table:table-cell>
          <table:table-cell table:style-name="ce18" office:value-type="string" calcext:value-type="string">
            <text:p>1,00</text:p>
          </table:table-cell>
          <table:table-cell table:style-name="ce18" office:value-type="string" calcext:value-type="string">
            <text:p>0,28</text:p>
          </table:table-cell>
          <table:table-cell table:style-name="ce18" office:value-type="string" calcext:value-type="string">
            <text:p>0,72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0T10:06:00" calcext:value-type="date">
            <text:p>2026-02-20 10:06</text:p>
          </table:table-cell>
          <table:table-cell table:style-name="ce65" office:value-type="date" office:date-value="2026-02-27" calcext:value-type="date">
            <text:p>2026-02-27 00:0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2qVlQRhkM9CcvM0JXYLsLx</text:p>
          </table:table-cell>
          <table:table-cell table:style-name="ce18" office:value-type="string" calcext:value-type="string">
            <text:p>charge</text:p>
          </table:table-cell>
          <table:table-cell table:style-name="ce18" office:value-type="string" calcext:value-type="string">
            <text:p>ch_3T2qVlQRhkM9CcvM0CFm62KD</text:p>
          </table:table-cell>
          <table:table-cell table:style-name="ce18" office:value-type="string" calcext:value-type="string">
            <text:p>55,00</text:p>
          </table:table-cell>
          <table:table-cell table:style-name="ce18" office:value-type="string" calcext:value-type="string">
            <text:p>2,04</text:p>
          </table:table-cell>
          <table:table-cell table:style-name="ce18" office:value-type="string" calcext:value-type="string">
            <text:p>52,96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0T10:00:00" calcext:value-type="date">
            <text:p>2026-02-20 10:00</text:p>
          </table:table-cell>
          <table:table-cell table:style-name="ce65" office:value-type="date" office:date-value="2026-02-27" calcext:value-type="date">
            <text:p>2026-02-27 00:0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2qPyQRhkM9CcvM0mFhbLoo</text:p>
          </table:table-cell>
          <table:table-cell table:style-name="ce18" office:value-type="string" calcext:value-type="string">
            <text:p>charge</text:p>
          </table:table-cell>
          <table:table-cell table:style-name="ce18" office:value-type="string" calcext:value-type="string">
            <text:p>ch_3T2qPyQRhkM9CcvM0vRfFCNj</text:p>
          </table:table-cell>
          <table:table-cell table:style-name="ce18" office:value-type="string" calcext:value-type="string">
            <text:p>1,00</text:p>
          </table:table-cell>
          <table:table-cell table:style-name="ce18" office:value-type="string" calcext:value-type="string">
            <text:p>0,28</text:p>
          </table:table-cell>
          <table:table-cell table:style-name="ce18" office:value-type="string" calcext:value-type="string">
            <text:p>0,72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0T09:54:00" calcext:value-type="date">
            <text:p>2026-02-20 09:54</text:p>
          </table:table-cell>
          <table:table-cell table:style-name="ce65" office:value-type="date" office:date-value="2026-02-27" calcext:value-type="date">
            <text:p>2026-02-27 00:0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xn_3T2qKcQRhkM9CcvM1ADZg53o</text:p>
          </table:table-cell>
          <table:table-cell table:style-name="ce18" office:value-type="string" calcext:value-type="string">
            <text:p>charge</text:p>
          </table:table-cell>
          <table:table-cell table:style-name="ce18" office:value-type="string" calcext:value-type="string">
            <text:p>ch_3T2qKcQRhkM9CcvM1vcvMADS</text:p>
          </table:table-cell>
          <table:table-cell table:style-name="ce18" office:value-type="string" calcext:value-type="string">
            <text:p>10,00</text:p>
          </table:table-cell>
          <table:table-cell table:style-name="ce18" office:value-type="string" calcext:value-type="string">
            <text:p>0,58</text:p>
          </table:table-cell>
          <table:table-cell table:style-name="ce18" office:value-type="string" calcext:value-type="string">
            <text:p>9,42</text:p>
          </table:table-cell>
          <table:table-cell table:style-name="ce18" office:value-type="string" calcext:value-type="string">
            <text:p>eur</text:p>
          </table:table-cell>
          <table:table-cell table:style-name="ce65" office:value-type="date" office:date-value="2026-02-20T09:49:00" calcext:value-type="date">
            <text:p>2026-02-20 09:49</text:p>
          </table:table-cell>
          <table:table-cell table:style-name="ce65" office:value-type="date" office:date-value="2026-02-27" calcext:value-type="date">
            <text:p>2026-02-27 00:00</text:p>
          </table:table-cell>
          <table:table-cell table:number-columns-repeated="1015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t Saldos" table:style-name="ta9">
        <table:table-column table:style-name="co26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13" table:number-columns-repeated="1018" table:default-cell-style-name="Default"/>
        <table:table-row table:style-name="ro1">
          <table:table-cell table:style-name="ce25" office:value-type="string" calcext:value-type="string">
            <text:p>ID Proveedor</text:p>
          </table:table-cell>
          <table:table-cell table:style-name="ce25" office:value-type="string" calcext:value-type="string">
            <text:p>Usuario Telegram</text:p>
          </table:table-cell>
          <table:table-cell table:style-name="ce28" office:value-type="string" calcext:value-type="string">
            <text:p>Telegram ID</text:p>
          </table:table-cell>
          <table:table-cell table:style-name="ce30" office:value-type="string" calcext:value-type="string">
            <text:p>Saldo a Cobrar</text:p>
          </table:table-cell>
          <table:table-cell table:style-name="ce30" office:value-type="string" calcext:value-type="string">
            <text:p>Saldo Total</text:p>
          </table:table-cell>
          <table:table-cell table:style-name="ce25" office:value-type="string" calcext:value-type="string">
            <text:p>Fecha Proxima</text:p>
          </table:table-cell>
          <table:table-cell table:number-columns-repeated="1018"/>
        </table:table-row>
        <table:table-row table:style-name="ro1">
          <table:table-cell table:style-name="ce27" table:number-matrix-columns-spanned="2" table:number-matrix-rows-spanned="1004" table:formula="of:=[$'Semanal - Liquidacion'.O3:.P1000]" office:value-type="float" office:value="21" calcext:value-type="float">
            <text:p>21</text:p>
          </table:table-cell>
          <table:table-cell table:style-name="ce27" office:value-type="string" office:string-value="Lilithmalon1" calcext:value-type="string">
            <text:p>Lilithmalon1</text:p>
          </table:table-cell>
          <table:table-cell table:style-name="ce27" office:value-type="float" office:value="5060587203" calcext:value-type="float">
            <text:p>5060587203</text:p>
          </table:table-cell>
          <table:table-cell table:style-name="ce31" table:formula="of:=SUMIFS([$Transacciones.J$1:.J$1048576]; [$Transacciones.E$1:.E$1048576]; [.A2]; [$Transacciones.L$1:.L$1048576]; &quot;Pendiente&quot;; [$Transacciones.K$1:.K$1048576]; [.$F$2])" office:value-type="currency" office:currency="EUR" office:value="191.536" calcext:value-type="currency">
            <text:p>€191.54</text:p>
          </table:table-cell>
          <table:table-cell table:style-name="ce31" table:formula="of:=SUMIFS([$Transacciones.J$1:.J$1048576]; [$Transacciones.E$1:.E$1048576]; [.A2]; [$Transacciones.L$1:.L$1048576]; &quot;Pendiente&quot;)" office:value-type="currency" office:currency="EUR" office:value="191.536" calcext:value-type="currency">
            <text:p>€191.54</text:p>
          </table:table-cell>
          <table:table-cell table:style-name="ce29" table:formula="of:=minifs([$Transacciones.K$1:.K$1048576]; [$Transacciones.L$1:.L$1048576]; &quot;Pendiente&quot;)" office:value-type="date" office:date-value="2026-04-10" calcext:value-type="date">
            <text:p>10/04/2026</text:p>
          </table:table-cell>
          <table:table-cell table:number-columns-repeated="1018"/>
        </table:table-row>
        <table:table-row table:style-name="ro1">
          <table:table-cell table:style-name="ce27" office:value-type="float" office:value="42" calcext:value-type="float">
            <text:p>42</text:p>
          </table:table-cell>
          <table:table-cell table:style-name="ce27" office:value-type="string" office:string-value="Ninaflores2023" calcext:value-type="string">
            <text:p>Ninaflores2023</text:p>
          </table:table-cell>
          <table:table-cell table:style-name="ce27" office:value-type="float" office:value="5620514613" calcext:value-type="float">
            <text:p>5620514613</text:p>
          </table:table-cell>
          <table:table-cell table:style-name="ce31" table:formula="of:=ABS(SUMIFS([$Transacciones.J$1:.J$1048576]; [$Transacciones.E$1:.E$1048576]; [.A3]; [$Transacciones.L$1:.L$1048576]; &quot;Pendiente&quot;; [$Transacciones.K$1:.K$1048576]; [.$F$2]))" office:value-type="currency" office:currency="EUR" office:value="0" calcext:value-type="currency">
            <text:p>€0.00</text:p>
          </table:table-cell>
          <table:table-cell table:style-name="ce31" table:formula="of:=ABS(SUMIFS([$Transacciones.J$1:.J$1048576]; [$Transacciones.E$1:.E$1048576]; [.A3]; [$Transacciones.L$1:.L$1048576]; &quot;Pendiente&quot;))" office:value-type="currency" office:currency="EUR" office:value="0" calcext:value-type="currency">
            <text:p>€0.00</text:p>
          </table:table-cell>
          <table:table-cell table:style-name="ce29" table:formula="of:=minifs([$Transacciones.K$1:.K$1048576]; [$Transacciones.L$1:.L$1048576]; &quot;Pendiente&quot;)" office:value-type="date" office:date-value="2026-04-10" calcext:value-type="date">
            <text:p>10/04/2026</text:p>
          </table:table-cell>
          <table:table-cell table:style-name="ce66"/>
          <table:table-cell table:number-columns-repeated="1017"/>
        </table:table-row>
        <table:table-row table:style-name="ro1">
          <table:table-cell table:style-name="ce27" office:value-type="float" office:value="63" calcext:value-type="float">
            <text:p>63</text:p>
          </table:table-cell>
          <table:table-cell table:style-name="ce27" office:value-type="string" office:string-value="AngieStone1" calcext:value-type="string">
            <text:p>AngieStone1</text:p>
          </table:table-cell>
          <table:table-cell table:style-name="ce27" office:value-type="float" office:value="5783049183" calcext:value-type="float">
            <text:p>5783049183</text:p>
          </table:table-cell>
          <table:table-cell table:style-name="ce31" table:formula="of:=ABS(SUMIFS([$Transacciones.J$1:.J$1048576]; [$Transacciones.E$1:.E$1048576]; [.A4]; [$Transacciones.L$1:.L$1048576]; &quot;Pendiente&quot;; [$Transacciones.K$1:.K$1048576]; [.$F$2]))" office:value-type="currency" office:currency="EUR" office:value="100" calcext:value-type="currency">
            <text:p>€100.00</text:p>
          </table:table-cell>
          <table:table-cell table:style-name="ce31" table:formula="of:=ABS(SUMIFS([$Transacciones.J$1:.J$1048576]; [$Transacciones.E$1:.E$1048576]; [.A4]; [$Transacciones.L$1:.L$1048576]; &quot;Pendiente&quot;))" office:value-type="currency" office:currency="EUR" office:value="100" calcext:value-type="currency">
            <text:p>€100.00</text:p>
          </table:table-cell>
          <table:table-cell table:style-name="ce29" table:formula="of:=minifs([$Transacciones.K$1:.K$1048576]; [$Transacciones.L$1:.L$1048576]; &quot;Pendiente&quot;)" office:value-type="date" office:date-value="2026-04-10" calcext:value-type="date">
            <text:p>10/04/2026</text:p>
          </table:table-cell>
          <table:table-cell table:style-name="ce66"/>
          <table:table-cell table:number-columns-repeated="1017"/>
        </table:table-row>
        <table:table-row table:style-name="ro1">
          <table:table-cell table:style-name="ce27" office:value-type="float" office:value="36" calcext:value-type="float">
            <text:p>36</text:p>
          </table:table-cell>
          <table:table-cell table:style-name="ce27" office:value-type="string" office:string-value="RTJonas" calcext:value-type="string">
            <text:p>RTJonas</text:p>
          </table:table-cell>
          <table:table-cell table:style-name="ce27" office:value-type="float" office:value="1205178276" calcext:value-type="float">
            <text:p>1205178276</text:p>
          </table:table-cell>
          <table:table-cell table:style-name="ce31" office:value-type="currency" office:currency="EUR" office:value="23" calcext:value-type="currency">
            <text:p>€23.00</text:p>
          </table:table-cell>
          <table:table-cell table:style-name="ce31" office:value-type="currency" office:currency="EUR" office:value="65" calcext:value-type="currency">
            <text:p>€65.00</text:p>
          </table:table-cell>
          <table:table-cell table:style-name="ce29" table:formula="of:=minifs([$Transacciones.K$1:.K$1048576]; [$Transacciones.L$1:.L$1048576]; &quot;Pendiente&quot;)" office:value-type="date" office:date-value="2026-04-10" calcext:value-type="date">
            <text:p>10/04/2026</text:p>
          </table:table-cell>
          <table:table-cell table:number-columns-repeated="1018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table:number-matrix-columns-spanned="2" table:number-matrix-rows-spanned="993" table:formula="of:=[$'Semanal - Liquidacion'.Q14:.R1000]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19" office:value-type="float" office:value="0" calcext:value-type="float">
            <text:p/>
          </table:table-cell>
          <table:table-cell table:style-name="ce7" office:value-type="currency" office:currency="EUR" office:value="0" calcext:value-type="currency">
            <text:p/>
          </table:table-cell>
          <table:table-cell table:style-name="ce7"/>
          <table:table-cell table:number-columns-repeated="1019"/>
        </table:table-row>
        <table:table-row table:style-name="ro2">
          <table:table-cell table:style-name="ce19" office:value-type="string" office:string-value="" calcext:value-type="error">
            <text:p>#N/A</text:p>
          </table:table-cell>
          <table:table-cell table:style-name="ce19" office:value-type="string" office:string-value="" calcext:value-type="error">
            <text:p>#N/A</text:p>
          </table:table-cell>
          <table:table-cell table:style-name="ce19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/>
          <table:table-cell table:number-columns-repeated="1019"/>
        </table:table-row>
        <table:table-row table:style-name="ro3"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3"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3"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3"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3"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illetera Ads" table:style-name="ta10">
        <table:table-column table:style-name="co13" table:default-cell-style-name="Default"/>
        <table:table-column table:style-name="co23" table:number-columns-repeated="2" table:default-cell-style-name="Default"/>
        <table:table-column table:style-name="co13" table:number-columns-repeated="1021" table:default-cell-style-name="Default"/>
        <table:table-row table:style-name="ro1">
          <table:table-cell table:style-name="ce25" office:value-type="string" calcext:value-type="string">
            <text:p>Fecha</text:p>
          </table:table-cell>
          <table:table-cell table:style-name="ce25" office:value-type="string" calcext:value-type="string">
            <text:p>Movimiento</text:p>
          </table:table-cell>
          <table:table-cell table:style-name="ce25" office:value-type="string" calcext:value-type="string">
            <text:p>ID Creadora</text:p>
          </table:table-cell>
          <table:table-cell table:style-name="ce30" office:value-type="string" calcext:value-type="string">
            <text:p>Monto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67" office:value-type="date" office:date-value="2026-03-18T15:49:07" calcext:value-type="date">
            <text:p>18/03/2026 15:49:07</text:p>
          </table:table-cell>
          <table:table-cell table:style-name="ce27" office:value-type="string" calcext:value-type="string">
            <text:p>INGRESO</text:p>
          </table:table-cell>
          <table:table-cell table:style-name="ce27" office:value-type="float" office:value="36" calcext:value-type="float">
            <text:p>36</text:p>
          </table:table-cell>
          <table:table-cell table:style-name="ce31" office:value-type="currency" office:currency="EUR" office:value="50" calcext:value-type="currency">
            <text:p>€50.00</text:p>
          </table:table-cell>
          <table:table-cell table:number-columns-repeated="2"/>
          <table:table-cell table:style-name="ce19" table:formula="of:=IFERROR(__xludf.dummyfunction(&quot;QUERY(A:D, &quot;&quot;SELECT C, SUM(D) WHERE C IS NOT NULL GROUP BY C LABEL C 'ID Creadora', SUM(D) 'Saldo Disponible'&quot;&quot;, 1)&quot;);&quot;ID Creadora&quot;)" office:value-type="string" office:string-value="ID Creadora" calcext:value-type="string">
            <text:p>ID Creadora</text:p>
          </table:table-cell>
          <table:table-cell table:style-name="ce7" table:formula="of:=IFERROR(__xludf.dummyfunction(&quot;&quot;&quot;COMPUTED_VALUE&quot;&quot;&quot;);&quot;Saldo Disponible&quot;)" office:value-type="string" office:string-value="Saldo Disponible" calcext:value-type="string">
            <text:p>Saldo Disponible</text:p>
          </table:table-cell>
          <table:table-cell table:number-columns-repeated="1016"/>
        </table:table-row>
        <table:table-row table:style-name="ro1">
          <table:table-cell table:style-name="ce67" office:value-type="date" office:date-value="2026-04-02T21:55:16" calcext:value-type="date">
            <text:p>02/04/2026 21:55:16</text:p>
          </table:table-cell>
          <table:table-cell table:style-name="ce27" office:value-type="string" calcext:value-type="string">
            <text:p>INGRESO</text:p>
          </table:table-cell>
          <table:table-cell table:style-name="ce27" office:value-type="float" office:value="21" calcext:value-type="float">
            <text:p>21</text:p>
          </table:table-cell>
          <table:table-cell table:style-name="ce31" office:value-type="currency" office:currency="EUR" office:value="150" calcext:value-type="currency">
            <text:p>€150.00</text:p>
          </table:table-cell>
          <table:table-cell table:number-columns-repeated="2"/>
          <table:table-cell table:style-name="ce19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7" table:formula="of:=IFERROR(__xludf.dummyfunction(&quot;&quot;&quot;COMPUTED_VALUE&quot;&quot;&quot;);150)" office:value-type="currency" office:currency="EUR" office:value="150" calcext:value-type="currency">
            <text:p>€150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7"/>
          <table:table-cell table:number-columns-repeated="2"/>
          <table:table-cell table:style-name="ce19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7" table:formula="of:=IFERROR(__xludf.dummyfunction(&quot;&quot;&quot;COMPUTED_VALUE&quot;&quot;&quot;);50)" office:value-type="currency" office:currency="EUR" office:value="50" calcext:value-type="currency">
            <text:p>€50.00</text:p>
          </table:table-cell>
          <table:table-cell table:number-columns-repeated="1016"/>
        </table:table-row>
        <table:table-row table:style-name="ro2" table:number-rows-repeated="998"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gistro Facturas" table:style-name="ta11">
        <table:table-column table:style-name="co13" table:number-columns-repeated="1024" table:default-cell-style-name="Default"/>
        <table:table-row table:style-name="ro1">
          <table:table-cell table:style-name="ce25" office:value-type="string" calcext:value-type="string">
            <text:p>Nº Factura</text:p>
          </table:table-cell>
          <table:table-cell table:style-name="ce25" office:value-type="string" calcext:value-type="string">
            <text:p>Fecha</text:p>
          </table:table-cell>
          <table:table-cell table:style-name="ce25" office:value-type="string" calcext:value-type="string">
            <text:p>ID</text:p>
          </table:table-cell>
          <table:table-cell table:style-name="ce25" office:value-type="string" calcext:value-type="string">
            <text:p>Cliente</text:p>
          </table:table-cell>
          <table:table-cell table:style-name="ce25" office:value-type="string" calcext:value-type="string">
            <text:p>Total</text:p>
          </table:table-cell>
          <table:table-cell table:number-columns-repeated="1019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Billetera_Ads" table:target-range-address="'Billetera Ads'.A1:'Billetera Ads'.D3"/>
        <table:database-range table:name="Extracto_Semanal" table:target-range-address="'Semanal - Liquidacion'.O2:'Semanal - Liquidacion'.T6"/>
        <table:database-range table:name="Facturas" table:target-range-address="'Registro Facturas'.A1:'Registro Facturas'.E1" table:contains-header="false"/>
        <table:database-range table:name="Gastos_Talaria" table:target-range-address="'Gastos Talaria'.A1:'Gastos Talaria'.H11"/>
        <table:database-range table:name="Historial_de_Liquidaciones" table:target-range-address="'Historial de Pagos'.A1:'Historial de Pagos'.I14"/>
        <table:database-range table:name="Historial_Exchange_Rate" table:target-range-address="'Semanal - Liquidacion'.K2:'Semanal - Liquidacion'.M7"/>
        <table:database-range table:name="Table1" table:target-range-address="'Payouts Stripe'.A1:'Payouts Stripe'.D10"/>
        <table:database-range table:name="Table2" table:target-range-address="'Fondeo Kraken'.A1:'Fondeo Kraken'.E6"/>
        <table:database-range table:name="Table3" table:target-range-address="'Bot Saldos'.A1:'Bot Saldos'.F5"/>
        <table:database-range table:name="Transacciones" table:target-range-address="Transacciones.A1:Transacciones.M134"/>
      </table:database-ranges>
      <table:data-pilot-tables>
        <table:data-pilot-table table:name="Historial de Pagos" table:application-data="" table:target-range-address="'Historial de Pagos'.K2:'Historial de Pagos'.M10" table:buttons="'Historial de Pagos'.K3 'Historial de Pagos'.L2" table:show-filter-button="false">
          <table:source-cell-range table:cell-range-address="'Historial de Pagos'.A1:'Historial de Pagos'.I998"/>
          <table:data-pilot-field table:source-field-name="ID Proveedo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1" table:display="true" table:show-details="true"/>
                <table:data-pilot-member table:name="42" table:display="true" table:show-details="true"/>
                <table:data-pilot-member table:name="63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Brut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€440.00" table:display="true" table:show-details="true"/>
                <table:data-pilot-member table:name="€790.00" table:display="true" table:show-details="true"/>
                <table:data-pilot-member table:name="€232.00" table:display="true" table:show-details="true"/>
                <table:data-pilot-member table:name="€531.00" table:display="true" table:show-details="true"/>
                <table:data-pilot-member table:name="€285.00" table:display="true" table:show-details="true"/>
                <table:data-pilot-member table:name="€92.00" table:display="true" table:show-details="true"/>
                <table:data-pilot-member table:name="€101.00" table:display="true" table:show-details="true"/>
                <table:data-pilot-member table:name="€75.00" table:display="true" table:show-details="true"/>
                <table:data-pilot-member table:name="€136.00" table:display="true" table:show-details="true"/>
                <table:data-pilot-member table:name="€50.00" table:display="true" table:show-details="true"/>
                <table:data-pilot-member table:name="€165.00" table:display="true" table:show-details="true"/>
                <table:data-pilot-member table:name="€105.00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misione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€10.25" table:display="true" table:show-details="true"/>
                <table:data-pilot-member table:name="€14.22" table:display="true" table:show-details="true"/>
                <table:data-pilot-member table:name="€8.06" table:display="true" table:show-details="true"/>
                <table:data-pilot-member table:name="€4.33" table:display="true" table:show-details="true"/>
                <table:data-pilot-member table:name="€0.00" table:display="true" table:show-details="true"/>
                <table:data-pilot-member table:name="€1.89" table:display="true" table:show-details="true"/>
                <table:data-pilot-member table:name="€0.97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 Liquida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€318.42" table:display="true" table:show-details="true"/>
                <table:data-pilot-member table:name="€269.53" table:display="true" table:show-details="true"/>
                <table:data-pilot-member table:name="€179.15" table:display="true" table:show-details="true"/>
                <table:data-pilot-member table:name="€284.83" table:display="true" table:show-details="true"/>
                <table:data-pilot-member table:name="€228.00" table:display="true" table:show-details="true"/>
                <table:data-pilot-member table:name="€73.60" table:display="true" table:show-details="true"/>
                <table:data-pilot-member table:name="€79.29" table:display="true" table:show-details="true"/>
                <table:data-pilot-member table:name="€60.00" table:display="true" table:show-details="true"/>
                <table:data-pilot-member table:name="€108.02" table:display="true" table:show-details="true"/>
                <table:data-pilot-member table:name="€40.00" table:display="true" table:show-details="true"/>
                <table:data-pilot-member table:name="€132.00" table:display="true" table:show-details="true"/>
                <table:data-pilot-member table:name="€84.00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USDT Enviado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$361.00" table:display="true" table:show-details="true"/>
                <table:data-pilot-member table:name="$305.00" table:display="true" table:show-details="true"/>
                <table:data-pilot-member table:name="$201.00" table:display="true" table:show-details="true"/>
                <table:data-pilot-member table:name="$323.00" table:display="true" table:show-details="true"/>
                <table:data-pilot-member table:name="$264.00" table:display="true" table:show-details="true"/>
                <table:data-pilot-member table:name="$83.00" table:display="true" table:show-details="true"/>
                <table:data-pilot-member table:name="$89.00" table:display="true" table:show-details="true"/>
                <table:data-pilot-member table:name="$68.00" table:display="true" table:show-details="true"/>
                <table:data-pilot-member table:name="$69.00" table:display="true" table:show-details="true"/>
                <table:data-pilot-member table:name="$122.00" table:display="true" table:show-details="true"/>
                <table:data-pilot-member table:name="$44.00" table:display="true" table:show-details="true"/>
                <table:data-pilot-member table:name="$150.00" table:display="true" table:show-details="true"/>
                <table:data-pilot-member table:name="$97.00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xchange Ra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8811" table:display="true" table:show-details="true"/>
                <table:data-pilot-member table:name="0.883" table:display="true" table:show-details="true"/>
                <table:data-pilot-member table:name="0.8898" table:display="true" table:show-details="true"/>
                <table:data-pilot-member table:name="0.8798" table:display="true" table:show-details="true"/>
                <table:data-pilot-member table:name="0.8626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echa de Liquidación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IRPF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€23.42" table:display="true" table:show-details="true"/>
                <table:data-pilot-member table:name="€31.03" table:display="true" table:show-details="true"/>
                <table:data-pilot-member table:name="€8.96" table:display="true" table:show-details="true"/>
                <table:data-pilot-member table:name="€21.07" table:display="true" table:show-details="true"/>
                <table:data-pilot-member table:name="€11.40" table:display="true" table:show-details="true"/>
                <table:data-pilot-member table:name="€3.68" table:display="true" table:show-details="true"/>
                <table:data-pilot-member table:name="€3.96" table:display="true" table:show-details="true"/>
                <table:data-pilot-member table:name="€3.00" table:display="true" table:show-details="true"/>
                <table:data-pilot-member table:name="€5.40" table:display="true" table:show-details="true"/>
                <table:data-pilot-member table:name="€2.00" table:display="true" table:show-details="true"/>
                <table:data-pilot-member table:name="€6.60" table:display="true" table:show-details="true"/>
                <table:data-pilot-member table:name="€4.20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Honorarios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€117.11" table:display="true" table:show-details="true"/>
                <table:data-pilot-member table:name="€155.16" table:display="true" table:show-details="true"/>
                <table:data-pilot-member table:name="€44.79" table:display="true" table:show-details="true"/>
                <table:data-pilot-member table:name="€105.33" table:display="true" table:show-details="true"/>
                <table:data-pilot-member table:name="€57.00" table:display="true" table:show-details="true"/>
                <table:data-pilot-member table:name="€18.40" table:display="true" table:show-details="true"/>
                <table:data-pilot-member table:name="€19.82" table:display="true" table:show-details="true"/>
                <table:data-pilot-member table:name="€15.00" table:display="true" table:show-details="true"/>
                <table:data-pilot-member table:name="€27.01" table:display="true" table:show-details="true"/>
                <table:data-pilot-member table:name="€10.00" table:display="true" table:show-details="true"/>
                <table:data-pilot-member table:name="€33.00" table:display="true" table:show-details="true"/>
                <table:data-pilot-member table:name="€21.00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 Text&quot;" svg:font-family="'&quot;Google Sans Text&quot;'"/>
    <style:font-face style:name="Arial" svg:font-family="Arial"/>
    <style:font-face style:name="Calibri" svg:font-family="Calibri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>€</number:currency-symbol>
      <number:number number:decimal-places="2" loext:min-decimal-places="2" number:min-integer-digits="1" number:grouping="true"/>
    </number:currency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currency-style style:name="N127">
      <number:currency-symbol>$</number:currency-symbol>
      <number:number number:decimal-places="2" loext:min-decimal-places="2" number:min-integer-digits="1" number:grouping="true"/>
    </number:currency-style>
    <number:date-style style:name="N12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31">
      <number:number number:decimal-places="4" loext:min-decimal-places="4" number:min-integer-digits="1"/>
    </number:number-style>
    <number:date-style style:name="N13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6" style:display-name="ConditionalStyle_6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nsacciones" style:display-name="PageStyle_Transac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l_20_-_20_Liquidacion" style:display-name="PageStyle_Semanal - Liquidac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orial_20_de_20_Pagos" style:display-name="PageStyle_Historial de Pag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ndimientos" style:display-name="PageStyle_Rendimi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outs_20_Stripe" style:display-name="PageStyle_Payouts Stri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stos_20_Talaria" style:display-name="PageStyle_Gastos Tala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ndeo_20_Kraken" style:display-name="PageStyle_Fondeo Krak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ance_20_Stripe" style:display-name="PageStyle_Balance Stri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t_20_Saldos" style:display-name="PageStyle_Bot Sal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lletera_20_Ads" style:display-name="PageStyle_Billetera A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ro_20_Facturas" style:display-name="PageStyle_Registro Factur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6368" meta:object-count="7"/>
    <meta:generator>LibreOfficeDev/6.0.5.2$Linux_X86_64 LibreOffice_project/</meta:generator>
  </office:meta>
</office:document-meta>
</file>